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1">
      <style:table-cell-properties fo:border="thin solid #000000" style:vertical-align="middle" fo:wrap-option="wrap" fo:background-color="#FFFF00"/>
    </style:style>
    <style:style style:name="ce5" style:family="table-cell" style:parent-style-name="Default" style:data-style-name="N1">
      <style:table-cell-properties fo:border="thin solid #000000" style:vertical-align="middle" fo:wrap-option="wrap"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8" style:family="table-cell" style:parent-style-name="Default" style:data-style-name="N1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/>
    </style:style>
    <style:style style:name="ce15" style:family="table-cell" style:parent-style-name="Default" style:data-style-name="N1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1">
      <style:table-cell-properties fo:border="thin solid #000000" style:vertical-align="automatic" fo:wrap-option="wrap"/>
    </style:style>
    <style:style style:name="ce17" style:family="table-cell" style:parent-style-name="Default" style:data-style-name="N2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4B084"/>
    </style:style>
    <style:style style:name="ce22" style:family="table-cell" style:parent-style-name="Default" style:data-style-name="N36">
      <style:table-cell-properties fo:border="thin solid #000000" fo:background-color="#D9D9D9"/>
    </style:style>
    <style:style style:name="ce23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36"/>
    <style:style style:name="ce27" style:family="table-cell" style:parent-style-name="Default" style:data-style-name="N1">
      <style:table-cell-properties style:vertical-align="automatic" fo:wrap-option="wrap"/>
      <style:text-properties fo:font-size="9pt" style:font-size-asian="9pt" style:font-size-complex="9pt"/>
    </style:style>
    <style:style style:name="ce28" style:family="table-cell" style:parent-style-name="Default" style:data-style-name="N1">
      <style:table-cell-properties style:vertical-align="automatic" fo:wrap-option="wrap"/>
    </style:style>
    <style:style style:name="ce29" style:family="table-cell" style:parent-style-name="Default" style:data-style-name="N2">
      <style:table-cell-properties style:vertical-align="automatic" fo:wrap-option="wrap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1.086041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0.79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48958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24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ce25"/>
        <table:table-column table:style-name="co4" table:default-cell-style-name="ce2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8"/>
        <table:table-column table:style-name="co7" table:number-columns-repeated="2" table:default-cell-style-name="ce29"/>
        <table:table-column table:style-name="co7" table:number-columns-repeated="2" table:default-cell-style-name="ce27"/>
        <table:table-column table:style-name="co11" table:number-columns-repeated="2" table:default-cell-style-name="ce30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31"/>
        <table:table-column table:style-name="co6" table:number-columns-repeated="1005" table:default-cell-style-name="ce1"/>
        <table:table-column table:style-name="co14" table:number-columns-repeated="15356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Номенклатура</text:p>
          </table:table-cell>
          <table:table-cell office:value-type="string" table:style-name="ce4">
            <text:p>заказ в шт/кг</text:p>
          </table:table-cell>
          <table:table-cell office:value-type="string" table:style-name="ce4">
            <text:p>общий вес в кг</text:p>
          </table:table-cell>
          <table:table-cell office:value-type="string" table:style-name="ce5">
            <text:p>ЗАКАЗ</text:p>
          </table:table-cell>
          <table:table-cell office:value-type="string" table:style-name="ce6">
            <text:p>ВЕС</text:p>
          </table:table-cell>
          <table:table-cell office:value-type="string" table:style-name="ce7">
            <text:p>Разность вес</text:p>
          </table:table-cell>
          <table:table-cell office:value-type="string" table:style-name="ce8">
            <text:p>Код единицы продаж</text:p>
          </table:table-cell>
          <table:table-cell office:value-type="string" table:style-name="ce8">
            <text:p>Код продукта</text:p>
          </table:table-cell>
          <table:table-cell office:value-type="string" table:style-name="ce8">
            <text:p>Номер варианта</text:p>
          </table:table-cell>
          <table:table-cell office:value-type="string" table:style-name="ce8">
            <text:p>Штрих-код<text:s/></text:p>
          </table:table-cell>
          <table:table-cell office:value-type="string" table:style-name="ce4">
            <text:p>Наименование</text:p>
          </table:table-cell>
          <table:table-cell office:value-type="string" table:style-name="ce9">
            <text:p>Вес нетто штуки, кг</text:p>
          </table:table-cell>
          <table:table-cell office:value-type="string" table:style-name="ce9">
            <text:p>Кол-во штук в коробе, шт</text:p>
          </table:table-cell>
          <table:table-cell office:value-type="string" table:style-name="ce8">
            <text:p>Коробов в слое</text:p>
          </table:table-cell>
          <table:table-cell office:value-type="string" table:style-name="ce8">
            <text:p>Кол-во кор. на паллте, шт</text:p>
          </table:table-cell>
          <table:table-cell office:value-type="string" table:style-name="ce10">
            <text:p>заказ в кор. (кратно слою)</text:p>
          </table:table-cell>
          <table:table-cell office:value-type="string" table:style-name="ce10">
            <text:p>заказ в шт. (ИТОГО)</text:p>
          </table:table-cell>
          <table:table-cell table:number-columns-repeated="2" table:style-name="ce1"/>
          <table:table-cell office:value-type="string" table:style-name="ce11">
            <text:p>ВЕС</text:p>
          </table:table-cell>
          <table:table-cell office:value-type="string" table:style-name="ce11">
            <text:p>паллет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Крылья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рустящие крылышки острые к пиву ТМ Горячая штучка ф/п ф/в 0,3 кг НД9 ПГП2 МГ</text:p>
          </table:table-cell>
          <table:table-cell office:value-type="string" table:style-name="ce2">
            <text:p>420 шт</text:p>
          </table:table-cell>
          <table:table-cell office:value-type="float" office:value="126" table:style-name="ce2">
            <text:p>126</text:p>
          </table:table-cell>
          <table:table-cell office:value-type="float" office:value="420" table:formula="of:=VALUE(LEFT([.D2];LEN([.D2])-3))" table:style-name="ce13">
            <text:p>420</text:p>
          </table:table-cell>
          <table:table-cell office:value-type="float" office:value="126" table:formula="of:=[.F2]*[.N2]" table:style-name="ce13">
            <text:p>126</text:p>
          </table:table-cell>
          <table:table-cell office:value-type="float" office:value="0" table:formula="of:=[.G2]-[.E2]" table:style-name="ce14">
            <text:p>0<text:s/></text:p>
          </table:table-cell>
          <table:table-cell office:value-type="string" table:style-name="ce15">
            <text:p>SU003607</text:p>
          </table:table-cell>
          <table:table-cell office:value-type="string" table:style-name="ce15">
            <text:p>P004589</text:p>
          </table:table-cell>
          <table:table-cell office:value-type="float" office:value="4301131046" table:style-name="ce15">
            <text:p>4301131046</text:p>
          </table:table-cell>
          <table:table-cell office:value-type="float" office:value="4607111034137" table:style-name="ce15">
            <text:p>4607111034137</text:p>
          </table:table-cell>
          <table:table-cell office:value-type="string" table:style-name="ce16">
            <text:p>Крылья «Крылышки острые к пиву» Фикс.вес 0,3 Пакет ТМ «Горячая штучка»</text:p>
          </table:table-cell>
          <table:table-cell office:value-type="float" office:value="0.3" table:style-name="ce17">
            <text:p>0,30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42" table:formula="of:=MROUND([.F2];[.O2]*[.P2])/[.O2]" table:style-name="ce18">
            <text:p>42</text:p>
          </table:table-cell>
          <table:table-cell office:value-type="float" office:value="504" table:formula="of:=[.R2]*[.O2]" table:style-name="ce18">
            <text:p>504</text:p>
          </table:table-cell>
          <table:table-cell table:number-columns-repeated="2" table:style-name="ce1"/>
          <table:table-cell office:value-type="float" office:value="151.19999999999999" table:formula="of:=[.S2]*[.N2]" table:style-name="ce19">
            <text:p>151,20</text:p>
          </table:table-cell>
          <table:table-cell office:value-type="float" office:value="0.6" table:formula="of:=[.R2]/[.Q2]" table:style-name="ce19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Крылья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рустящие крылышки ТМ Горячая штучка ф/п ф/в 0,3 кг НД6 ПГП2 МГ</text:p>
          </table:table-cell>
          <table:table-cell office:value-type="string" table:style-name="ce2">
            <text:p>390 шт</text:p>
          </table:table-cell>
          <table:table-cell office:value-type="float" office:value="117" table:style-name="ce2">
            <text:p>117</text:p>
          </table:table-cell>
          <table:table-cell office:value-type="float" office:value="390" table:formula="of:=VALUE(LEFT([.D3];LEN([.D3])-3))" table:style-name="ce13">
            <text:p>390</text:p>
          </table:table-cell>
          <table:table-cell office:value-type="float" office:value="117" table:formula="of:=[.F3]*[.N3]" table:style-name="ce13">
            <text:p>117</text:p>
          </table:table-cell>
          <table:table-cell office:value-type="float" office:value="0" table:formula="of:=[.G3]-[.E3]" table:style-name="ce14">
            <text:p>0<text:s/></text:p>
          </table:table-cell>
          <table:table-cell office:value-type="string" table:style-name="ce15">
            <text:p>SU003591</text:p>
          </table:table-cell>
          <table:table-cell office:value-type="string" table:style-name="ce15">
            <text:p>P004588</text:p>
          </table:table-cell>
          <table:table-cell office:value-type="float" office:value="4301131047" table:style-name="ce15">
            <text:p>4301131047</text:p>
          </table:table-cell>
          <table:table-cell office:value-type="float" office:value="4607111034120" table:style-name="ce15">
            <text:p>4607111034120</text:p>
          </table:table-cell>
          <table:table-cell office:value-type="string" table:style-name="ce16">
            <text:p>Крылья «Хрустящие крылышки» Фикс.вес 0,3 Пакет ТМ «Горячая штучка»</text:p>
          </table:table-cell>
          <table:table-cell office:value-type="float" office:value="0.3" table:style-name="ce17">
            <text:p>0,30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8" table:formula="of:=MROUND([.F3];[.O3]*[.P3])/[.O3]" table:style-name="ce18">
            <text:p>28</text:p>
          </table:table-cell>
          <table:table-cell office:value-type="float" office:value="336" table:formula="of:=[.R3]*[.O3]" table:style-name="ce18">
            <text:p>336</text:p>
          </table:table-cell>
          <table:table-cell table:number-columns-repeated="2" table:style-name="ce1"/>
          <table:table-cell office:value-type="float" office:value="100.8" table:formula="of:=[.S3]*[.N3]" table:style-name="ce19">
            <text:p>100,80</text:p>
          </table:table-cell>
          <table:table-cell office:value-type="float" office:value="0.4" table:formula="of:=[.R3]/[.Q3]" table:style-name="ce19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из печи ТМ Вязанка ф/п ф/в 0,25 кг тара2 ПГП2 МГ</text:p>
          </table:table-cell>
          <table:table-cell office:value-type="string" table:style-name="ce2">
            <text:p>450 шт</text:p>
          </table:table-cell>
          <table:table-cell office:value-type="float" office:value="112.5" table:style-name="ce2">
            <text:p>112,5</text:p>
          </table:table-cell>
          <table:table-cell office:value-type="float" office:value="450" table:formula="of:=VALUE(LEFT([.D4];LEN([.D4])-3))" table:style-name="ce13">
            <text:p>450</text:p>
          </table:table-cell>
          <table:table-cell office:value-type="float" office:value="112.5" table:formula="of:=[.F4]*[.N4]" table:style-name="ce13">
            <text:p>112,5</text:p>
          </table:table-cell>
          <table:table-cell office:value-type="float" office:value="0" table:formula="of:=[.G4]-[.E4]" table:style-name="ce14">
            <text:p>0<text:s/></text:p>
          </table:table-cell>
          <table:table-cell office:value-type="string" table:style-name="ce15">
            <text:p>SU003797</text:p>
          </table:table-cell>
          <table:table-cell office:value-type="string" table:style-name="ce15">
            <text:p>P004497</text:p>
          </table:table-cell>
          <table:table-cell office:value-type="float" office:value="4301132179" table:style-name="ce15">
            <text:p>4301132179</text:p>
          </table:table-cell>
          <table:table-cell office:value-type="float" office:value="4607111035691" table:style-name="ce15">
            <text:p>4607111035691</text:p>
          </table:table-cell>
          <table:table-cell office:value-type="string" table:style-name="ce16">
            <text:p>Наггетсы «из печи» Фикс.вес 0,25 ТМ «Вязан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42" table:formula="of:=MROUND([.F4];[.O4]*[.P4])/[.O4]" table:style-name="ce18">
            <text:p>42</text:p>
          </table:table-cell>
          <table:table-cell office:value-type="float" office:value="504" table:formula="of:=[.R4]*[.O4]" table:style-name="ce18">
            <text:p>504</text:p>
          </table:table-cell>
          <table:table-cell table:number-columns-repeated="2" table:style-name="ce1"/>
          <table:table-cell office:value-type="float" office:value="126" table:formula="of:=[.S4]*[.N4]" table:style-name="ce19">
            <text:p>126,00</text:p>
          </table:table-cell>
          <table:table-cell office:value-type="float" office:value="0.6" table:formula="of:=[.R4]/[.Q4]" table:style-name="ce19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Нагетосы Сочная курочка ТМ Горячая штучка ф/п ф/в 0,25 кг тара НД1 ПГП2 МГ</text:p>
          </table:table-cell>
          <table:table-cell office:value-type="string" table:style-name="ce2">
            <text:p>480 шт</text:p>
          </table:table-cell>
          <table:table-cell office:value-type="float" office:value="120" table:style-name="ce2">
            <text:p>120</text:p>
          </table:table-cell>
          <table:table-cell office:value-type="float" office:value="480" table:formula="of:=VALUE(LEFT([.D5];LEN([.D5])-3))" table:style-name="ce13">
            <text:p>480</text:p>
          </table:table-cell>
          <table:table-cell office:value-type="float" office:value="120" table:formula="of:=[.F5]*[.N5]" table:style-name="ce13">
            <text:p>120</text:p>
          </table:table-cell>
          <table:table-cell office:value-type="float" office:value="0" table:formula="of:=[.G5]-[.E5]" table:style-name="ce14">
            <text:p>0<text:s/></text:p>
          </table:table-cell>
          <table:table-cell office:value-type="string" table:style-name="ce15">
            <text:p>SU003598</text:p>
          </table:table-cell>
          <table:table-cell office:value-type="string" table:style-name="ce15">
            <text:p>P004602</text:p>
          </table:table-cell>
          <table:table-cell office:value-type="float" office:value="4301132190" table:style-name="ce15">
            <text:p>4301132190</text:p>
          </table:table-cell>
          <table:table-cell office:value-type="float" office:value="4607111036537" table:style-name="ce15">
            <text:p>4607111036537</text:p>
          </table:table-cell>
          <table:table-cell office:value-type="string" table:style-name="ce16">
            <text:p>Наггетсы «Нагетосы Сочная курочка» Фикс.вес 0,25 ТМ «Горячая штучка»</text:p>
          </table:table-cell>
          <table:table-cell office:value-type="float" office:value="0.25" table:style-name="ce17">
            <text:p>0,25</text:p>
          </table:table-cell>
          <table:table-cell office:value-type="float" office:value="6" table:style-name="ce17">
            <text:p>6,00</text:p>
          </table:table-cell>
          <table:table-cell office:value-type="float" office:value="14" table:style-name="ce15">
            <text:p>14</text:p>
          </table:table-cell>
          <table:table-cell office:value-type="float" office:value="140" table:formula="of:=VLOOKUP([.I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40</text:p>
          </table:table-cell>
          <table:table-cell office:value-type="float" office:value="84" table:formula="of:=MROUND([.F5];[.O5]*[.P5])/[.O5]" table:style-name="ce18">
            <text:p>84</text:p>
          </table:table-cell>
          <table:table-cell office:value-type="float" office:value="504" table:formula="of:=[.R5]*[.O5]" table:style-name="ce18">
            <text:p>504</text:p>
          </table:table-cell>
          <table:table-cell table:number-columns-repeated="2" table:style-name="ce1"/>
          <table:table-cell office:value-type="float" office:value="126" table:formula="of:=[.S5]*[.N5]" table:style-name="ce19">
            <text:p>126,00</text:p>
          </table:table-cell>
          <table:table-cell office:value-type="float" office:value="0.6" table:formula="of:=[.R5]/[.Q5]" table:style-name="ce19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с индейкой ТМ Вязанка ТС Из печи Сливушки ф/п ф/в 0,25 кг тара2 ПГП2 МГ</text:p>
          </table:table-cell>
          <table:table-cell office:value-type="string" table:style-name="ce2">
            <text:p>210 <text:s/>шт</text:p>
          </table:table-cell>
          <table:table-cell office:value-type="float" office:value="52.5" table:style-name="ce2">
            <text:p>52,5</text:p>
          </table:table-cell>
          <table:table-cell office:value-type="float" office:value="210" table:formula="of:=VALUE(LEFT([.D6];LEN([.D6])-3))" table:style-name="ce13">
            <text:p>210</text:p>
          </table:table-cell>
          <table:table-cell office:value-type="float" office:value="52.5" table:formula="of:=[.F6]*[.N6]" table:style-name="ce13">
            <text:p>52,5</text:p>
          </table:table-cell>
          <table:table-cell office:value-type="float" office:value="0" table:formula="of:=[.G6]-[.E6]" table:style-name="ce14">
            <text:p>0<text:s/></text:p>
          </table:table-cell>
          <table:table-cell office:value-type="string" table:style-name="ce15">
            <text:p>SU003800</text:p>
          </table:table-cell>
          <table:table-cell office:value-type="string" table:style-name="ce15">
            <text:p>P004496</text:p>
          </table:table-cell>
          <table:table-cell office:value-type="float" office:value="4301132182" table:style-name="ce15">
            <text:p>4301132182</text:p>
          </table:table-cell>
          <table:table-cell office:value-type="float" office:value="4607111035721" table:style-name="ce15">
            <text:p>4607111035721</text:p>
          </table:table-cell>
          <table:table-cell office:value-type="string" table:style-name="ce16">
            <text:p>Наггетсы «с индейкой» Фикс.вес 0,25 ТМ «Вязан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F6];[.O6]*[.P6])/[.O6]" table:style-name="ce18">
            <text:p>14</text:p>
          </table:table-cell>
          <table:table-cell office:value-type="float" office:value="168" table:formula="of:=[.R6]*[.O6]" table:style-name="ce18">
            <text:p>168</text:p>
          </table:table-cell>
          <table:table-cell table:number-columns-repeated="2" table:style-name="ce1"/>
          <table:table-cell office:value-type="float" office:value="42" table:formula="of:=[.S6]*[.N6]" table:style-name="ce19">
            <text:p>42,00</text:p>
          </table:table-cell>
          <table:table-cell office:value-type="float" office:value="0.2" table:formula="of:=[.R6]/[.Q6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с куриным филе и сыром ТМ Вязанка ТС Из печи Сливушки ф/п ф/в 0,25 кг тара2 НД1 ПГП2 МГ</text:p>
          </table:table-cell>
          <table:table-cell office:value-type="string" table:style-name="ce2">
            <text:p>330 шт</text:p>
          </table:table-cell>
          <table:table-cell office:value-type="float" office:value="82.5" table:style-name="ce2">
            <text:p>82,5</text:p>
          </table:table-cell>
          <table:table-cell office:value-type="float" office:value="330" table:formula="of:=VALUE(LEFT([.D7];LEN([.D7])-3))" table:style-name="ce13">
            <text:p>330</text:p>
          </table:table-cell>
          <table:table-cell office:value-type="float" office:value="82.5" table:formula="of:=[.F7]*[.N7]" table:style-name="ce13">
            <text:p>82,5</text:p>
          </table:table-cell>
          <table:table-cell office:value-type="float" office:value="0" table:formula="of:=[.G7]-[.E7]" table:style-name="ce14">
            <text:p>0<text:s/></text:p>
          </table:table-cell>
          <table:table-cell office:value-type="string" table:style-name="ce15">
            <text:p>SU003795</text:p>
          </table:table-cell>
          <table:table-cell office:value-type="string" table:style-name="ce15">
            <text:p>P004535</text:p>
          </table:table-cell>
          <table:table-cell office:value-type="float" office:value="4301132170" table:style-name="ce15">
            <text:p>4301132170</text:p>
          </table:table-cell>
          <table:table-cell office:value-type="float" office:value="4607111038487" table:style-name="ce15">
            <text:p>4607111038487</text:p>
          </table:table-cell>
          <table:table-cell office:value-type="string" table:style-name="ce16">
            <text:p>Наггетсы «с куриным филе и сыром» Фикс.вес 0,25 ТМ «Вязан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8" table:formula="of:=MROUND([.F7];[.O7]*[.P7])/[.O7]" table:style-name="ce18">
            <text:p>28</text:p>
          </table:table-cell>
          <table:table-cell office:value-type="float" office:value="336" table:formula="of:=[.R7]*[.O7]" table:style-name="ce18">
            <text:p>336</text:p>
          </table:table-cell>
          <table:table-cell table:number-columns-repeated="2" table:style-name="ce1"/>
          <table:table-cell office:value-type="float" office:value="84" table:formula="of:=[.S7]*[.N7]" table:style-name="ce19">
            <text:p>84,00</text:p>
          </table:table-cell>
          <table:table-cell office:value-type="float" office:value="0.4" table:formula="of:=[.R7]/[.Q7]" table:style-name="ce19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Хрустящие ТМ Зареченские ТС Зареченские продукты вес 6 кг МГ</text:p>
          </table:table-cell>
          <table:table-cell office:value-type="string" table:style-name="ce2">
            <text:p>162 кг</text:p>
          </table:table-cell>
          <table:table-cell office:value-type="float" office:value="162" table:style-name="ce2">
            <text:p>162</text:p>
          </table:table-cell>
          <table:table-cell office:value-type="float" office:value="162" table:formula="of:=VALUE(LEFT([.D8];LEN([.D8])-3))" table:style-name="ce13">
            <text:p>162</text:p>
          </table:table-cell>
          <table:table-cell office:value-type="float" office:value="162" table:formula="of:=[.F8]*[.N8]" table:style-name="ce13">
            <text:p>162</text:p>
          </table:table-cell>
          <table:table-cell office:value-type="float" office:value="0" table:formula="of:=[.G8]-[.E8]" table:style-name="ce14">
            <text:p>0<text:s/></text:p>
          </table:table-cell>
          <table:table-cell office:value-type="string" table:style-name="ce15">
            <text:p>SU003020</text:p>
          </table:table-cell>
          <table:table-cell office:value-type="string" table:style-name="ce15">
            <text:p>P003486</text:p>
          </table:table-cell>
          <table:table-cell office:value-type="float" office:value="4301132080" table:style-name="ce15">
            <text:p>4301132080</text:p>
          </table:table-cell>
          <table:table-cell office:value-type="float" office:value="4640242180397" table:style-name="ce15">
            <text:p>4640242180397</text:p>
          </table:table-cell>
          <table:table-cell office:value-type="string" table:style-name="ce16">
            <text:p>Наггетсы «Хрустящие» Весовые ТМ «Зареченские» 6 кг</text:p>
          </table:table-cell>
          <table:table-cell office:value-type="float" office:value="1" table:style-name="ce17">
            <text:p>1,00</text:p>
          </table:table-cell>
          <table:table-cell office:value-type="float" office:value="6" table:style-name="ce17">
            <text:p>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24" table:formula="of:=MROUND([.F8];[.O8]*[.P8])/[.O8]" table:style-name="ce18">
            <text:p>24</text:p>
          </table:table-cell>
          <table:table-cell office:value-type="float" office:value="144" table:formula="of:=[.R8]*[.O8]" table:style-name="ce18">
            <text:p>144</text:p>
          </table:table-cell>
          <table:table-cell table:number-columns-repeated="2" table:style-name="ce1"/>
          <table:table-cell office:value-type="float" office:value="144" table:formula="of:=[.S8]*[.N8]" table:style-name="ce19">
            <text:p>144,00</text:p>
          </table:table-cell>
          <table:table-cell office:value-type="float" office:value="0.2857142857142857" table:formula="of:=[.R8]/[.Q8]" table:style-name="ce19">
            <text:p>0,29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Хрустящие ТМ Стародворье с сочной курочкой ф/в 0,23 кг Х5 МГ</text:p>
          </table:table-cell>
          <table:table-cell office:value-type="string" table:style-name="ce2">
            <text:p>195 <text:s/>шт</text:p>
          </table:table-cell>
          <table:table-cell office:value-type="float" office:value="44.85" table:style-name="ce2">
            <text:p>44,85</text:p>
          </table:table-cell>
          <table:table-cell office:value-type="float" office:value="195" table:formula="of:=VALUE(LEFT([.D9];LEN([.D9])-3))" table:style-name="ce13">
            <text:p>195</text:p>
          </table:table-cell>
          <table:table-cell office:value-type="float" office:value="44.85" table:formula="of:=[.F9]*[.N9]" table:style-name="ce13">
            <text:p>44,85</text:p>
          </table:table-cell>
          <table:table-cell office:value-type="float" office:value="0" table:formula="of:=[.G9]-[.E9]" table:style-name="ce14">
            <text:p>0<text:s/></text:p>
          </table:table-cell>
          <table:table-cell office:value-type="string" table:style-name="ce15">
            <text:p>SU003930</text:p>
          </table:table-cell>
          <table:table-cell office:value-type="string" table:style-name="ce15">
            <text:p>P005043</text:p>
          </table:table-cell>
          <table:table-cell office:value-type="float" office:value="4301132227" table:style-name="ce15">
            <text:p>4301132227</text:p>
          </table:table-cell>
          <table:table-cell office:value-type="float" office:value="4620207491133" table:style-name="ce15">
            <text:p>4620207491133</text:p>
          </table:table-cell>
          <table:table-cell office:value-type="string" table:style-name="ce16">
            <text:p>Наггетсы «Хрустящие с сочной курочкой» Фикс.вес 0,23 ТМ «Стародворье»</text:p>
          </table:table-cell>
          <table:table-cell office:value-type="float" office:value="0.23" table:style-name="ce17">
            <text:p>0,23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F9];[.O9]*[.P9])/[.O9]" table:style-name="ce18">
            <text:p>14</text:p>
          </table:table-cell>
          <table:table-cell office:value-type="float" office:value="168" table:formula="of:=[.R9]*[.O9]" table:style-name="ce18">
            <text:p>168</text:p>
          </table:table-cell>
          <table:table-cell table:number-columns-repeated="2" table:style-name="ce1"/>
          <table:table-cell office:value-type="float" office:value="38.64" table:formula="of:=[.S9]*[.N9]" table:style-name="ce19">
            <text:p>38,64</text:p>
          </table:table-cell>
          <table:table-cell office:value-type="float" office:value="0.2" table:formula="of:=[.R9]/[.Q9]" table:style-name="ce19">
            <text:p>0,2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#МЕГАВКУСИЩЕ с сочной грудинкой ТМ Горячая штучка ТС Бигбули ГШ сфера ф/п ф/в 0,7 кг МГ</text:p>
          </table:table-cell>
          <table:table-cell office:value-type="string" table:style-name="ce2">
            <text:p>30 шт</text:p>
          </table:table-cell>
          <table:table-cell office:value-type="float" office:value="21" table:style-name="ce2">
            <text:p>21</text:p>
          </table:table-cell>
          <table:table-cell office:value-type="float" office:value="30" table:formula="of:=VALUE(LEFT([.D10];LEN([.D10])-3))" table:style-name="ce13">
            <text:p>30</text:p>
          </table:table-cell>
          <table:table-cell office:value-type="float" office:value="21" table:formula="of:=[.F10]*[.N10]" table:style-name="ce13">
            <text:p>21</text:p>
          </table:table-cell>
          <table:table-cell office:value-type="float" office:value="0" table:formula="of:=[.G10]-[.E10]" table:style-name="ce14">
            <text:p>0<text:s/></text:p>
          </table:table-cell>
          <table:table-cell office:value-type="string" table:style-name="ce15">
            <text:p>SU003532</text:p>
          </table:table-cell>
          <table:table-cell office:value-type="string" table:style-name="ce15">
            <text:p>P004440</text:p>
          </table:table-cell>
          <table:table-cell office:value-type="float" office:value="4301071044" table:style-name="ce15">
            <text:p>4301071044</text:p>
          </table:table-cell>
          <table:table-cell office:value-type="float" office:value="4607111039385" table:style-name="ce15">
            <text:p>4607111039385</text:p>
          </table:table-cell>
          <table:table-cell office:value-type="string" table:style-name="ce16">
            <text:p>Пельмени «Бигбули #МЕГАВКУСИЩЕ с сочной грудинкой» 0,7 сфера ТМ «Горячая штучка»</text:p>
          </table:table-cell>
          <table:table-cell office:value-type="float" office:value="0.7" table:style-name="ce17">
            <text:p>0,70</text:p>
          </table:table-cell>
          <table:table-cell office:value-type="float" office:value="10" table:style-name="ce17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0" table:formula="of:=MROUND([.F10];[.O10]*[.P10])/[.O10]" table:style-name="ce20">
            <text:p>0</text:p>
          </table:table-cell>
          <table:table-cell office:value-type="float" office:value="0" table:formula="of:=[.R10]*[.O10]" table:style-name="ce20">
            <text:p>0</text:p>
          </table:table-cell>
          <table:table-cell office:value-type="float" office:value="120" table:formula="of:=[.O10]*[.P10]" table:style-name="ce1">
            <text:p>120</text:p>
          </table:table-cell>
          <table:table-cell office:value-type="string" table:style-name="ce1">
            <text:p>кратность</text:p>
          </table:table-cell>
          <table:table-cell office:value-type="float" office:value="0" table:formula="of:=[.S10]*[.N10]" table:style-name="ce19">
            <text:p>0,00</text:p>
          </table:table-cell>
          <table:table-cell office:value-type="float" office:value="0" table:formula="of:=[.R10]/[.Q10]" table:style-name="ce19">
            <text:p>0,0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с мясом ТМ Горячая штучка БУЛЬМЕНИ ТС Бигбули ГШ #МЕГАМЯСИЩЕ ф/п сфера ф/в 0,4 кг МГ</text:p>
          </table:table-cell>
          <table:table-cell office:value-type="string" table:style-name="ce2">
            <text:p>90 шт</text:p>
          </table:table-cell>
          <table:table-cell office:value-type="float" office:value="36" table:style-name="ce2">
            <text:p>36</text:p>
          </table:table-cell>
          <table:table-cell office:value-type="float" office:value="90" table:formula="of:=VALUE(LEFT([.D11];LEN([.D11])-3))" table:style-name="ce13">
            <text:p>90</text:p>
          </table:table-cell>
          <table:table-cell office:value-type="float" office:value="36" table:formula="of:=[.F11]*[.N11]" table:style-name="ce13">
            <text:p>36</text:p>
          </table:table-cell>
          <table:table-cell office:value-type="float" office:value="0" table:formula="of:=[.G11]-[.E11]" table:style-name="ce14">
            <text:p>0<text:s/></text:p>
          </table:table-cell>
          <table:table-cell office:value-type="string" table:style-name="ce15">
            <text:p>SU003530</text:p>
          </table:table-cell>
          <table:table-cell office:value-type="string" table:style-name="ce15">
            <text:p>P004443</text:p>
          </table:table-cell>
          <table:table-cell office:value-type="float" office:value="4301071046" table:style-name="ce15">
            <text:p>4301071046</text:p>
          </table:table-cell>
          <table:table-cell office:value-type="float" office:value="4607111039354" table:style-name="ce15">
            <text:p>4607111039354</text:p>
          </table:table-cell>
          <table:table-cell office:value-type="string" table:style-name="ce16">
            <text:p>Пельмени «Бигбули с мясом» 0,4 Сфера ТМ «Горячая штучка»</text:p>
          </table:table-cell>
          <table:table-cell office:value-type="float" office:value="0.4" table:style-name="ce17">
            <text:p>0,40</text:p>
          </table:table-cell>
          <table:table-cell office:value-type="float" office:value="16" table:style-name="ce17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0" table:formula="of:=MROUND([.F11];[.O11]*[.P11])/[.O11]" table:style-name="ce20">
            <text:p>0</text:p>
          </table:table-cell>
          <table:table-cell office:value-type="float" office:value="0" table:formula="of:=[.R11]*[.O11]" table:style-name="ce20">
            <text:p>0</text:p>
          </table:table-cell>
          <table:table-cell office:value-type="float" office:value="192" table:formula="of:=[.O11]*[.P11]" table:style-name="ce1">
            <text:p>192</text:p>
          </table:table-cell>
          <table:table-cell office:value-type="string" table:style-name="ce1">
            <text:p>кратность</text:p>
          </table:table-cell>
          <table:table-cell office:value-type="float" office:value="0" table:formula="of:=[.S11]*[.N11]" table:style-name="ce19">
            <text:p>0,00</text:p>
          </table:table-cell>
          <table:table-cell office:value-type="float" office:value="0" table:formula="of:=[.R11]/[.Q11]" table:style-name="ce19">
            <text:p>0,0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с мясом ТМ Горячая штучка БУЛЬМЕНИ ТС Бигбули ГШ #МЕГАМЯСИЩЕ ф/п сфера ф/в 0,7 кг МГ</text:p>
          </table:table-cell>
          <table:table-cell office:value-type="string" table:style-name="ce2">
            <text:p>180 шт</text:p>
          </table:table-cell>
          <table:table-cell office:value-type="float" office:value="126" table:style-name="ce2">
            <text:p>126</text:p>
          </table:table-cell>
          <table:table-cell office:value-type="float" office:value="180" table:formula="of:=VALUE(LEFT([.D12];LEN([.D12])-3))" table:style-name="ce13">
            <text:p>180</text:p>
          </table:table-cell>
          <table:table-cell office:value-type="float" office:value="125.99999999999999" table:formula="of:=[.F12]*[.N12]" table:style-name="ce13">
            <text:p>126</text:p>
          </table:table-cell>
          <table:table-cell office:value-type="float" office:value="0" table:formula="of:=[.G12]-[.E12]" table:style-name="ce14">
            <text:p>0<text:s/></text:p>
          </table:table-cell>
          <table:table-cell office:value-type="string" table:style-name="ce15">
            <text:p>SU003529</text:p>
          </table:table-cell>
          <table:table-cell office:value-type="string" table:style-name="ce15">
            <text:p>P004442</text:p>
          </table:table-cell>
          <table:table-cell office:value-type="float" office:value="4301071047" table:style-name="ce15">
            <text:p>4301071047</text:p>
          </table:table-cell>
          <table:table-cell office:value-type="float" office:value="4607111039330" table:style-name="ce15">
            <text:p>4607111039330</text:p>
          </table:table-cell>
          <table:table-cell office:value-type="string" table:style-name="ce16">
            <text:p>Пельмени «Бигбули с мясом» 0,7 Сфера ТМ «Горячая штучка»</text:p>
          </table:table-cell>
          <table:table-cell office:value-type="float" office:value="0.7" table:style-name="ce17">
            <text:p>0,70</text:p>
          </table:table-cell>
          <table:table-cell office:value-type="float" office:value="10" table:style-name="ce17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24" table:formula="of:=MROUND([.F12];[.O12]*[.P12])/[.O12]" table:style-name="ce18">
            <text:p>24</text:p>
          </table:table-cell>
          <table:table-cell office:value-type="float" office:value="240" table:formula="of:=[.R12]*[.O12]" table:style-name="ce18">
            <text:p>240</text:p>
          </table:table-cell>
          <table:table-cell table:number-columns-repeated="2" table:style-name="ce1"/>
          <table:table-cell office:value-type="float" office:value="168" table:formula="of:=[.S12]*[.N12]" table:style-name="ce19">
            <text:p>168,00</text:p>
          </table:table-cell>
          <table:table-cell office:value-type="float" office:value="0.2857142857142857" table:formula="of:=[.R12]/[.Q12]" table:style-name="ce19">
            <text:p>0,29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со сливочным маслом ТМ Горячая штучка БУЛЬМЕНИ ТС Бигбули ГШ #МЕГАМАСЛИЩЕ ф/п сфера ф/в 0,7 кг МГ</text:p>
          </table:table-cell>
          <table:table-cell office:value-type="string" table:style-name="ce2">
            <text:p>60 шт</text:p>
          </table:table-cell>
          <table:table-cell office:value-type="float" office:value="42" table:style-name="ce2">
            <text:p>42</text:p>
          </table:table-cell>
          <table:table-cell office:value-type="float" office:value="60" table:formula="of:=VALUE(LEFT([.D13];LEN([.D13])-3))" table:style-name="ce13">
            <text:p>60</text:p>
          </table:table-cell>
          <table:table-cell office:value-type="float" office:value="42" table:formula="of:=[.F13]*[.N13]" table:style-name="ce13">
            <text:p>42</text:p>
          </table:table-cell>
          <table:table-cell office:value-type="float" office:value="0" table:formula="of:=[.G13]-[.E13]" table:style-name="ce14">
            <text:p>0<text:s/></text:p>
          </table:table-cell>
          <table:table-cell office:value-type="string" table:style-name="ce15">
            <text:p>SU003385</text:p>
          </table:table-cell>
          <table:table-cell office:value-type="string" table:style-name="ce15">
            <text:p>P004203</text:p>
          </table:table-cell>
          <table:table-cell office:value-type="float" office:value="4301071031" table:style-name="ce15">
            <text:p>4301071031</text:p>
          </table:table-cell>
          <table:table-cell office:value-type="float" office:value="4607111038982" table:style-name="ce15">
            <text:p>4607111038982</text:p>
          </table:table-cell>
          <table:table-cell office:value-type="string" table:style-name="ce16">
            <text:p>Пельмени «Бигбули #МЕГАМАСЛИЩЕ со сливочным маслом» 0,7 сфера ТМ «Горячая штучка»</text:p>
          </table:table-cell>
          <table:table-cell office:value-type="float" office:value="0.7" table:style-name="ce17">
            <text:p>0,70</text:p>
          </table:table-cell>
          <table:table-cell office:value-type="float" office:value="10" table:style-name="ce17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F13];[.O13]*[.P13])/[.O13]" table:style-name="ce18">
            <text:p>12</text:p>
          </table:table-cell>
          <table:table-cell office:value-type="float" office:value="120" table:formula="of:=[.R13]*[.O13]" table:style-name="ce18">
            <text:p>120</text:p>
          </table:table-cell>
          <table:table-cell table:number-columns-repeated="2" table:style-name="ce1"/>
          <table:table-cell office:value-type="float" office:value="84" table:formula="of:=[.S13]*[.N13]" table:style-name="ce19">
            <text:p>84,00</text:p>
          </table:table-cell>
          <table:table-cell office:value-type="float" office:value="0.14285714285714285" table:formula="of:=[.R13]/[.Q13]" table:style-name="ce19">
            <text:p>0,14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мини с мясом и оливковым маслом ТМ Горячая штучка ТС Бульмени ГШ ф/п сфера ф/в 0,7 кг МГ</text:p>
          </table:table-cell>
          <table:table-cell office:value-type="string" table:style-name="ce2">
            <text:p>330 шт</text:p>
          </table:table-cell>
          <table:table-cell office:value-type="float" office:value="231" table:style-name="ce2">
            <text:p>231</text:p>
          </table:table-cell>
          <table:table-cell office:value-type="float" office:value="330" table:formula="of:=VALUE(LEFT([.D14];LEN([.D14])-3))" table:style-name="ce13">
            <text:p>330</text:p>
          </table:table-cell>
          <table:table-cell office:value-type="float" office:value="230.99999999999997" table:formula="of:=[.F14]*[.N14]" table:style-name="ce13">
            <text:p>231</text:p>
          </table:table-cell>
          <table:table-cell office:value-type="float" office:value="0" table:formula="of:=[.G14]-[.E14]" table:style-name="ce14">
            <text:p>0<text:s/></text:p>
          </table:table-cell>
          <table:table-cell office:value-type="string" table:style-name="ce15">
            <text:p>SU003717</text:p>
          </table:table-cell>
          <table:table-cell office:value-type="string" table:style-name="ce15">
            <text:p>P004819</text:p>
          </table:table-cell>
          <table:table-cell office:value-type="float" office:value="4301071074" table:style-name="ce15">
            <text:p>4301071074</text:p>
          </table:table-cell>
          <table:table-cell office:value-type="float" office:value="4620207491157" table:style-name="ce15">
            <text:p>4620207491157</text:p>
          </table:table-cell>
          <table:table-cell office:value-type="string" table:style-name="ce16">
            <text:p>Пельмени «Бульмени мини с мясом и оливковым маслом» Фикс.вес 0,7 сфера ТМ «Горячая штучка»</text:p>
          </table:table-cell>
          <table:table-cell office:value-type="float" office:value="0.7" table:style-name="ce17">
            <text:p>0,70</text:p>
          </table:table-cell>
          <table:table-cell office:value-type="float" office:value="10" table:style-name="ce17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F14];[.O14]*[.P14])/[.O14]" table:style-name="ce18">
            <text:p>36</text:p>
          </table:table-cell>
          <table:table-cell office:value-type="float" office:value="360" table:formula="of:=[.R14]*[.O14]" table:style-name="ce18">
            <text:p>360</text:p>
          </table:table-cell>
          <table:table-cell table:number-columns-repeated="2" table:style-name="ce1"/>
          <table:table-cell office:value-type="float" office:value="251.99999999999997" table:formula="of:=[.S14]*[.N14]" table:style-name="ce19">
            <text:p>252,00</text:p>
          </table:table-cell>
          <table:table-cell office:value-type="float" office:value="0.42857142857142855" table:formula="of:=[.R14]/[.Q14]" table:style-name="ce19">
            <text:p>0,43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Наваристые ТМ Горячая штучка ТС Бульмени ГШ сфера Вес 2,7 кг УМК УВС МГ</text:p>
          </table:table-cell>
          <table:table-cell office:value-type="string" table:style-name="ce2">
            <text:p>100 кг</text:p>
          </table:table-cell>
          <table:table-cell office:value-type="float" office:value="100" table:style-name="ce2">
            <text:p>100</text:p>
          </table:table-cell>
          <table:table-cell office:value-type="float" office:value="100" table:formula="of:=VALUE(LEFT([.D15];LEN([.D15])-3))" table:style-name="ce13">
            <text:p>100</text:p>
          </table:table-cell>
          <table:table-cell office:value-type="float" office:value="100" table:formula="of:=[.F15]*[.N15]" table:style-name="ce13">
            <text:p>100</text:p>
          </table:table-cell>
          <table:table-cell office:value-type="float" office:value="0" table:formula="of:=[.G15]-[.E15]" table:style-name="ce14">
            <text:p>0<text:s/></text:p>
          </table:table-cell>
          <table:table-cell office:value-type="string" table:style-name="ce15">
            <text:p>SU002798</text:p>
          </table:table-cell>
          <table:table-cell office:value-type="string" table:style-name="ce15">
            <text:p>P003687</text:p>
          </table:table-cell>
          <table:table-cell office:value-type="float" office:value="4301070977" table:style-name="ce15">
            <text:p>4301070977</text:p>
          </table:table-cell>
          <table:table-cell office:value-type="float" office:value="4607111037411" table:style-name="ce15">
            <text:p>4607111037411</text:p>
          </table:table-cell>
          <table:table-cell office:value-type="string" table:style-name="ce16">
            <text:p>Пельмени «Бульмени с говядиной и свининой Наваристые» Весовые Сфера ТМ «Горячая штучка» 2,7 кг</text:p>
          </table:table-cell>
          <table:table-cell office:value-type="float" office:value="1" table:style-name="ce17">
            <text:p>1,00</text:p>
          </table:table-cell>
          <table:table-cell office:value-type="float" office:value="2.7" table:style-name="ce17">
            <text:p>2,70</text:p>
          </table:table-cell>
          <table:table-cell office:value-type="float" office:value="18" table:style-name="ce15">
            <text:p>18</text:p>
          </table:table-cell>
          <table:table-cell office:value-type="float" office:value="234" table:formula="of:=VLOOKUP([.I1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234</text:p>
          </table:table-cell>
          <table:table-cell office:value-type="float" office:value="36" table:formula="of:=MROUND([.F15];[.O15]*[.P15])/[.O15]" table:style-name="ce18">
            <text:p>36</text:p>
          </table:table-cell>
          <table:table-cell office:value-type="float" office:value="97.2" table:formula="of:=[.R15]*[.O15]" table:style-name="ce18">
            <text:p>97,2</text:p>
          </table:table-cell>
          <table:table-cell table:number-columns-repeated="2" table:style-name="ce1"/>
          <table:table-cell office:value-type="float" office:value="97.2" table:formula="of:=[.S15]*[.N15]" table:style-name="ce19">
            <text:p>97,20</text:p>
          </table:table-cell>
          <table:table-cell office:value-type="float" office:value="0.15384615384615385" table:formula="of:=[.R15]/[.Q15]" table:style-name="ce19">
            <text:p>0,15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Наваристые ТМ Горячая штучка ТС Бульмени ГШ сфера Вес 5 кг УВС МГ</text:p>
          </table:table-cell>
          <table:table-cell office:value-type="string" table:style-name="ce2">
            <text:p>300 кг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of:=VALUE(LEFT([.D16];LEN([.D16])-3))" table:style-name="ce13">
            <text:p>300</text:p>
          </table:table-cell>
          <table:table-cell office:value-type="float" office:value="300" table:formula="of:=[.F16]*[.N16]" table:style-name="ce13">
            <text:p>300</text:p>
          </table:table-cell>
          <table:table-cell office:value-type="float" office:value="0" table:formula="of:=[.G16]-[.E16]" table:style-name="ce14">
            <text:p>0<text:s/></text:p>
          </table:table-cell>
          <table:table-cell office:value-type="string" table:style-name="ce15">
            <text:p>SU002595</text:p>
          </table:table-cell>
          <table:table-cell office:value-type="string" table:style-name="ce15">
            <text:p>P003697</text:p>
          </table:table-cell>
          <table:table-cell office:value-type="float" office:value="4301070981" table:style-name="ce15">
            <text:p>4301070981</text:p>
          </table:table-cell>
          <table:table-cell office:value-type="float" office:value="4607111036728" table:style-name="ce15">
            <text:p>4607111036728</text:p>
          </table:table-cell>
          <table:table-cell office:value-type="string" table:style-name="ce16">
            <text:p>Пельмени «Бульмени с говядиной и свининой Наваристые» Весовые Сфера ТМ «Горячая штучка» 5 кг</text:p>
          </table:table-cell>
          <table:table-cell office:value-type="float" office:value="1" table:style-name="ce17">
            <text:p>1,00</text:p>
          </table:table-cell>
          <table:table-cell office:value-type="float" office:value="5" table:style-name="ce17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144" table:formula="of:=VLOOKUP([.I1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44</text:p>
          </table:table-cell>
          <table:table-cell office:value-type="float" office:value="60" table:formula="of:=MROUND([.F16];[.O16]*[.P16])/[.O16]" table:style-name="ce18">
            <text:p>60</text:p>
          </table:table-cell>
          <table:table-cell office:value-type="float" office:value="300" table:formula="of:=[.R16]*[.O16]" table:style-name="ce18">
            <text:p>300</text:p>
          </table:table-cell>
          <table:table-cell table:number-columns-repeated="2" table:style-name="ce1"/>
          <table:table-cell office:value-type="float" office:value="300" table:formula="of:=[.S16]*[.N16]" table:style-name="ce19">
            <text:p>300,00</text:p>
          </table:table-cell>
          <table:table-cell office:value-type="float" office:value="0.41666666666666669" table:formula="of:=[.R16]/[.Q16]" table:style-name="ce19">
            <text:p>0,4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ТМ Горячая штучка ТС Бульмени ГШ ф/п сфера ф/в 0,4 кг тара2 МГ</text:p>
          </table:table-cell>
          <table:table-cell office:value-type="string" table:style-name="ce2">
            <text:p>750 шт</text:p>
          </table:table-cell>
          <table:table-cell office:value-type="float" office:value="300" table:style-name="ce2">
            <text:p>300</text:p>
          </table:table-cell>
          <table:table-cell office:value-type="float" office:value="750" table:formula="of:=VALUE(LEFT([.D17];LEN([.D17])-3))" table:style-name="ce13">
            <text:p>750</text:p>
          </table:table-cell>
          <table:table-cell office:value-type="float" office:value="300" table:formula="of:=[.F17]*[.N17]" table:style-name="ce13">
            <text:p>300</text:p>
          </table:table-cell>
          <table:table-cell office:value-type="float" office:value="0" table:formula="of:=[.G17]-[.E17]" table:style-name="ce14">
            <text:p>0<text:s/></text:p>
          </table:table-cell>
          <table:table-cell office:value-type="string" table:style-name="ce15">
            <text:p>SU003527</text:p>
          </table:table-cell>
          <table:table-cell office:value-type="string" table:style-name="ce15">
            <text:p>P004474</text:p>
          </table:table-cell>
          <table:table-cell office:value-type="float" office:value="4301071051" table:style-name="ce15">
            <text:p>4301071051</text:p>
          </table:table-cell>
          <table:table-cell office:value-type="float" office:value="4607111039262" table:style-name="ce15">
            <text:p>4607111039262</text:p>
          </table:table-cell>
          <table:table-cell office:value-type="string" table:style-name="ce16">
            <text:p>Пельмени «Бульмени с говядиной и свининой» 0,4 Сфера ТМ «Горячая штучка»</text:p>
          </table:table-cell>
          <table:table-cell office:value-type="float" office:value="0.4" table:style-name="ce17">
            <text:p>0,40</text:p>
          </table:table-cell>
          <table:table-cell office:value-type="float" office:value="16" table:style-name="ce17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48" table:formula="of:=MROUND([.F17];[.O17]*[.P17])/[.O17]" table:style-name="ce18">
            <text:p>48</text:p>
          </table:table-cell>
          <table:table-cell office:value-type="float" office:value="768" table:formula="of:=[.R17]*[.O17]" table:style-name="ce18">
            <text:p>768</text:p>
          </table:table-cell>
          <table:table-cell table:number-columns-repeated="2" table:style-name="ce1"/>
          <table:table-cell office:value-type="float" office:value="307.20000000000005" table:formula="of:=[.S17]*[.N17]" table:style-name="ce19">
            <text:p>307,20</text:p>
          </table:table-cell>
          <table:table-cell office:value-type="float" office:value="0.5714285714285714" table:formula="of:=[.R17]/[.Q17]" table:style-name="ce19">
            <text:p>0,57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ТМ Горячая штучка ТС Бульмени ГШ ф/п сфера ф/в 0,7 кг МГ</text:p>
          </table:table-cell>
          <table:table-cell office:value-type="string" table:style-name="ce2">
            <text:p>710 шт</text:p>
          </table:table-cell>
          <table:table-cell office:value-type="float" office:value="497" table:style-name="ce2">
            <text:p>497</text:p>
          </table:table-cell>
          <table:table-cell office:value-type="float" office:value="710" table:formula="of:=VALUE(LEFT([.D18];LEN([.D18])-3))" table:style-name="ce13">
            <text:p>710</text:p>
          </table:table-cell>
          <table:table-cell office:value-type="float" office:value="496.99999999999994" table:formula="of:=[.F18]*[.N18]" table:style-name="ce13">
            <text:p>497</text:p>
          </table:table-cell>
          <table:table-cell office:value-type="float" office:value="0" table:formula="of:=[.G18]-[.E18]" table:style-name="ce14">
            <text:p>0<text:s/></text:p>
          </table:table-cell>
          <table:table-cell office:value-type="string" table:style-name="ce15">
            <text:p>SU003460</text:p>
          </table:table-cell>
          <table:table-cell office:value-type="string" table:style-name="ce15">
            <text:p>P004345</text:p>
          </table:table-cell>
          <table:table-cell office:value-type="float" office:value="4301071038" table:style-name="ce15">
            <text:p>4301071038</text:p>
          </table:table-cell>
          <table:table-cell office:value-type="float" office:value="4607111039248" table:style-name="ce15">
            <text:p>4607111039248</text:p>
          </table:table-cell>
          <table:table-cell office:value-type="string" table:style-name="ce16">
            <text:p>Пельмени «Бульмени с говядиной и свининой» 0,7 Сфера ТМ «Горячая штучка»</text:p>
          </table:table-cell>
          <table:table-cell office:value-type="float" office:value="0.7" table:style-name="ce17">
            <text:p>0,70</text:p>
          </table:table-cell>
          <table:table-cell office:value-type="float" office:value="10" table:style-name="ce17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72" table:formula="of:=MROUND([.F18];[.O18]*[.P18])/[.O18]" table:style-name="ce18">
            <text:p>72</text:p>
          </table:table-cell>
          <table:table-cell office:value-type="float" office:value="720" table:formula="of:=[.R18]*[.O18]" table:style-name="ce18">
            <text:p>720</text:p>
          </table:table-cell>
          <table:table-cell table:number-columns-repeated="2" table:style-name="ce1"/>
          <table:table-cell office:value-type="float" office:value="503.99999999999994" table:formula="of:=[.S18]*[.N18]" table:style-name="ce19">
            <text:p>504,00</text:p>
          </table:table-cell>
          <table:table-cell office:value-type="float" office:value="0.8571428571428571" table:formula="of:=[.R18]/[.Q18]" table:style-name="ce19">
            <text:p>0,86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о сливочным маслом ТМ Горячая штучка ТС Бульмени ГШ ф/п сфера ф/в 0,4 кг МГ</text:p>
          </table:table-cell>
          <table:table-cell office:value-type="string" table:style-name="ce2">
            <text:p>620 шт</text:p>
          </table:table-cell>
          <table:table-cell office:value-type="float" office:value="248" table:style-name="ce2">
            <text:p>248</text:p>
          </table:table-cell>
          <table:table-cell office:value-type="float" office:value="620" table:formula="of:=VALUE(LEFT([.D19];LEN([.D19])-3))" table:style-name="ce13">
            <text:p>620</text:p>
          </table:table-cell>
          <table:table-cell office:value-type="float" office:value="248" table:formula="of:=[.F19]*[.N19]" table:style-name="ce13">
            <text:p>248</text:p>
          </table:table-cell>
          <table:table-cell office:value-type="float" office:value="0" table:formula="of:=[.G19]-[.E19]" table:style-name="ce14">
            <text:p>0<text:s/></text:p>
          </table:table-cell>
          <table:table-cell office:value-type="string" table:style-name="ce15">
            <text:p>SU003528</text:p>
          </table:table-cell>
          <table:table-cell office:value-type="string" table:style-name="ce15">
            <text:p>P004444</text:p>
          </table:table-cell>
          <table:table-cell office:value-type="float" office:value="4301071049" table:style-name="ce15">
            <text:p>4301071049</text:p>
          </table:table-cell>
          <table:table-cell office:value-type="float" office:value="4607111039293" table:style-name="ce15">
            <text:p>4607111039293</text:p>
          </table:table-cell>
          <table:table-cell office:value-type="string" table:style-name="ce16">
            <text:p>Пельмени «Бульмени со сливочным маслом» Фикс.вес 0,4 ТМ «Горячая штучка»</text:p>
          </table:table-cell>
          <table:table-cell office:value-type="float" office:value="0.4" table:style-name="ce17">
            <text:p>0,40</text:p>
          </table:table-cell>
          <table:table-cell office:value-type="float" office:value="16" table:style-name="ce17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F19];[.O19]*[.P19])/[.O19]" table:style-name="ce18">
            <text:p>36</text:p>
          </table:table-cell>
          <table:table-cell office:value-type="float" office:value="576" table:formula="of:=[.R19]*[.O19]" table:style-name="ce18">
            <text:p>576</text:p>
          </table:table-cell>
          <table:table-cell table:number-columns-repeated="2" table:style-name="ce1"/>
          <table:table-cell office:value-type="float" office:value="230.4" table:formula="of:=[.S19]*[.N19]" table:style-name="ce19">
            <text:p>230,40</text:p>
          </table:table-cell>
          <table:table-cell office:value-type="float" office:value="0.42857142857142855" table:formula="of:=[.R19]/[.Q19]" table:style-name="ce19">
            <text:p>0,43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о сливочным маслом ТМ Горячая штучка ТС Бульмени ГШ ф/п сфера ф/в 0,7 кг МГ</text:p>
          </table:table-cell>
          <table:table-cell office:value-type="string" table:style-name="ce2">
            <text:p>700 шт</text:p>
          </table:table-cell>
          <table:table-cell office:value-type="float" office:value="490" table:style-name="ce2">
            <text:p>490</text:p>
          </table:table-cell>
          <table:table-cell office:value-type="float" office:value="700" table:formula="of:=VALUE(LEFT([.D20];LEN([.D20])-3))" table:style-name="ce13">
            <text:p>700</text:p>
          </table:table-cell>
          <table:table-cell office:value-type="float" office:value="489.99999999999994" table:formula="of:=[.F20]*[.N20]" table:style-name="ce13">
            <text:p>490</text:p>
          </table:table-cell>
          <table:table-cell office:value-type="float" office:value="0" table:formula="of:=[.G20]-[.E20]" table:style-name="ce14">
            <text:p>0<text:s/></text:p>
          </table:table-cell>
          <table:table-cell office:value-type="string" table:style-name="ce15">
            <text:p>SU003459</text:p>
          </table:table-cell>
          <table:table-cell office:value-type="string" table:style-name="ce15">
            <text:p>P004346</text:p>
          </table:table-cell>
          <table:table-cell office:value-type="float" office:value="4301071039" table:style-name="ce15">
            <text:p>4301071039</text:p>
          </table:table-cell>
          <table:table-cell office:value-type="float" office:value="4607111039279" table:style-name="ce15">
            <text:p>4607111039279</text:p>
          </table:table-cell>
          <table:table-cell office:value-type="string" table:style-name="ce16">
            <text:p>Пельмени «Бульмени со сливочным маслом» 0,7 Сфера ТМ «Горячая штучка»</text:p>
          </table:table-cell>
          <table:table-cell office:value-type="float" office:value="0.7" table:style-name="ce17">
            <text:p>0,70</text:p>
          </table:table-cell>
          <table:table-cell office:value-type="float" office:value="10" table:style-name="ce17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72" table:formula="of:=MROUND([.F20];[.O20]*[.P20])/[.O20]" table:style-name="ce18">
            <text:p>72</text:p>
          </table:table-cell>
          <table:table-cell office:value-type="float" office:value="720" table:formula="of:=[.R20]*[.O20]" table:style-name="ce18">
            <text:p>720</text:p>
          </table:table-cell>
          <table:table-cell table:number-columns-repeated="2" table:style-name="ce1"/>
          <table:table-cell office:value-type="float" office:value="503.99999999999994" table:formula="of:=[.S20]*[.N20]" table:style-name="ce19">
            <text:p>504,00</text:p>
          </table:table-cell>
          <table:table-cell office:value-type="float" office:value="0.8571428571428571" table:formula="of:=[.R20]/[.Q20]" table:style-name="ce19">
            <text:p>0,86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Мясные с говядиной ТМ Стародворье сфера ф/п ф/в 1 кг МГ</text:p>
          </table:table-cell>
          <table:table-cell office:value-type="string" table:style-name="ce2">
            <text:p>300 кг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of:=VALUE(LEFT([.D21];LEN([.D21])-3))" table:style-name="ce13">
            <text:p>300</text:p>
          </table:table-cell>
          <table:table-cell office:value-type="float" office:value="300" table:formula="of:=[.F21]*[.N21]" table:style-name="ce13">
            <text:p>300</text:p>
          </table:table-cell>
          <table:table-cell office:value-type="float" office:value="0" table:formula="of:=[.G21]-[.E21]" table:style-name="ce14">
            <text:p>0<text:s/></text:p>
          </table:table-cell>
          <table:table-cell office:value-type="string" table:style-name="ce15">
            <text:p>SU003935</text:p>
          </table:table-cell>
          <table:table-cell office:value-type="string" table:style-name="ce15">
            <text:p>P005048</text:p>
          </table:table-cell>
          <table:table-cell office:value-type="float" office:value="4301071097" table:style-name="ce15">
            <text:p>4301071097</text:p>
          </table:table-cell>
          <table:table-cell office:value-type="float" office:value="4620207491096" table:style-name="ce15">
            <text:p>4620207491096</text:p>
          </table:table-cell>
          <table:table-cell office:value-type="string" table:style-name="ce16">
            <text:p>Пельмени «Мясные с говядиной» Фикс.вес 1 сфера ТМ «Стародворье»</text:p>
          </table:table-cell>
          <table:table-cell office:value-type="float" office:value="1" table:style-name="ce17">
            <text:p>1,00</text:p>
          </table:table-cell>
          <table:table-cell office:value-type="float" office:value="5" table:style-name="ce17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60" table:formula="of:=MROUND([.F21];[.O21]*[.P21])/[.O21]" table:style-name="ce18">
            <text:p>60</text:p>
          </table:table-cell>
          <table:table-cell office:value-type="float" office:value="300" table:formula="of:=[.R21]*[.O21]" table:style-name="ce18">
            <text:p>300</text:p>
          </table:table-cell>
          <table:table-cell table:number-columns-repeated="2" table:style-name="ce1"/>
          <table:table-cell office:value-type="float" office:value="300" table:formula="of:=[.S21]*[.N21]" table:style-name="ce19">
            <text:p>300,00</text:p>
          </table:table-cell>
          <table:table-cell office:value-type="float" office:value="0.7142857142857143" table:formula="of:=[.R21]/[.Q21]" table:style-name="ce19">
            <text:p>0,71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и свининой ТМ Медвежье ушко ТС Медвежье ушко псевдозащип ф/п ф/в 0,43 кг Топ-ЛКК, Дистр МГ</text:p>
          </table:table-cell>
          <table:table-cell office:value-type="string" table:style-name="ce2">
            <text:p>230 шт</text:p>
          </table:table-cell>
          <table:table-cell office:value-type="float" office:value="98.9" table:style-name="ce2">
            <text:p>98,9</text:p>
          </table:table-cell>
          <table:table-cell office:value-type="float" office:value="230" table:formula="of:=VALUE(LEFT([.D22];LEN([.D22])-3))" table:style-name="ce13">
            <text:p>230</text:p>
          </table:table-cell>
          <table:table-cell office:value-type="float" office:value="98.899999999999991" table:formula="of:=[.F22]*[.N22]" table:style-name="ce13">
            <text:p>98,9</text:p>
          </table:table-cell>
          <table:table-cell office:value-type="float" office:value="0" table:formula="of:=[.G22]-[.E22]" table:style-name="ce14">
            <text:p>0<text:s/></text:p>
          </table:table-cell>
          <table:table-cell office:value-type="string" table:style-name="ce15">
            <text:p>SU003974</text:p>
          </table:table-cell>
          <table:table-cell office:value-type="string" table:style-name="ce15">
            <text:p>P005106</text:p>
          </table:table-cell>
          <table:table-cell office:value-type="float" office:value="4301071108" table:style-name="ce15">
            <text:p>4301071108</text:p>
          </table:table-cell>
          <table:table-cell office:value-type="float" office:value="4607111035912" table:style-name="ce15">
            <text:p>4607111035912</text:p>
          </table:table-cell>
          <table:table-cell office:value-type="string" table:style-name="ce16">
            <text:p>Пельмени «Отборные с говядиной и свининой» 0,43 псевдозащип ТМ «Медвежье ушко»</text:p>
          </table:table-cell>
          <table:table-cell office:value-type="float" office:value="0.43" table:style-name="ce17">
            <text:p>0,43</text:p>
          </table:table-cell>
          <table:table-cell office:value-type="float" office:value="16" table:style-name="ce17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F22];[.O22]*[.P22])/[.O22]" table:style-name="ce18">
            <text:p>12</text:p>
          </table:table-cell>
          <table:table-cell office:value-type="float" office:value="192" table:formula="of:=[.R22]*[.O22]" table:style-name="ce18">
            <text:p>192</text:p>
          </table:table-cell>
          <table:table-cell table:number-columns-repeated="2" table:style-name="ce1"/>
          <table:table-cell office:value-type="float" office:value="82.56" table:formula="of:=[.S22]*[.N22]" table:style-name="ce19">
            <text:p>82,56</text:p>
          </table:table-cell>
          <table:table-cell office:value-type="float" office:value="0.14285714285714285" table:formula="of:=[.R22]/[.Q22]" table:style-name="ce19">
            <text:p>0,14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и свининой ТМ Медвежье ушко ТС Медвежье ушко псевдозащип ф/п ф/в 0,9 кг Топ-ЛКК, Дистр МГ</text:p>
          </table:table-cell>
          <table:table-cell office:value-type="string" table:style-name="ce2">
            <text:p>270 <text:s/>шт</text:p>
          </table:table-cell>
          <table:table-cell office:value-type="float" office:value="243" table:style-name="ce2">
            <text:p>243</text:p>
          </table:table-cell>
          <table:table-cell office:value-type="float" office:value="270" table:formula="of:=VALUE(LEFT([.D23];LEN([.D23])-3))" table:style-name="ce13">
            <text:p>270</text:p>
          </table:table-cell>
          <table:table-cell office:value-type="float" office:value="243" table:formula="of:=[.F23]*[.N23]" table:style-name="ce13">
            <text:p>243</text:p>
          </table:table-cell>
          <table:table-cell office:value-type="float" office:value="0" table:formula="of:=[.G23]-[.E23]" table:style-name="ce14">
            <text:p>0<text:s/></text:p>
          </table:table-cell>
          <table:table-cell office:value-type="string" table:style-name="ce15">
            <text:p>SU003975</text:p>
          </table:table-cell>
          <table:table-cell office:value-type="string" table:style-name="ce15">
            <text:p>P005107</text:p>
          </table:table-cell>
          <table:table-cell office:value-type="float" office:value="4301071109" table:style-name="ce15">
            <text:p>4301071109</text:p>
          </table:table-cell>
          <table:table-cell office:value-type="float" office:value="4607111035929" table:style-name="ce15">
            <text:p>4607111035929</text:p>
          </table:table-cell>
          <table:table-cell office:value-type="string" table:style-name="ce16">
            <text:p>Пельмени «Отборные с говядиной и свининой» 0,9 псевдозащип ТМ «Медвежье ушко»</text:p>
          </table:table-cell>
          <table:table-cell office:value-type="float" office:value="0.9" table:style-name="ce17">
            <text:p>0,90</text:p>
          </table:table-cell>
          <table:table-cell office:value-type="float" office:value="8" table:style-name="ce17">
            <text:p>8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F23];[.O23]*[.P23])/[.O23]" table:style-name="ce18">
            <text:p>36</text:p>
          </table:table-cell>
          <table:table-cell office:value-type="float" office:value="288" table:formula="of:=[.R23]*[.O23]" table:style-name="ce18">
            <text:p>288</text:p>
          </table:table-cell>
          <table:table-cell table:number-columns-repeated="2" table:style-name="ce1"/>
          <table:table-cell office:value-type="float" office:value="259.2" table:formula="of:=[.S23]*[.N23]" table:style-name="ce19">
            <text:p>259,20</text:p>
          </table:table-cell>
          <table:table-cell office:value-type="float" office:value="0.42857142857142855" table:formula="of:=[.R23]/[.Q23]" table:style-name="ce19">
            <text:p>0,43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ТМ Медвежье ушко ТС Медвежье ушко псевдозащип ф/п ф/в 0,43 кг Топ-ЛКК, Дистр МГ</text:p>
          </table:table-cell>
          <table:table-cell office:value-type="string" table:style-name="ce2">
            <text:p>105 шт</text:p>
          </table:table-cell>
          <table:table-cell office:value-type="float" office:value="45.15" table:style-name="ce2">
            <text:p>45,15</text:p>
          </table:table-cell>
          <table:table-cell office:value-type="float" office:value="105" table:formula="of:=VALUE(LEFT([.D24];LEN([.D24])-3))" table:style-name="ce13">
            <text:p>105</text:p>
          </table:table-cell>
          <table:table-cell office:value-type="float" office:value="45.15" table:formula="of:=[.F24]*[.N24]" table:style-name="ce13">
            <text:p>45,15</text:p>
          </table:table-cell>
          <table:table-cell office:value-type="float" office:value="0" table:formula="of:=[.G24]-[.E24]" table:style-name="ce14">
            <text:p>0<text:s/></text:p>
          </table:table-cell>
          <table:table-cell office:value-type="string" table:style-name="ce15">
            <text:p>SU003972</text:p>
          </table:table-cell>
          <table:table-cell office:value-type="string" table:style-name="ce15">
            <text:p>P005104</text:p>
          </table:table-cell>
          <table:table-cell office:value-type="float" office:value="4301071106" table:style-name="ce15">
            <text:p>4301071106</text:p>
          </table:table-cell>
          <table:table-cell office:value-type="float" office:value="4607111035882" table:style-name="ce15">
            <text:p>4607111035882</text:p>
          </table:table-cell>
          <table:table-cell office:value-type="string" table:style-name="ce16">
            <text:p>Пельмени «Отборные с говядиной» 0,43 псевдозащип ТМ «Медвежье ушко»</text:p>
          </table:table-cell>
          <table:table-cell office:value-type="float" office:value="0.43" table:style-name="ce17">
            <text:p>0,43</text:p>
          </table:table-cell>
          <table:table-cell office:value-type="float" office:value="16" table:style-name="ce17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F24];[.O24]*[.P24])/[.O24]" table:style-name="ce18">
            <text:p>12</text:p>
          </table:table-cell>
          <table:table-cell office:value-type="float" office:value="192" table:formula="of:=[.R24]*[.O24]" table:style-name="ce18">
            <text:p>192</text:p>
          </table:table-cell>
          <table:table-cell table:number-columns-repeated="2" table:style-name="ce1"/>
          <table:table-cell office:value-type="float" office:value="82.56" table:formula="of:=[.S24]*[.N24]" table:style-name="ce19">
            <text:p>82,56</text:p>
          </table:table-cell>
          <table:table-cell office:value-type="float" office:value="0.14285714285714285" table:formula="of:=[.R24]/[.Q24]" table:style-name="ce19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ТМ Стародворье ТС Медвежье ушко ф/п псевдозащип ф/в 0,9 кг УВС1 РТТ МГ</text:p>
          </table:table-cell>
          <table:table-cell office:value-type="string" table:style-name="ce2">
            <text:p>195 шт</text:p>
          </table:table-cell>
          <table:table-cell office:value-type="float" office:value="175.5" table:style-name="ce2">
            <text:p>175,5</text:p>
          </table:table-cell>
          <table:table-cell office:value-type="float" office:value="195" table:formula="of:=VALUE(LEFT([.D25];LEN([.D25])-3))" table:style-name="ce13">
            <text:p>195</text:p>
          </table:table-cell>
          <table:table-cell office:value-type="float" office:value="175.5" table:formula="of:=[.F25]*[.N25]" table:style-name="ce13">
            <text:p>175,5</text:p>
          </table:table-cell>
          <table:table-cell office:value-type="float" office:value="0" table:formula="of:=[.G25]-[.E25]" table:style-name="ce14">
            <text:p>0<text:s/></text:p>
          </table:table-cell>
          <table:table-cell office:value-type="string" table:style-name="ce15">
            <text:p>SU003973</text:p>
          </table:table-cell>
          <table:table-cell office:value-type="string" table:style-name="ce15">
            <text:p>P005105</text:p>
          </table:table-cell>
          <table:table-cell office:value-type="float" office:value="4301071107" table:style-name="ce15">
            <text:p>4301071107</text:p>
          </table:table-cell>
          <table:table-cell office:value-type="float" office:value="4607111035905" table:style-name="ce15">
            <text:p>4607111035905</text:p>
          </table:table-cell>
          <table:table-cell office:value-type="string" table:style-name="ce16">
            <text:p>Пельмени «Отборные с говядиной» 0,9 псевдозащип ТМ «Медвежье ушко»</text:p>
          </table:table-cell>
          <table:table-cell office:value-type="float" office:value="0.9" table:style-name="ce17">
            <text:p>0,90</text:p>
          </table:table-cell>
          <table:table-cell office:value-type="float" office:value="8" table:style-name="ce17">
            <text:p>8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24" table:formula="of:=MROUND([.F25];[.O25]*[.P25])/[.O25]" table:style-name="ce18">
            <text:p>24</text:p>
          </table:table-cell>
          <table:table-cell office:value-type="float" office:value="192" table:formula="of:=[.R25]*[.O25]" table:style-name="ce18">
            <text:p>192</text:p>
          </table:table-cell>
          <table:table-cell table:number-columns-repeated="2" table:style-name="ce1"/>
          <table:table-cell office:value-type="float" office:value="172.8" table:formula="of:=[.S25]*[.N25]" table:style-name="ce19">
            <text:p>172,80</text:p>
          </table:table-cell>
          <table:table-cell office:value-type="float" office:value="0.2857142857142857" table:formula="of:=[.R25]/[.Q25]" table:style-name="ce19">
            <text:p>0,29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С говядиной и свининой сфера пуговки вес 5 кг УВС НД1 МГ</text:p>
          </table:table-cell>
          <table:table-cell office:value-type="string" table:style-name="ce2">
            <text:p>200 кг</text:p>
          </table:table-cell>
          <table:table-cell office:value-type="float" office:value="200" table:style-name="ce2">
            <text:p>200</text:p>
          </table:table-cell>
          <table:table-cell office:value-type="float" office:value="200" table:formula="of:=VALUE(LEFT([.D26];LEN([.D26])-3))" table:style-name="ce13">
            <text:p>200</text:p>
          </table:table-cell>
          <table:table-cell office:value-type="float" office:value="200" table:formula="of:=[.F26]*[.N26]" table:style-name="ce13">
            <text:p>200</text:p>
          </table:table-cell>
          <table:table-cell office:value-type="float" office:value="0" table:formula="of:=[.G26]-[.E26]" table:style-name="ce14">
            <text:p>0<text:s/></text:p>
          </table:table-cell>
          <table:table-cell office:value-type="string" table:style-name="ce15">
            <text:p>SU000197</text:p>
          </table:table-cell>
          <table:table-cell office:value-type="string" table:style-name="ce15">
            <text:p>P004472</text:p>
          </table:table-cell>
          <table:table-cell office:value-type="float" office:value="4301071050" table:style-name="ce15">
            <text:p>4301071050</text:p>
          </table:table-cell>
          <table:table-cell office:value-type="float" office:value="4607111036216" table:style-name="ce15">
            <text:p>4607111036216</text:p>
          </table:table-cell>
          <table:table-cell office:value-type="string" table:style-name="ce16">
            <text:p>Пельмени «Пуговки с говядиной и свининой» Весовые Сфера ТМ «No Name» 5 кг</text:p>
          </table:table-cell>
          <table:table-cell office:value-type="float" office:value="1" table:style-name="ce17">
            <text:p>1,00</text:p>
          </table:table-cell>
          <table:table-cell office:value-type="float" office:value="5" table:style-name="ce17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144" table:formula="of:=VLOOKUP([.I2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44</text:p>
          </table:table-cell>
          <table:table-cell office:value-type="float" office:value="36" table:formula="of:=MROUND([.F26];[.O26]*[.P26])/[.O26]" table:style-name="ce18">
            <text:p>36</text:p>
          </table:table-cell>
          <table:table-cell office:value-type="float" office:value="180" table:formula="of:=[.R26]*[.O26]" table:style-name="ce18">
            <text:p>180</text:p>
          </table:table-cell>
          <table:table-cell table:number-columns-repeated="2" table:style-name="ce1"/>
          <table:table-cell office:value-type="float" office:value="180" table:formula="of:=[.S26]*[.N26]" table:style-name="ce19">
            <text:p>180,00</text:p>
          </table:table-cell>
          <table:table-cell office:value-type="float" office:value="0.25" table:formula="of:=[.R26]/[.Q26]" table:style-name="ce19">
            <text:p>0,25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Со свининой и говядиной ТМ Особый рецепт ТС Любимая ложка ф/п равиоли ф/в 1,0 кг УВС НД МГ</text:p>
          </table:table-cell>
          <table:table-cell office:value-type="string" table:style-name="ce2">
            <text:p>450 кг</text:p>
          </table:table-cell>
          <table:table-cell office:value-type="float" office:value="450" table:style-name="ce2">
            <text:p>450</text:p>
          </table:table-cell>
          <table:table-cell office:value-type="float" office:value="450" table:formula="of:=VALUE(LEFT([.D27];LEN([.D27])-3))" table:style-name="ce13">
            <text:p>450</text:p>
          </table:table-cell>
          <table:table-cell office:value-type="float" office:value="450" table:formula="of:=[.F27]*[.N27]" table:style-name="ce13">
            <text:p>450</text:p>
          </table:table-cell>
          <table:table-cell office:value-type="float" office:value="0" table:formula="of:=[.G27]-[.E27]" table:style-name="ce14">
            <text:p>0<text:s/></text:p>
          </table:table-cell>
          <table:table-cell office:value-type="string" table:style-name="ce15">
            <text:p>SU002268</text:p>
          </table:table-cell>
          <table:table-cell office:value-type="string" table:style-name="ce15">
            <text:p>P004081</text:p>
          </table:table-cell>
          <table:table-cell office:value-type="float" office:value="4301071029" table:style-name="ce15">
            <text:p>4301071029</text:p>
          </table:table-cell>
          <table:table-cell office:value-type="float" office:value="4607111035899" table:style-name="ce15">
            <text:p>4607111035899</text:p>
          </table:table-cell>
          <table:table-cell office:value-type="string" table:style-name="ce16">
            <text:p>Пельмени Со свининой и говядиной Любимая ложка 1,0 Равиоли Особый рецепт</text:p>
          </table:table-cell>
          <table:table-cell office:value-type="float" office:value="1" table:style-name="ce17">
            <text:p>1,00</text:p>
          </table:table-cell>
          <table:table-cell office:value-type="float" office:value="5" table:style-name="ce17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96" table:formula="of:=MROUND([.F27];[.O27]*[.P27])/[.O27]" table:style-name="ce18">
            <text:p>96</text:p>
          </table:table-cell>
          <table:table-cell office:value-type="float" office:value="480" table:formula="of:=[.R27]*[.O27]" table:style-name="ce18">
            <text:p>480</text:p>
          </table:table-cell>
          <table:table-cell table:number-columns-repeated="2" table:style-name="ce1"/>
          <table:table-cell office:value-type="float" office:value="480" table:formula="of:=[.S27]*[.N27]" table:style-name="ce19">
            <text:p>480,00</text:p>
          </table:table-cell>
          <table:table-cell office:value-type="float" office:value="1.1428571428571428" table:formula="of:=[.R27]/[.Q27]" table:style-name="ce19">
            <text:p>1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 ПГП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ельмени Бульмени Нейробуст с мясом ТМ Горячая штучка ТС Бульмени ГШ сфера ф/п ф/в 0,6 кг МГ</text:p>
          </table:table-cell>
          <table:table-cell office:value-type="string" table:style-name="ce2">
            <text:p>90 шт</text:p>
          </table:table-cell>
          <table:table-cell office:value-type="float" office:value="54" table:style-name="ce2">
            <text:p>54</text:p>
          </table:table-cell>
          <table:table-cell office:value-type="float" office:value="90" table:formula="of:=VALUE(LEFT([.D28];LEN([.D28])-3))" table:style-name="ce13">
            <text:p>90</text:p>
          </table:table-cell>
          <table:table-cell office:value-type="float" office:value="54" table:formula="of:=[.F28]*[.N28]" table:style-name="ce13">
            <text:p>54</text:p>
          </table:table-cell>
          <table:table-cell office:value-type="float" office:value="0" table:formula="of:=[.G28]-[.E28]" table:style-name="ce14">
            <text:p>0<text:s/></text:p>
          </table:table-cell>
          <table:table-cell office:value-type="string" table:style-name="ce15">
            <text:p>SU003845</text:p>
          </table:table-cell>
          <table:table-cell office:value-type="string" table:style-name="ce15">
            <text:p>P004909</text:p>
          </table:table-cell>
          <table:table-cell office:value-type="float" office:value="4301071094" table:style-name="ce15">
            <text:p>4301071094</text:p>
          </table:table-cell>
          <table:table-cell office:value-type="float" office:value="4620207491140" table:style-name="ce15">
            <text:p>4620207491140</text:p>
          </table:table-cell>
          <table:table-cell office:value-type="string" table:style-name="ce16">
            <text:p>Пельмени ПГП «Пельмени Бульмени Нейробуст с мясом» Фикс.вес 0,6 сфера ТМ «Горячая штучка»</text:p>
          </table:table-cell>
          <table:table-cell office:value-type="float" office:value="0.6" table:style-name="ce17">
            <text:p>0,60</text:p>
          </table:table-cell>
          <table:table-cell office:value-type="float" office:value="10" table:style-name="ce17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F28];[.O28]*[.P28])/[.O28]" table:style-name="ce18">
            <text:p>12</text:p>
          </table:table-cell>
          <table:table-cell office:value-type="float" office:value="120" table:formula="of:=[.R28]*[.O28]" table:style-name="ce18">
            <text:p>120</text:p>
          </table:table-cell>
          <table:table-cell table:number-columns-repeated="2" table:style-name="ce1"/>
          <table:table-cell office:value-type="float" office:value="72" table:formula="of:=[.S28]*[.N28]" table:style-name="ce19">
            <text:p>72,00</text:p>
          </table:table-cell>
          <table:table-cell office:value-type="float" office:value="0.14285714285714285" table:formula="of:=[.R28]/[.Q28]" table:style-name="ce19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Бульмени хрустящие с мясом ТМ Горячая штучка ТС Бульмени ГШ сфера ф/в 0,22 кг ПГП2 МГ</text:p>
          </table:table-cell>
          <table:table-cell office:value-type="string" table:style-name="ce2">
            <text:p>150 шт</text:p>
          </table:table-cell>
          <table:table-cell office:value-type="float" office:value="33" table:style-name="ce2">
            <text:p>33</text:p>
          </table:table-cell>
          <table:table-cell office:value-type="float" office:value="150" table:formula="of:=VALUE(LEFT([.D29];LEN([.D29])-3))" table:style-name="ce13">
            <text:p>150</text:p>
          </table:table-cell>
          <table:table-cell office:value-type="float" office:value="33" table:formula="of:=[.F29]*[.N29]" table:style-name="ce13">
            <text:p>33</text:p>
          </table:table-cell>
          <table:table-cell office:value-type="float" office:value="0" table:formula="of:=[.G29]-[.E29]" table:style-name="ce14">
            <text:p>0<text:s/></text:p>
          </table:table-cell>
          <table:table-cell office:value-type="string" table:style-name="ce15">
            <text:p>SU003945</text:p>
          </table:table-cell>
          <table:table-cell office:value-type="string" table:style-name="ce15">
            <text:p>P005065</text:p>
          </table:table-cell>
          <table:table-cell office:value-type="float" office:value="4301135826" table:style-name="ce15">
            <text:p>4301135826</text:p>
          </table:table-cell>
          <table:table-cell office:value-type="float" office:value="4620207490983" table:style-name="ce15">
            <text:p>4620207490983</text:p>
          </table:table-cell>
          <table:table-cell office:value-type="string" table:style-name="ce16">
            <text:p>Снеки «Бульмени хрустящие с мясом» Фикс.вес 0,22 сфера ТМ «Горячая штучка»</text:p>
          </table:table-cell>
          <table:table-cell office:value-type="float" office:value="0.22" table:style-name="ce17">
            <text:p>0,22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2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F29];[.O29]*[.P29])/[.O29]" table:style-name="ce18">
            <text:p>14</text:p>
          </table:table-cell>
          <table:table-cell office:value-type="float" office:value="168" table:formula="of:=[.R29]*[.O29]" table:style-name="ce18">
            <text:p>168</text:p>
          </table:table-cell>
          <table:table-cell table:number-columns-repeated="2" table:style-name="ce1"/>
          <table:table-cell office:value-type="float" office:value="36.96" table:formula="of:=[.S29]*[.N29]" table:style-name="ce19">
            <text:p>36,96</text:p>
          </table:table-cell>
          <table:table-cell office:value-type="float" office:value="0.2" table:formula="of:=[.R29]/[.Q29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бельмеши сочные с мясом ТМ Горячая штучка ф/п ф/в 0,3 кг НД3 ПГП2 МГ</text:p>
          </table:table-cell>
          <table:table-cell office:value-type="string" table:style-name="ce2">
            <text:p>195 шт</text:p>
          </table:table-cell>
          <table:table-cell office:value-type="float" office:value="58.5" table:style-name="ce2">
            <text:p>58,5</text:p>
          </table:table-cell>
          <table:table-cell office:value-type="float" office:value="195" table:formula="of:=VALUE(LEFT([.D30];LEN([.D30])-3))" table:style-name="ce13">
            <text:p>195</text:p>
          </table:table-cell>
          <table:table-cell office:value-type="float" office:value="58.5" table:formula="of:=[.F30]*[.N30]" table:style-name="ce13">
            <text:p>58,5</text:p>
          </table:table-cell>
          <table:table-cell office:value-type="float" office:value="0" table:formula="of:=[.G30]-[.E30]" table:style-name="ce14">
            <text:p>0<text:s/></text:p>
          </table:table-cell>
          <table:table-cell office:value-type="string" table:style-name="ce15">
            <text:p>SU003593</text:p>
          </table:table-cell>
          <table:table-cell office:value-type="string" table:style-name="ce15">
            <text:p>P004598</text:p>
          </table:table-cell>
          <table:table-cell office:value-type="float" office:value="4301135574" table:style-name="ce15">
            <text:p>4301135574</text:p>
          </table:table-cell>
          <table:table-cell office:value-type="float" office:value="4607111033659" table:style-name="ce15">
            <text:p>4607111033659</text:p>
          </table:table-cell>
          <table:table-cell office:value-type="string" table:style-name="ce16">
            <text:p>Снеки «Бельмеши сочные с мясом» Фикс.вес 0,3 Пакет ТМ «Горячая штучка»</text:p>
          </table:table-cell>
          <table:table-cell office:value-type="float" office:value="0.3" table:style-name="ce17">
            <text:p>0,30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F30];[.O30]*[.P30])/[.O30]" table:style-name="ce18">
            <text:p>14</text:p>
          </table:table-cell>
          <table:table-cell office:value-type="float" office:value="168" table:formula="of:=[.R30]*[.O30]" table:style-name="ce18">
            <text:p>168</text:p>
          </table:table-cell>
          <table:table-cell table:number-columns-repeated="2" table:style-name="ce1"/>
          <table:table-cell office:value-type="float" office:value="50.4" table:formula="of:=[.S30]*[.N30]" table:style-name="ce19">
            <text:p>50,40</text:p>
          </table:table-cell>
          <table:table-cell office:value-type="float" office:value="0.2" table:formula="of:=[.R30]/[.Q30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острые с мясом ТМ Горячая штучка ф/п ф/в 0,24 кг МГ</text:p>
          </table:table-cell>
          <table:table-cell office:value-type="string" table:style-name="ce2">
            <text:p>1500 шт</text:p>
          </table:table-cell>
          <table:table-cell office:value-type="float" office:value="360" table:style-name="ce2">
            <text:p>360</text:p>
          </table:table-cell>
          <table:table-cell office:value-type="float" office:value="1500" table:formula="of:=VALUE(LEFT([.D31];LEN([.D31])-3))" table:style-name="ce13">
            <text:p>1500</text:p>
          </table:table-cell>
          <table:table-cell office:value-type="float" office:value="360" table:formula="of:=[.F31]*[.N31]" table:style-name="ce13">
            <text:p>360</text:p>
          </table:table-cell>
          <table:table-cell office:value-type="float" office:value="0" table:formula="of:=[.G31]-[.E31]" table:style-name="ce14">
            <text:p>0<text:s/></text:p>
          </table:table-cell>
          <table:table-cell office:value-type="string" table:style-name="ce15">
            <text:p>SU003887</text:p>
          </table:table-cell>
          <table:table-cell office:value-type="string" table:style-name="ce15">
            <text:p>P004969</text:p>
          </table:table-cell>
          <table:table-cell office:value-type="float" office:value="4301135763" table:style-name="ce15">
            <text:p>4301135763</text:p>
          </table:table-cell>
          <table:table-cell office:value-type="float" office:value="4620207491027" table:style-name="ce15">
            <text:p>4620207491027</text:p>
          </table:table-cell>
          <table:table-cell office:value-type="string" table:style-name="ce16">
            <text:p>Снеки «Готовые чебупели острые с мясом» Фикс.вес 0,24 ТМ «Горячая штучка»</text:p>
          </table:table-cell>
          <table:table-cell office:value-type="float" office:value="0.24" table:style-name="ce17">
            <text:p>0,24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F31];[.O31]*[.P31])/[.O31]" table:style-name="ce18">
            <text:p>126</text:p>
          </table:table-cell>
          <table:table-cell office:value-type="float" office:value="1512" table:formula="of:=[.R31]*[.O31]" table:style-name="ce18">
            <text:p>1512</text:p>
          </table:table-cell>
          <table:table-cell table:number-columns-repeated="2" table:style-name="ce1"/>
          <table:table-cell office:value-type="float" office:value="362.88" table:formula="of:=[.S31]*[.N31]" table:style-name="ce19">
            <text:p>362,88</text:p>
          </table:table-cell>
          <table:table-cell office:value-type="float" office:value="1.8" table:formula="of:=[.R31]/[.Q31]" table:style-name="ce19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с ветчиной и сыром ТМ Горячая штучка ф/п ф/в 0,24 кг ПГП2 МГ</text:p>
          </table:table-cell>
          <table:table-cell office:value-type="string" table:style-name="ce2">
            <text:p>1600 <text:s/>шт</text:p>
          </table:table-cell>
          <table:table-cell office:value-type="float" office:value="384" table:style-name="ce2">
            <text:p>384</text:p>
          </table:table-cell>
          <table:table-cell office:value-type="float" office:value="1600" table:formula="of:=VALUE(LEFT([.D32];LEN([.D32])-3))" table:style-name="ce13">
            <text:p>1600</text:p>
          </table:table-cell>
          <table:table-cell office:value-type="float" office:value="384" table:formula="of:=[.F32]*[.N32]" table:style-name="ce13">
            <text:p>384</text:p>
          </table:table-cell>
          <table:table-cell office:value-type="float" office:value="0" table:formula="of:=[.G32]-[.E32]" table:style-name="ce14">
            <text:p>0<text:s/></text:p>
          </table:table-cell>
          <table:table-cell office:value-type="string" table:style-name="ce15">
            <text:p>SU003889</text:p>
          </table:table-cell>
          <table:table-cell office:value-type="string" table:style-name="ce15">
            <text:p>P004971</text:p>
          </table:table-cell>
          <table:table-cell office:value-type="float" office:value="4301135793" table:style-name="ce15">
            <text:p>4301135793</text:p>
          </table:table-cell>
          <table:table-cell office:value-type="float" office:value="4620207491003" table:style-name="ce15">
            <text:p>4620207491003</text:p>
          </table:table-cell>
          <table:table-cell office:value-type="string" table:style-name="ce16">
            <text:p>Снеки «Готовые чебупели с ветчиной и сыром» Фикс.вес 0,24 ТМ «Горячая штучка»</text:p>
          </table:table-cell>
          <table:table-cell office:value-type="float" office:value="0.24" table:style-name="ce17">
            <text:p>0,24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0" table:formula="of:=MROUND([.F32];[.O32]*[.P32])/[.O32]" table:style-name="ce18">
            <text:p>140</text:p>
          </table:table-cell>
          <table:table-cell office:value-type="float" office:value="1680" table:formula="of:=[.R32]*[.O32]" table:style-name="ce18">
            <text:p>1680</text:p>
          </table:table-cell>
          <table:table-cell table:number-columns-repeated="2" table:style-name="ce1"/>
          <table:table-cell office:value-type="float" office:value="403.2" table:formula="of:=[.S32]*[.N32]" table:style-name="ce19">
            <text:p>403,20</text:p>
          </table:table-cell>
          <table:table-cell office:value-type="float" office:value="2" table:formula="of:=[.R32]/[.Q32]" table:style-name="ce19">
            <text:p>2,0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сочные с мясом ТМ Горячая штучка ф/п ф/в 0,24 кг НКК, Топ-ЛКК, Дистр МГ</text:p>
          </table:table-cell>
          <table:table-cell office:value-type="string" table:style-name="ce2">
            <text:p>2250 шт</text:p>
          </table:table-cell>
          <table:table-cell office:value-type="float" office:value="1080" table:style-name="ce21">
            <text:p>1080</text:p>
          </table:table-cell>
          <table:table-cell office:value-type="float" office:value="2250" table:formula="of:=VALUE(LEFT([.D33];LEN([.D33])-3))" table:style-name="ce13">
            <text:p>2250</text:p>
          </table:table-cell>
          <table:table-cell office:value-type="float" office:value="540" table:formula="of:=[.F33]*[.N33]" table:style-name="ce13">
            <text:p>540</text:p>
          </table:table-cell>
          <table:table-cell office:value-type="float" office:value="-540" table:formula="of:=[.G33]-[.E33]" table:style-name="ce22">
            <text:p>-540<text:s/></text:p>
          </table:table-cell>
          <table:table-cell office:value-type="string" table:style-name="ce15">
            <text:p>SU003884</text:p>
          </table:table-cell>
          <table:table-cell office:value-type="string" table:style-name="ce15">
            <text:p>P004966</text:p>
          </table:table-cell>
          <table:table-cell office:value-type="float" office:value="4301135760" table:style-name="ce15">
            <text:p>4301135760</text:p>
          </table:table-cell>
          <table:table-cell office:value-type="float" office:value="4620207491010" table:style-name="ce15">
            <text:p>4620207491010</text:p>
          </table:table-cell>
          <table:table-cell office:value-type="string" table:style-name="ce16">
            <text:p>Снеки «Готовые чебупели сочные с мясом» Фикс.вес 0,24 ТМ «Горячая штучка»</text:p>
          </table:table-cell>
          <table:table-cell office:value-type="float" office:value="0.24" table:style-name="ce17">
            <text:p>0,24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82" table:formula="of:=MROUND([.F33];[.O33]*[.P33])/[.O33]" table:style-name="ce18">
            <text:p>182</text:p>
          </table:table-cell>
          <table:table-cell office:value-type="float" office:value="2184" table:formula="of:=[.R33]*[.O33]" table:style-name="ce18">
            <text:p>2184</text:p>
          </table:table-cell>
          <table:table-cell table:number-columns-repeated="2" table:style-name="ce1"/>
          <table:table-cell office:value-type="float" office:value="524.16" table:formula="of:=[.S33]*[.N33]" table:style-name="ce19">
            <text:p>524,16</text:p>
          </table:table-cell>
          <table:table-cell office:value-type="float" office:value="2.6" table:formula="of:=[.R33]/[.Q33]" table:style-name="ce19">
            <text:p>2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сочные с мясом ТМ Горячая штучка ф/п ф/в 0,48 кг XXL НД МГ</text:p>
          </table:table-cell>
          <table:table-cell office:value-type="string" table:style-name="ce2">
            <text:p>45 шт</text:p>
          </table:table-cell>
          <table:table-cell office:value-type="float" office:value="21.6" table:style-name="ce2">
            <text:p>21,6</text:p>
          </table:table-cell>
          <table:table-cell office:value-type="float" office:value="45" table:formula="of:=VALUE(LEFT([.D34];LEN([.D34])-3))" table:style-name="ce13">
            <text:p>45</text:p>
          </table:table-cell>
          <table:table-cell office:value-type="float" office:value="21.599999999999998" table:formula="of:=[.F34]*[.N34]" table:style-name="ce13">
            <text:p>21,6</text:p>
          </table:table-cell>
          <table:table-cell office:value-type="float" office:value="0" table:formula="of:=[.G34]-[.E34]" table:style-name="ce14">
            <text:p>0<text:s/></text:p>
          </table:table-cell>
          <table:table-cell office:value-type="string" table:style-name="ce15">
            <text:p>SU003605</text:p>
          </table:table-cell>
          <table:table-cell office:value-type="string" table:style-name="ce15">
            <text:p>P004595</text:p>
          </table:table-cell>
          <table:table-cell office:value-type="float" office:value="4301135571" table:style-name="ce15">
            <text:p>4301135571</text:p>
          </table:table-cell>
          <table:table-cell office:value-type="float" office:value="4607111035028" table:style-name="ce15">
            <text:p>4607111035028</text:p>
          </table:table-cell>
          <table:table-cell office:value-type="string" table:style-name="ce16">
            <text:p>Снеки «Готовые чебупели сочные с мясом» Фикс.вес 0,48 ТМ «Горячая штучка»</text:p>
          </table:table-cell>
          <table:table-cell office:value-type="float" office:value="0.48" table:style-name="ce17">
            <text:p>0,48</text:p>
          </table:table-cell>
          <table:table-cell office:value-type="float" office:value="8" table:style-name="ce17">
            <text:p>8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0" table:formula="of:=MROUND([.F34];[.O34]*[.P34])/[.O34]" table:style-name="ce20">
            <text:p>0</text:p>
          </table:table-cell>
          <table:table-cell office:value-type="float" office:value="0" table:formula="of:=[.R34]*[.O34]" table:style-name="ce20">
            <text:p>0</text:p>
          </table:table-cell>
          <table:table-cell office:value-type="float" office:value="112" table:formula="of:=[.O34]*[.P34]" table:style-name="ce1">
            <text:p>112</text:p>
          </table:table-cell>
          <table:table-cell office:value-type="string" table:style-name="ce1">
            <text:p>кратность</text:p>
          </table:table-cell>
          <table:table-cell office:value-type="float" office:value="0" table:formula="of:=[.S34]*[.N34]" table:style-name="ce19">
            <text:p>0,00</text:p>
          </table:table-cell>
          <table:table-cell office:value-type="float" office:value="0" table:formula="of:=[.R34]/[.Q34]" table:style-name="ce19">
            <text:p>0,0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ЖАР-ладушки с мясом ТМ Стародворье ф/в 0,2 кг МГ</text:p>
          </table:table-cell>
          <table:table-cell office:value-type="string" table:style-name="ce2">
            <text:p>480 шт</text:p>
          </table:table-cell>
          <table:table-cell office:value-type="float" office:value="96" table:style-name="ce2">
            <text:p>96</text:p>
          </table:table-cell>
          <table:table-cell office:value-type="float" office:value="480" table:formula="of:=VALUE(LEFT([.D35];LEN([.D35])-3))" table:style-name="ce13">
            <text:p>480</text:p>
          </table:table-cell>
          <table:table-cell office:value-type="float" office:value="96" table:formula="of:=[.F35]*[.N35]" table:style-name="ce13">
            <text:p>96</text:p>
          </table:table-cell>
          <table:table-cell office:value-type="float" office:value="0" table:formula="of:=[.G35]-[.E35]" table:style-name="ce14">
            <text:p>0<text:s/></text:p>
          </table:table-cell>
          <table:table-cell office:value-type="string" table:style-name="ce15">
            <text:p>SU003963</text:p>
          </table:table-cell>
          <table:table-cell office:value-type="string" table:style-name="ce15">
            <text:p>P005095</text:p>
          </table:table-cell>
          <table:table-cell office:value-type="float" office:value="4301135829" table:style-name="ce15">
            <text:p>4301135829</text:p>
          </table:table-cell>
          <table:table-cell office:value-type="float" office:value="4620207490235" table:style-name="ce15">
            <text:p>4620207490235</text:p>
          </table:table-cell>
          <table:table-cell office:value-type="string" table:style-name="ce16">
            <text:p>Снеки «ЖАР-ладушки с мясом» Фикс.вес 0,2 ТМ «Стародворье»</text:p>
          </table:table-cell>
          <table:table-cell office:value-type="float" office:value="0.2" table:style-name="ce17">
            <text:p>0,20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42" table:formula="of:=MROUND([.F35];[.O35]*[.P35])/[.O35]" table:style-name="ce18">
            <text:p>42</text:p>
          </table:table-cell>
          <table:table-cell office:value-type="float" office:value="504" table:formula="of:=[.R35]*[.O35]" table:style-name="ce18">
            <text:p>504</text:p>
          </table:table-cell>
          <table:table-cell table:number-columns-repeated="2" table:style-name="ce1"/>
          <table:table-cell office:value-type="float" office:value="100.80000000000001" table:formula="of:=[.S35]*[.N35]" table:style-name="ce19">
            <text:p>100,80</text:p>
          </table:table-cell>
          <table:table-cell office:value-type="float" office:value="0.6" table:formula="of:=[.R35]/[.Q35]" table:style-name="ce19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Круггетсы с сырным соусом ТМ Горячая штучка ТС Круггетсы ф/п ф/в 0,2 кг ПГП2 МГ</text:p>
          </table:table-cell>
          <table:table-cell office:value-type="string" table:style-name="ce2">
            <text:p>1450 шт</text:p>
          </table:table-cell>
          <table:table-cell office:value-type="float" office:value="290" table:style-name="ce2">
            <text:p>290</text:p>
          </table:table-cell>
          <table:table-cell office:value-type="float" office:value="1450" table:formula="of:=VALUE(LEFT([.D36];LEN([.D36])-3))" table:style-name="ce13">
            <text:p>1450</text:p>
          </table:table-cell>
          <table:table-cell office:value-type="float" office:value="290" table:formula="of:=[.F36]*[.N36]" table:style-name="ce13">
            <text:p>290</text:p>
          </table:table-cell>
          <table:table-cell office:value-type="float" office:value="0" table:formula="of:=[.G36]-[.E36]" table:style-name="ce14">
            <text:p>0<text:s/></text:p>
          </table:table-cell>
          <table:table-cell office:value-type="string" table:style-name="ce15">
            <text:p>SU003872</text:p>
          </table:table-cell>
          <table:table-cell office:value-type="string" table:style-name="ce15">
            <text:p>P004956</text:p>
          </table:table-cell>
          <table:table-cell office:value-type="float" office:value="4301135753" table:style-name="ce15">
            <text:p>4301135753</text:p>
          </table:table-cell>
          <table:table-cell office:value-type="float" office:value="4620207490914" table:style-name="ce15">
            <text:p>4620207490914</text:p>
          </table:table-cell>
          <table:table-cell office:value-type="string" table:style-name="ce16">
            <text:p>Снеки «Круггетсы с сырным соусом» Фикс.вес 0,2 ТМ «Горячая штучка»</text:p>
          </table:table-cell>
          <table:table-cell office:value-type="float" office:value="0.2" table:style-name="ce17">
            <text:p>0,20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F36];[.O36]*[.P36])/[.O36]" table:style-name="ce18">
            <text:p>126</text:p>
          </table:table-cell>
          <table:table-cell office:value-type="float" office:value="1512" table:formula="of:=[.R36]*[.O36]" table:style-name="ce18">
            <text:p>1512</text:p>
          </table:table-cell>
          <table:table-cell table:number-columns-repeated="2" table:style-name="ce1"/>
          <table:table-cell office:value-type="float" office:value="302.40000000000003" table:formula="of:=[.S36]*[.N36]" table:style-name="ce19">
            <text:p>302,40</text:p>
          </table:table-cell>
          <table:table-cell office:value-type="float" office:value="1.8" table:formula="of:=[.R36]/[.Q36]" table:style-name="ce19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Круггетсы сочные ТМ Горячая штучка ТС Круггетсы ф/п ф/в 0,2 кг ПГП2 МГ</text:p>
          </table:table-cell>
          <table:table-cell office:value-type="string" table:style-name="ce2">
            <text:p>1450 <text:s/>шт</text:p>
          </table:table-cell>
          <table:table-cell office:value-type="float" office:value="290" table:style-name="ce2">
            <text:p>290</text:p>
          </table:table-cell>
          <table:table-cell office:value-type="float" office:value="1450" table:formula="of:=VALUE(LEFT([.D37];LEN([.D37])-3))" table:style-name="ce13">
            <text:p>1450</text:p>
          </table:table-cell>
          <table:table-cell office:value-type="float" office:value="290" table:formula="of:=[.F37]*[.N37]" table:style-name="ce13">
            <text:p>290</text:p>
          </table:table-cell>
          <table:table-cell office:value-type="float" office:value="0" table:formula="of:=[.G37]-[.E37]" table:style-name="ce14">
            <text:p>0<text:s/></text:p>
          </table:table-cell>
          <table:table-cell office:value-type="string" table:style-name="ce15">
            <text:p>SU003870</text:p>
          </table:table-cell>
          <table:table-cell office:value-type="string" table:style-name="ce15">
            <text:p>P004953</text:p>
          </table:table-cell>
          <table:table-cell office:value-type="float" office:value="4301135778" table:style-name="ce15">
            <text:p>4301135778</text:p>
          </table:table-cell>
          <table:table-cell office:value-type="float" office:value="4620207490853" table:style-name="ce15">
            <text:p>4620207490853</text:p>
          </table:table-cell>
          <table:table-cell office:value-type="string" table:style-name="ce16">
            <text:p>Снеки «Круггетсы сочные» Фикс.вес 0,2 ТМ «Горячая штучка»</text:p>
          </table:table-cell>
          <table:table-cell office:value-type="float" office:value="0.2" table:style-name="ce17">
            <text:p>0,20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F37];[.O37]*[.P37])/[.O37]" table:style-name="ce18">
            <text:p>126</text:p>
          </table:table-cell>
          <table:table-cell office:value-type="float" office:value="1512" table:formula="of:=[.R37]*[.O37]" table:style-name="ce18">
            <text:p>1512</text:p>
          </table:table-cell>
          <table:table-cell table:number-columns-repeated="2" table:style-name="ce1"/>
          <table:table-cell office:value-type="float" office:value="302.40000000000003" table:formula="of:=[.S37]*[.N37]" table:style-name="ce19">
            <text:p>302,40</text:p>
          </table:table-cell>
          <table:table-cell office:value-type="float" office:value="1.8" table:formula="of:=[.R37]/[.Q37]" table:style-name="ce19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Мини-сосиски в тесте ТМ Зареченские ТС Зареченские продукты вес 3,7 кг ПГП2 МГ</text:p>
          </table:table-cell>
          <table:table-cell office:value-type="string" table:style-name="ce2">
            <text:p>185 кг</text:p>
          </table:table-cell>
          <table:table-cell office:value-type="float" office:value="185" table:style-name="ce2">
            <text:p>185</text:p>
          </table:table-cell>
          <table:table-cell office:value-type="float" office:value="185" table:formula="of:=VALUE(LEFT([.D38];LEN([.D38])-3))" table:style-name="ce13">
            <text:p>185</text:p>
          </table:table-cell>
          <table:table-cell office:value-type="float" office:value="185" table:formula="of:=[.F38]*[.N38]" table:style-name="ce13">
            <text:p>185</text:p>
          </table:table-cell>
          <table:table-cell office:value-type="float" office:value="0" table:formula="of:=[.G38]-[.E38]" table:style-name="ce14">
            <text:p>0<text:s/></text:p>
          </table:table-cell>
          <table:table-cell office:value-type="string" table:style-name="ce15">
            <text:p>SU003454</text:p>
          </table:table-cell>
          <table:table-cell office:value-type="string" table:style-name="ce15">
            <text:p>P004364</text:p>
          </table:table-cell>
          <table:table-cell office:value-type="float" office:value="4301135518" table:style-name="ce15">
            <text:p>4301135518</text:p>
          </table:table-cell>
          <table:table-cell office:value-type="float" office:value="4640242181561" table:style-name="ce15">
            <text:p>4640242181561</text:p>
          </table:table-cell>
          <table:table-cell office:value-type="string" table:style-name="ce16">
            <text:p>Снеки «Мини-сосиски в тесте» Весовые ТМ «Зареченские» 3,7 кг</text:p>
          </table:table-cell>
          <table:table-cell office:value-type="float" office:value="1" table:style-name="ce17">
            <text:p>1,00</text:p>
          </table:table-cell>
          <table:table-cell office:value-type="float" office:value="3.7" table:style-name="ce17">
            <text:p>3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3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56" table:formula="of:=MROUND([.F38];[.O38]*[.P38])/[.O38]" table:style-name="ce18">
            <text:p>56</text:p>
          </table:table-cell>
          <table:table-cell office:value-type="float" office:value="207.20000000000002" table:formula="of:=[.R38]*[.O38]" table:style-name="ce18">
            <text:p>207,2</text:p>
          </table:table-cell>
          <table:table-cell table:number-columns-repeated="2" table:style-name="ce1"/>
          <table:table-cell office:value-type="float" office:value="207.20000000000002" table:formula="of:=[.S38]*[.N38]" table:style-name="ce19">
            <text:p>207,20</text:p>
          </table:table-cell>
          <table:table-cell office:value-type="float" office:value="0.44444444444444442" table:formula="of:=[.R38]/[.Q38]" table:style-name="ce19">
            <text:p>0,4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Мини-чебуречки с мясом ТМ Зареченские ТС Зареченские продукты вес 5,5 кг МГ</text:p>
          </table:table-cell>
          <table:table-cell office:value-type="string" table:style-name="ce2">
            <text:p>55 кг</text:p>
          </table:table-cell>
          <table:table-cell office:value-type="float" office:value="55" table:style-name="ce2">
            <text:p>55</text:p>
          </table:table-cell>
          <table:table-cell office:value-type="float" office:value="55" table:formula="of:=VALUE(LEFT([.D39];LEN([.D39])-3))" table:style-name="ce13">
            <text:p>55</text:p>
          </table:table-cell>
          <table:table-cell office:value-type="float" office:value="55" table:formula="of:=[.F39]*[.N39]" table:style-name="ce13">
            <text:p>55</text:p>
          </table:table-cell>
          <table:table-cell office:value-type="float" office:value="0" table:formula="of:=[.G39]-[.E39]" table:style-name="ce14">
            <text:p>0<text:s/></text:p>
          </table:table-cell>
          <table:table-cell office:value-type="string" table:style-name="ce15">
            <text:p>SU003434</text:p>
          </table:table-cell>
          <table:table-cell office:value-type="string" table:style-name="ce15">
            <text:p>P004358</text:p>
          </table:table-cell>
          <table:table-cell office:value-type="float" office:value="4301135374" table:style-name="ce15">
            <text:p>4301135374</text:p>
          </table:table-cell>
          <table:table-cell office:value-type="float" office:value="4640242181424" table:style-name="ce15">
            <text:p>4640242181424</text:p>
          </table:table-cell>
          <table:table-cell office:value-type="string" table:style-name="ce16">
            <text:p>Снеки «Мини-чебуречки с мясом» Весовой ТМ «Зареченские» 5,5 кг</text:p>
          </table:table-cell>
          <table:table-cell office:value-type="float" office:value="1" table:style-name="ce17">
            <text:p>1,00</text:p>
          </table:table-cell>
          <table:table-cell office:value-type="float" office:value="5.5" table:style-name="ce17">
            <text:p>5,5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3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F39];[.O39]*[.P39])/[.O39]" table:style-name="ce18">
            <text:p>12</text:p>
          </table:table-cell>
          <table:table-cell office:value-type="float" office:value="66" table:formula="of:=[.R39]*[.O39]" table:style-name="ce18">
            <text:p>66</text:p>
          </table:table-cell>
          <table:table-cell table:number-columns-repeated="2" table:style-name="ce1"/>
          <table:table-cell office:value-type="float" office:value="66" table:formula="of:=[.S39]*[.N39]" table:style-name="ce19">
            <text:p>66,00</text:p>
          </table:table-cell>
          <table:table-cell office:value-type="float" office:value="0.14285714285714285" table:formula="of:=[.R39]/[.Q39]" table:style-name="ce19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Мини-шарики с курочкой и сыром ТМ Зареченские ТС Зареченские продукты вес 3 кг МГ</text:p>
          </table:table-cell>
          <table:table-cell office:value-type="string" table:style-name="ce2">
            <text:p>90 кг</text:p>
          </table:table-cell>
          <table:table-cell office:value-type="float" office:value="90" table:style-name="ce2">
            <text:p>90</text:p>
          </table:table-cell>
          <table:table-cell office:value-type="float" office:value="90" table:formula="of:=VALUE(LEFT([.D40];LEN([.D40])-3))" table:style-name="ce13">
            <text:p>90</text:p>
          </table:table-cell>
          <table:table-cell office:value-type="float" office:value="90" table:formula="of:=[.F40]*[.N40]" table:style-name="ce13">
            <text:p>90</text:p>
          </table:table-cell>
          <table:table-cell office:value-type="float" office:value="0" table:formula="of:=[.G40]-[.E40]" table:style-name="ce14">
            <text:p>0<text:s/></text:p>
          </table:table-cell>
          <table:table-cell office:value-type="string" table:style-name="ce15">
            <text:p>SU003448</text:p>
          </table:table-cell>
          <table:table-cell office:value-type="string" table:style-name="ce15">
            <text:p>P004394</text:p>
          </table:table-cell>
          <table:table-cell office:value-type="float" office:value="4301135405" table:style-name="ce15">
            <text:p>4301135405</text:p>
          </table:table-cell>
          <table:table-cell office:value-type="float" office:value="4640242181523" table:style-name="ce15">
            <text:p>4640242181523</text:p>
          </table:table-cell>
          <table:table-cell office:value-type="string" table:style-name="ce16">
            <text:p>Снеки «Мини-шарики с курочкой и сыром» Весовой ТМ «Зареченские» 3 кг</text:p>
          </table:table-cell>
          <table:table-cell office:value-type="float" office:value="1" table:style-name="ce17">
            <text:p>1,00</text:p>
          </table:table-cell>
          <table:table-cell office:value-type="float" office:value="3" table:style-name="ce17">
            <text:p>3,0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28" table:formula="of:=MROUND([.F40];[.O40]*[.P40])/[.O40]" table:style-name="ce18">
            <text:p>28</text:p>
          </table:table-cell>
          <table:table-cell office:value-type="float" office:value="84" table:formula="of:=[.R40]*[.O40]" table:style-name="ce18">
            <text:p>84</text:p>
          </table:table-cell>
          <table:table-cell table:number-columns-repeated="2" table:style-name="ce1"/>
          <table:table-cell office:value-type="float" office:value="84" table:formula="of:=[.S40]*[.N40]" table:style-name="ce19">
            <text:p>84,00</text:p>
          </table:table-cell>
          <table:table-cell office:value-type="float" office:value="0.22222222222222221" table:formula="of:=[.R40]/[.Q40]" table:style-name="ce19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екерсы с индейкой в сливочном соусе ТМ Горячая штучка ТС Пекерсы ф/п ф/в 0,25 кг НД4 МГ</text:p>
          </table:table-cell>
          <table:table-cell office:value-type="string" table:style-name="ce2">
            <text:p>240 <text:s/>шт</text:p>
          </table:table-cell>
          <table:table-cell office:value-type="float" office:value="60" table:style-name="ce2">
            <text:p>60</text:p>
          </table:table-cell>
          <table:table-cell office:value-type="float" office:value="240" table:formula="of:=VALUE(LEFT([.D41];LEN([.D41])-3))" table:style-name="ce13">
            <text:p>240</text:p>
          </table:table-cell>
          <table:table-cell office:value-type="float" office:value="60" table:formula="of:=[.F41]*[.N41]" table:style-name="ce13">
            <text:p>60</text:p>
          </table:table-cell>
          <table:table-cell office:value-type="float" office:value="0" table:formula="of:=[.G41]-[.E41]" table:style-name="ce14">
            <text:p>0<text:s/></text:p>
          </table:table-cell>
          <table:table-cell office:value-type="string" table:style-name="ce15">
            <text:p>SU003596</text:p>
          </table:table-cell>
          <table:table-cell office:value-type="string" table:style-name="ce15">
            <text:p>P004594</text:p>
          </table:table-cell>
          <table:table-cell office:value-type="float" office:value="4301135570" table:style-name="ce15">
            <text:p>4301135570</text:p>
          </table:table-cell>
          <table:table-cell office:value-type="float" office:value="4607111035806" table:style-name="ce15">
            <text:p>4607111035806</text:p>
          </table:table-cell>
          <table:table-cell office:value-type="string" table:style-name="ce16">
            <text:p>Снеки «Пекерсы с индейкой в сливочном соусе» Фикс.вес 0,25 Пакет ТМ «Горячая штуч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F41];[.O41]*[.P41])/[.O41]" table:style-name="ce18">
            <text:p>14</text:p>
          </table:table-cell>
          <table:table-cell office:value-type="float" office:value="168" table:formula="of:=[.R41]*[.O41]" table:style-name="ce18">
            <text:p>168</text:p>
          </table:table-cell>
          <table:table-cell table:number-columns-repeated="2" table:style-name="ce1"/>
          <table:table-cell office:value-type="float" office:value="42" table:formula="of:=[.S41]*[.N41]" table:style-name="ce19">
            <text:p>42,00</text:p>
          </table:table-cell>
          <table:table-cell office:value-type="float" office:value="0.2" table:formula="of:=[.R41]/[.Q41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ирожки с мясом ТМ Зареченские ТС Зареченские продукты вес 3,7 кг МГ</text:p>
          </table:table-cell>
          <table:table-cell office:value-type="string" table:style-name="ce2">
            <text:p>148 кг</text:p>
          </table:table-cell>
          <table:table-cell office:value-type="float" office:value="148" table:style-name="ce2">
            <text:p>148</text:p>
          </table:table-cell>
          <table:table-cell office:value-type="float" office:value="148" table:formula="of:=VALUE(LEFT([.D42];LEN([.D42])-3))" table:style-name="ce13">
            <text:p>148</text:p>
          </table:table-cell>
          <table:table-cell office:value-type="float" office:value="148" table:formula="of:=[.F42]*[.N42]" table:style-name="ce13">
            <text:p>148</text:p>
          </table:table-cell>
          <table:table-cell office:value-type="float" office:value="0" table:formula="of:=[.G42]-[.E42]" table:style-name="ce14">
            <text:p>0<text:s/></text:p>
          </table:table-cell>
          <table:table-cell office:value-type="string" table:style-name="ce15">
            <text:p>SU003439</text:p>
          </table:table-cell>
          <table:table-cell office:value-type="string" table:style-name="ce15">
            <text:p>P004359</text:p>
          </table:table-cell>
          <table:table-cell office:value-type="float" office:value="4301135375" table:style-name="ce15">
            <text:p>4301135375</text:p>
          </table:table-cell>
          <table:table-cell office:value-type="float" office:value="4640242181486" table:style-name="ce15">
            <text:p>4640242181486</text:p>
          </table:table-cell>
          <table:table-cell office:value-type="string" table:style-name="ce16">
            <text:p>«Пирожки с мясом» Весовые ТМ «Зареченские» 3,7 кг</text:p>
          </table:table-cell>
          <table:table-cell office:value-type="float" office:value="1" table:style-name="ce17">
            <text:p>1,00</text:p>
          </table:table-cell>
          <table:table-cell office:value-type="float" office:value="3.7" table:style-name="ce17">
            <text:p>3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42" table:formula="of:=MROUND([.F42];[.O42]*[.P42])/[.O42]" table:style-name="ce18">
            <text:p>42</text:p>
          </table:table-cell>
          <table:table-cell office:value-type="float" office:value="155.4" table:formula="of:=[.R42]*[.O42]" table:style-name="ce18">
            <text:p>155,4</text:p>
          </table:table-cell>
          <table:table-cell table:number-columns-repeated="2" table:style-name="ce1"/>
          <table:table-cell office:value-type="float" office:value="155.4" table:formula="of:=[.S42]*[.N42]" table:style-name="ce19">
            <text:p>155,40</text:p>
          </table:table-cell>
          <table:table-cell office:value-type="float" office:value="0.33333333333333331" table:formula="of:=[.R42]/[.Q42]" table:style-name="ce19">
            <text:p>0,33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ирожки с мясом, картофелем и грибами ТМ Зареченские ТС Зареченские продукты вес 3,7 кг МГ</text:p>
          </table:table-cell>
          <table:table-cell office:value-type="string" table:style-name="ce2">
            <text:p>88,8 кг</text:p>
          </table:table-cell>
          <table:table-cell office:value-type="float" office:value="88.8" table:style-name="ce2">
            <text:p>88,8</text:p>
          </table:table-cell>
          <table:table-cell office:value-type="float" office:value="88.8" table:formula="of:=VALUE(LEFT([.D43];LEN([.D43])-3))" table:style-name="ce13">
            <text:p>88,8</text:p>
          </table:table-cell>
          <table:table-cell office:value-type="float" office:value="88.8" table:formula="of:=[.F43]*[.N43]" table:style-name="ce13">
            <text:p>88,8</text:p>
          </table:table-cell>
          <table:table-cell office:value-type="float" office:value="0" table:formula="of:=[.G43]-[.E43]" table:style-name="ce14">
            <text:p>0<text:s/></text:p>
          </table:table-cell>
          <table:table-cell office:value-type="string" table:style-name="ce15">
            <text:p>SU003442</text:p>
          </table:table-cell>
          <table:table-cell office:value-type="string" table:style-name="ce15">
            <text:p>P004391</text:p>
          </table:table-cell>
          <table:table-cell office:value-type="float" office:value="4301135402" table:style-name="ce15">
            <text:p>4301135402</text:p>
          </table:table-cell>
          <table:table-cell office:value-type="float" office:value="4640242181493" table:style-name="ce15">
            <text:p>4640242181493</text:p>
          </table:table-cell>
          <table:table-cell office:value-type="string" table:style-name="ce16">
            <text:p>Снеки «Пирожки с мясом, картофелем и грибами» Весовые ТМ «Зареченские» 3,7 кг</text:p>
          </table:table-cell>
          <table:table-cell office:value-type="float" office:value="1" table:style-name="ce17">
            <text:p>1,00</text:p>
          </table:table-cell>
          <table:table-cell office:value-type="float" office:value="3.7" table:style-name="ce17">
            <text:p>3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28" table:formula="of:=MROUND([.F43];[.O43]*[.P43])/[.O43]" table:style-name="ce18">
            <text:p>28</text:p>
          </table:table-cell>
          <table:table-cell office:value-type="float" office:value="103.60000000000001" table:formula="of:=[.R43]*[.O43]" table:style-name="ce18">
            <text:p>103,6</text:p>
          </table:table-cell>
          <table:table-cell table:number-columns-repeated="2" table:style-name="ce1"/>
          <table:table-cell office:value-type="float" office:value="103.60000000000001" table:formula="of:=[.S43]*[.N43]" table:style-name="ce19">
            <text:p>103,60</text:p>
          </table:table-cell>
          <table:table-cell office:value-type="float" office:value="0.22222222222222221" table:formula="of:=[.R43]/[.Q43]" table:style-name="ce19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отстеры с сыром ТМ Горячая штучка ТС Хотстеры ф/в 0,25 кг ПГП2 МГ</text:p>
          </table:table-cell>
          <table:table-cell office:value-type="string" table:style-name="ce2">
            <text:p>1480 <text:s/>шт</text:p>
          </table:table-cell>
          <table:table-cell office:value-type="float" office:value="370" table:style-name="ce2">
            <text:p>370</text:p>
          </table:table-cell>
          <table:table-cell office:value-type="float" office:value="1480" table:formula="of:=VALUE(LEFT([.D44];LEN([.D44])-3))" table:style-name="ce13">
            <text:p>1480</text:p>
          </table:table-cell>
          <table:table-cell office:value-type="float" office:value="370" table:formula="of:=[.F44]*[.N44]" table:style-name="ce13">
            <text:p>370</text:p>
          </table:table-cell>
          <table:table-cell office:value-type="float" office:value="0" table:formula="of:=[.G44]-[.E44]" table:style-name="ce14">
            <text:p>0<text:s/></text:p>
          </table:table-cell>
          <table:table-cell office:value-type="string" table:style-name="ce15">
            <text:p>SU003944</text:p>
          </table:table-cell>
          <table:table-cell office:value-type="string" table:style-name="ce15">
            <text:p>P005058</text:p>
          </table:table-cell>
          <table:table-cell office:value-type="float" office:value="4301135824" table:style-name="ce15">
            <text:p>4301135824</text:p>
          </table:table-cell>
          <table:table-cell office:value-type="float" office:value="4607111039095" table:style-name="ce15">
            <text:p>4607111039095</text:p>
          </table:table-cell>
          <table:table-cell office:value-type="string" table:style-name="ce16">
            <text:p>Снеки «Хотстеры с сыром» Фикс.вес 0,25 ТМ «Горячая штуч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F44];[.O44]*[.P44])/[.O44]" table:style-name="ce18">
            <text:p>126</text:p>
          </table:table-cell>
          <table:table-cell office:value-type="float" office:value="1512" table:formula="of:=[.R44]*[.O44]" table:style-name="ce18">
            <text:p>1512</text:p>
          </table:table-cell>
          <table:table-cell table:number-columns-repeated="2" table:style-name="ce1"/>
          <table:table-cell office:value-type="float" office:value="378" table:formula="of:=[.S44]*[.N44]" table:style-name="ce19">
            <text:p>378,00</text:p>
          </table:table-cell>
          <table:table-cell office:value-type="float" office:value="1.8" table:formula="of:=[.R44]/[.Q44]" table:style-name="ce19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отстеры ТМ Горячая штучка ТС Хотстеры ф/п ф/в 0,25 кг НД2 ПГП2 МГ</text:p>
          </table:table-cell>
          <table:table-cell office:value-type="string" table:style-name="ce2">
            <text:p>1800 <text:s/>шт</text:p>
          </table:table-cell>
          <table:table-cell office:value-type="float" office:value="450" table:style-name="ce2">
            <text:p>450</text:p>
          </table:table-cell>
          <table:table-cell office:value-type="float" office:value="1800" table:formula="of:=VALUE(LEFT([.D45];LEN([.D45])-3))" table:style-name="ce13">
            <text:p>1800</text:p>
          </table:table-cell>
          <table:table-cell office:value-type="float" office:value="450" table:formula="of:=[.F45]*[.N45]" table:style-name="ce13">
            <text:p>450</text:p>
          </table:table-cell>
          <table:table-cell office:value-type="float" office:value="0" table:formula="of:=[.G45]-[.E45]" table:style-name="ce14">
            <text:p>0<text:s/></text:p>
          </table:table-cell>
          <table:table-cell office:value-type="string" table:style-name="ce15">
            <text:p>SU003576</text:p>
          </table:table-cell>
          <table:table-cell office:value-type="string" table:style-name="ce15">
            <text:p>P004489</text:p>
          </table:table-cell>
          <table:table-cell office:value-type="float" office:value="4301135550" table:style-name="ce15">
            <text:p>4301135550</text:p>
          </table:table-cell>
          <table:table-cell office:value-type="float" office:value="4607111034199" table:style-name="ce15">
            <text:p>4607111034199</text:p>
          </table:table-cell>
          <table:table-cell office:value-type="string" table:style-name="ce16">
            <text:p>Снеки «Хотстеры» Фикс.вес 0,25 Пакет ТМ «Горячая штуч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54" table:formula="of:=MROUND([.F45];[.O45]*[.P45])/[.O45]" table:style-name="ce18">
            <text:p>154</text:p>
          </table:table-cell>
          <table:table-cell office:value-type="float" office:value="1848" table:formula="of:=[.R45]*[.O45]" table:style-name="ce18">
            <text:p>1848</text:p>
          </table:table-cell>
          <table:table-cell table:number-columns-repeated="2" table:style-name="ce1"/>
          <table:table-cell office:value-type="float" office:value="462" table:formula="of:=[.S45]*[.N45]" table:style-name="ce19">
            <text:p>462,00</text:p>
          </table:table-cell>
          <table:table-cell office:value-type="float" office:value="2.2000000000000002" table:formula="of:=[.R45]/[.Q45]" table:style-name="ce19">
            <text:p>2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пели Курочка гриль ТМ Горячая штучка ф/п ф/в 0,3 кг НД МГ</text:p>
          </table:table-cell>
          <table:table-cell office:value-type="string" table:style-name="ce2">
            <text:p>5000 шт</text:p>
          </table:table-cell>
          <table:table-cell office:value-type="float" office:value="1500" table:style-name="ce2">
            <text:p>1500</text:p>
          </table:table-cell>
          <table:table-cell office:value-type="float" office:value="5000" table:formula="of:=VALUE(LEFT([.D46];LEN([.D46])-3))" table:style-name="ce13">
            <text:p>5000</text:p>
          </table:table-cell>
          <table:table-cell office:value-type="float" office:value="1500" table:formula="of:=[.F46]*[.N46]" table:style-name="ce13">
            <text:p>1500</text:p>
          </table:table-cell>
          <table:table-cell office:value-type="float" office:value="0" table:formula="of:=[.G46]-[.E46]" table:style-name="ce14">
            <text:p>0<text:s/></text:p>
          </table:table-cell>
          <table:table-cell office:value-type="string" table:style-name="ce15">
            <text:p>SU002293</text:p>
          </table:table-cell>
          <table:table-cell office:value-type="string" table:style-name="ce15">
            <text:p>P004113</text:p>
          </table:table-cell>
          <table:table-cell office:value-type="float" office:value="4301135285" table:style-name="ce15">
            <text:p>4301135285</text:p>
          </table:table-cell>
          <table:table-cell office:value-type="float" office:value="4607111036407" table:style-name="ce15">
            <text:p>4607111036407</text:p>
          </table:table-cell>
          <table:table-cell office:value-type="string" table:style-name="ce16">
            <text:p>Чебупели Курочка гриль Базовый ассортимент Фикс.вес 0,3 Пакет Горячая штучка</text:p>
          </table:table-cell>
          <table:table-cell office:value-type="float" office:value="0.3" table:style-name="ce17">
            <text:p>0,30</text:p>
          </table:table-cell>
          <table:table-cell office:value-type="float" office:value="14" table:style-name="ce17">
            <text:p>14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364" table:formula="of:=MROUND([.F46];[.O46]*[.P46])/[.O46]" table:style-name="ce18">
            <text:p>364</text:p>
          </table:table-cell>
          <table:table-cell office:value-type="float" office:value="5096" table:formula="of:=[.R46]*[.O46]" table:style-name="ce18">
            <text:p>5096</text:p>
          </table:table-cell>
          <table:table-cell table:number-columns-repeated="2" table:style-name="ce1"/>
          <table:table-cell office:value-type="float" office:value="1528.8" table:formula="of:=[.S46]*[.N46]" table:style-name="ce19">
            <text:p>1528,80</text:p>
          </table:table-cell>
          <table:table-cell office:value-type="float" office:value="5.2" table:formula="of:=[.R46]/[.Q46]" table:style-name="ce19">
            <text:p>5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пицца курочка по-итальянски ТМ Горячая штучка ТС Чебупицца ф/п ф/в 0,25 кг НД ПГП2 МГ</text:p>
          </table:table-cell>
          <table:table-cell office:value-type="string" table:style-name="ce2">
            <text:p>3200 шт</text:p>
          </table:table-cell>
          <table:table-cell office:value-type="float" office:value="800" table:style-name="ce2">
            <text:p>800</text:p>
          </table:table-cell>
          <table:table-cell office:value-type="float" office:value="3200" table:formula="of:=VALUE(LEFT([.D47];LEN([.D47])-3))" table:style-name="ce13">
            <text:p>3200</text:p>
          </table:table-cell>
          <table:table-cell office:value-type="float" office:value="800" table:formula="of:=[.F47]*[.N47]" table:style-name="ce13">
            <text:p>800</text:p>
          </table:table-cell>
          <table:table-cell office:value-type="float" office:value="0" table:formula="of:=[.G47]-[.E47]" table:style-name="ce14">
            <text:p>0<text:s/></text:p>
          </table:table-cell>
          <table:table-cell office:value-type="string" table:style-name="ce15">
            <text:p>SU003578</text:p>
          </table:table-cell>
          <table:table-cell office:value-type="string" table:style-name="ce15">
            <text:p>P004484</text:p>
          </table:table-cell>
          <table:table-cell office:value-type="float" office:value="4301135555" table:style-name="ce15">
            <text:p>4301135555</text:p>
          </table:table-cell>
          <table:table-cell office:value-type="float" office:value="4607111034014" table:style-name="ce15">
            <text:p>4607111034014</text:p>
          </table:table-cell>
          <table:table-cell office:value-type="string" table:style-name="ce16">
            <text:p>Снеки «Чебупицца курочка По-итальянски» Фикс.вес 0,25 Пакет ТМ «Горячая штуч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66" table:formula="of:=MROUND([.F47];[.O47]*[.P47])/[.O47]" table:style-name="ce18">
            <text:p>266</text:p>
          </table:table-cell>
          <table:table-cell office:value-type="float" office:value="3192" table:formula="of:=[.R47]*[.O47]" table:style-name="ce18">
            <text:p>3192</text:p>
          </table:table-cell>
          <table:table-cell table:number-columns-repeated="2" table:style-name="ce1"/>
          <table:table-cell office:value-type="float" office:value="798" table:formula="of:=[.S47]*[.N47]" table:style-name="ce19">
            <text:p>798,00</text:p>
          </table:table-cell>
          <table:table-cell office:value-type="float" office:value="3.8" table:formula="of:=[.R47]/[.Q47]" table:style-name="ce19">
            <text:p>3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пицца Пепперони ТМ Горячая штучка ТС Чебупицца ф/п ф/в 0,25 кг НД МГ</text:p>
          </table:table-cell>
          <table:table-cell office:value-type="string" table:style-name="ce2">
            <text:p>3600 <text:s/>шт</text:p>
          </table:table-cell>
          <table:table-cell office:value-type="float" office:value="900" table:style-name="ce2">
            <text:p>900</text:p>
          </table:table-cell>
          <table:table-cell office:value-type="float" office:value="3600" table:formula="of:=VALUE(LEFT([.D48];LEN([.D48])-3))" table:style-name="ce13">
            <text:p>3600</text:p>
          </table:table-cell>
          <table:table-cell office:value-type="float" office:value="900" table:formula="of:=[.F48]*[.N48]" table:style-name="ce13">
            <text:p>900</text:p>
          </table:table-cell>
          <table:table-cell office:value-type="float" office:value="0" table:formula="of:=[.G48]-[.E48]" table:style-name="ce14">
            <text:p>0<text:s/></text:p>
          </table:table-cell>
          <table:table-cell office:value-type="string" table:style-name="ce15">
            <text:p>SU003580</text:p>
          </table:table-cell>
          <table:table-cell office:value-type="string" table:style-name="ce15">
            <text:p>P004486</text:p>
          </table:table-cell>
          <table:table-cell office:value-type="float" office:value="4301135532" table:style-name="ce15">
            <text:p>4301135532</text:p>
          </table:table-cell>
          <table:table-cell office:value-type="float" office:value="4607111033994" table:style-name="ce15">
            <text:p>4607111033994</text:p>
          </table:table-cell>
          <table:table-cell office:value-type="string" table:style-name="ce16">
            <text:p>Снеки «Чебупицца Пепперони» Фикс.вес 0,25 Пакет ТМ «Горячая штучка»</text:p>
          </table:table-cell>
          <table:table-cell office:value-type="float" office:value="0.25" table:style-name="ce17">
            <text:p>0,25</text:p>
          </table:table-cell>
          <table:table-cell office:value-type="float" office:value="12" table:style-name="ce17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94" table:formula="of:=MROUND([.F48];[.O48]*[.P48])/[.O48]" table:style-name="ce18">
            <text:p>294</text:p>
          </table:table-cell>
          <table:table-cell office:value-type="float" office:value="3528" table:formula="of:=[.R48]*[.O48]" table:style-name="ce18">
            <text:p>3528</text:p>
          </table:table-cell>
          <table:table-cell table:number-columns-repeated="2" table:style-name="ce1"/>
          <table:table-cell office:value-type="float" office:value="882" table:formula="of:=[.S48]*[.N48]" table:style-name="ce19">
            <text:p>882,00</text:p>
          </table:table-cell>
          <table:table-cell office:value-type="float" office:value="4.2" table:formula="of:=[.R48]/[.Q48]" table:style-name="ce19">
            <text:p>4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реки с мясом ТМ Горячая штучка ф/п шт 0,09 кг НД3 ПГП2 МГ</text:p>
          </table:table-cell>
          <table:table-cell office:value-type="string" table:style-name="ce2">
            <text:p>450 шт</text:p>
          </table:table-cell>
          <table:table-cell office:value-type="float" office:value="40.5" table:style-name="ce2">
            <text:p>40,5</text:p>
          </table:table-cell>
          <table:table-cell office:value-type="float" office:value="450" table:formula="of:=VALUE(LEFT([.D49];LEN([.D49])-3))" table:style-name="ce13">
            <text:p>450</text:p>
          </table:table-cell>
          <table:table-cell office:value-type="float" office:value="40.5" table:formula="of:=[.F49]*[.N49]" table:style-name="ce13">
            <text:p>40,5</text:p>
          </table:table-cell>
          <table:table-cell office:value-type="float" office:value="0" table:formula="of:=[.G49]-[.E49]" table:style-name="ce14">
            <text:p>0<text:s/></text:p>
          </table:table-cell>
          <table:table-cell office:value-type="string" table:style-name="ce15">
            <text:p>SU002573</text:p>
          </table:table-cell>
          <table:table-cell office:value-type="string" table:style-name="ce15">
            <text:p>P004138</text:p>
          </table:table-cell>
          <table:table-cell office:value-type="float" office:value="4301136070" table:style-name="ce15">
            <text:p>4301136070</text:p>
          </table:table-cell>
          <table:table-cell office:value-type="float" office:value="4607025784012" table:style-name="ce15">
            <text:p>4607025784012</text:p>
          </table:table-cell>
          <table:table-cell office:value-type="string" table:style-name="ce16">
            <text:p>Чебуреки с мясом Базовый ассортимент Штучка 0,09 Пленка Горячая штучка</text:p>
          </table:table-cell>
          <table:table-cell office:value-type="float" office:value="0.09" table:style-name="ce17">
            <text:p>0,09</text:p>
          </table:table-cell>
          <table:table-cell office:value-type="float" office:value="24" table:style-name="ce17">
            <text:p>24,0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14" table:formula="of:=MROUND([.F49];[.O49]*[.P49])/[.O49]" table:style-name="ce18">
            <text:p>14</text:p>
          </table:table-cell>
          <table:table-cell office:value-type="float" office:value="336" table:formula="of:=[.R49]*[.O49]" table:style-name="ce18">
            <text:p>336</text:p>
          </table:table-cell>
          <table:table-cell table:number-columns-repeated="2" table:style-name="ce1"/>
          <table:table-cell office:value-type="float" office:value="30.24" table:formula="of:=[.S49]*[.N49]" table:style-name="ce19">
            <text:p>30,24</text:p>
          </table:table-cell>
          <table:table-cell office:value-type="float" office:value="0.1111111111111111" table:formula="of:=[.R49]/[.Q49]" table:style-name="ce19">
            <text:p>0,11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реки со свининой и говядиной ТМ Горячая штучка ф/п ф/в 0,36 кг НД4 ПГП2 МГ</text:p>
          </table:table-cell>
          <table:table-cell office:value-type="string" table:style-name="ce2">
            <text:p>180 шт</text:p>
          </table:table-cell>
          <table:table-cell office:value-type="float" office:value="64.8" table:style-name="ce2">
            <text:p>64,8</text:p>
          </table:table-cell>
          <table:table-cell office:value-type="float" office:value="180" table:formula="of:=VALUE(LEFT([.D50];LEN([.D50])-3))" table:style-name="ce13">
            <text:p>180</text:p>
          </table:table-cell>
          <table:table-cell office:value-type="float" office:value="64.8" table:formula="of:=[.F50]*[.N50]" table:style-name="ce13">
            <text:p>64,8</text:p>
          </table:table-cell>
          <table:table-cell office:value-type="float" office:value="0" table:formula="of:=[.G50]-[.E50]" table:style-name="ce14">
            <text:p>0<text:s/></text:p>
          </table:table-cell>
          <table:table-cell office:value-type="string" table:style-name="ce15">
            <text:p>SU003613</text:p>
          </table:table-cell>
          <table:table-cell office:value-type="string" table:style-name="ce15">
            <text:p>P004583</text:p>
          </table:table-cell>
          <table:table-cell office:value-type="float" office:value="4301136079" table:style-name="ce15">
            <text:p>4301136079</text:p>
          </table:table-cell>
          <table:table-cell office:value-type="float" office:value="4607025784319" table:style-name="ce15">
            <text:p>4607025784319</text:p>
          </table:table-cell>
          <table:table-cell office:value-type="string" table:style-name="ce16">
            <text:p>Чебуреки «Чебуреки со свининой и говядиной» Фикс.вес 0,36 Пакет ТМ «Горячая штучка»</text:p>
          </table:table-cell>
          <table:table-cell office:value-type="float" office:value="0.36" table:style-name="ce17">
            <text:p>0,36</text:p>
          </table:table-cell>
          <table:table-cell office:value-type="float" office:value="10" table:style-name="ce17">
            <text:p>10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5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F50];[.O50]*[.P50])/[.O50]" table:style-name="ce18">
            <text:p>14</text:p>
          </table:table-cell>
          <table:table-cell office:value-type="float" office:value="140" table:formula="of:=[.R50]*[.O50]" table:style-name="ce18">
            <text:p>140</text:p>
          </table:table-cell>
          <table:table-cell table:number-columns-repeated="2" table:style-name="ce1"/>
          <table:table-cell office:value-type="float" office:value="50.4" table:formula="of:=[.S50]*[.N50]" table:style-name="ce19">
            <text:p>50,40</text:p>
          </table:table-cell>
          <table:table-cell office:value-type="float" office:value="0.2" table:formula="of:=[.R50]/[.Q50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Сочный мегачебурек ТМ Зареченские ТС Зареченские продукты вес 2,24 кг ПГП2 МГ</text:p>
          </table:table-cell>
          <table:table-cell office:value-type="string" table:style-name="ce2">
            <text:p>67,2 кг</text:p>
          </table:table-cell>
          <table:table-cell office:value-type="float" office:value="67.2" table:style-name="ce2">
            <text:p>67,2</text:p>
          </table:table-cell>
          <table:table-cell office:value-type="float" office:value="67.2" table:formula="of:=VALUE(LEFT([.D51];LEN([.D51])-3))" table:style-name="ce13">
            <text:p>67,2</text:p>
          </table:table-cell>
          <table:table-cell office:value-type="float" office:value="67.2" table:formula="of:=[.F51]*[.N51]" table:style-name="ce13">
            <text:p>67,2</text:p>
          </table:table-cell>
          <table:table-cell office:value-type="float" office:value="0" table:formula="of:=[.G51]-[.E51]" table:style-name="ce14">
            <text:p>0<text:s/></text:p>
          </table:table-cell>
          <table:table-cell office:value-type="string" table:style-name="ce15">
            <text:p>SU003025</text:p>
          </table:table-cell>
          <table:table-cell office:value-type="string" table:style-name="ce15">
            <text:p>P003495</text:p>
          </table:table-cell>
          <table:table-cell office:value-type="float" office:value="4301136052" table:style-name="ce15">
            <text:p>4301136052</text:p>
          </table:table-cell>
          <table:table-cell office:value-type="float" office:value="4640242180410" table:style-name="ce15">
            <text:p>4640242180410</text:p>
          </table:table-cell>
          <table:table-cell office:value-type="string" table:style-name="ce16">
            <text:p>Чебуреки «Сочный мегачебурек» Весовой ТМ «Зареченские» 2,24 кг</text:p>
          </table:table-cell>
          <table:table-cell office:value-type="float" office:value="1" table:style-name="ce17">
            <text:p>1,00</text:p>
          </table:table-cell>
          <table:table-cell office:value-type="float" office:value="2.2400000000000002" table:style-name="ce17">
            <text:p>2,24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5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28" table:formula="of:=MROUND([.F51];[.O51]*[.P51])/[.O51]" table:style-name="ce18">
            <text:p>28</text:p>
          </table:table-cell>
          <table:table-cell office:value-type="float" office:value="62.720000000000006" table:formula="of:=[.R51]*[.O51]" table:style-name="ce18">
            <text:p>62,72</text:p>
          </table:table-cell>
          <table:table-cell table:number-columns-repeated="2" table:style-name="ce1"/>
          <table:table-cell office:value-type="float" office:value="62.720000000000006" table:formula="of:=[.S51]*[.N51]" table:style-name="ce19">
            <text:p>62,72</text:p>
          </table:table-cell>
          <table:table-cell office:value-type="float" office:value="0.22222222222222221" table:formula="of:=[.R51]/[.Q51]" table:style-name="ce19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реки Мясные ТМ Зареченские ТС Зареченские продукты вес 2,7 кг ПГП2 МГ</text:p>
          </table:table-cell>
          <table:table-cell office:value-type="string" table:style-name="ce2">
            <text:p>97,2 кг</text:p>
          </table:table-cell>
          <table:table-cell office:value-type="float" office:value="97.2" table:style-name="ce2">
            <text:p>97,2</text:p>
          </table:table-cell>
          <table:table-cell office:value-type="float" office:value="97.2" table:formula="of:=VALUE(LEFT([.D52];LEN([.D52])-3))" table:style-name="ce13">
            <text:p>97,2</text:p>
          </table:table-cell>
          <table:table-cell office:value-type="float" office:value="97.2" table:formula="of:=[.F52]*[.N52]" table:style-name="ce13">
            <text:p>97,2</text:p>
          </table:table-cell>
          <table:table-cell office:value-type="float" office:value="0" table:formula="of:=[.G52]-[.E52]" table:style-name="ce14">
            <text:p>0<text:s/></text:p>
          </table:table-cell>
          <table:table-cell office:value-type="string" table:style-name="ce15">
            <text:p>SU003012</text:p>
          </table:table-cell>
          <table:table-cell office:value-type="string" table:style-name="ce15">
            <text:p>P003478</text:p>
          </table:table-cell>
          <table:table-cell office:value-type="float" office:value="4301136051" table:style-name="ce15">
            <text:p>4301136051</text:p>
          </table:table-cell>
          <table:table-cell office:value-type="float" office:value="4640242180304" table:style-name="ce15">
            <text:p>4640242180304</text:p>
          </table:table-cell>
          <table:table-cell office:value-type="string" table:style-name="ce16">
            <text:p>Чебуреки «Мясные» Весовые ТМ «Зареченские» 2,7 кг</text:p>
          </table:table-cell>
          <table:table-cell office:value-type="float" office:value="1" table:style-name="ce17">
            <text:p>1,00</text:p>
          </table:table-cell>
          <table:table-cell office:value-type="float" office:value="2.7" table:style-name="ce17">
            <text:p>2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5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42" table:formula="of:=MROUND([.F52];[.O52]*[.P52])/[.O52]" table:style-name="ce18">
            <text:p>42</text:p>
          </table:table-cell>
          <table:table-cell office:value-type="float" office:value="113.4" table:formula="of:=[.R52]*[.O52]" table:style-name="ce18">
            <text:p>113,4</text:p>
          </table:table-cell>
          <table:table-cell table:number-columns-repeated="2" table:style-name="ce1"/>
          <table:table-cell office:value-type="float" office:value="113.4" table:formula="of:=[.S52]*[.N52]" table:style-name="ce19">
            <text:p>113,40</text:p>
          </table:table-cell>
          <table:table-cell office:value-type="float" office:value="0.33333333333333331" table:formula="of:=[.R52]/[.Q52]" table:style-name="ce19">
            <text:p>0,33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реки Сочные ТМ Зареченские ТС Зареченские продукты вес 5 кг ПГП2 МГ</text:p>
          </table:table-cell>
          <table:table-cell office:value-type="string" table:style-name="ce2">
            <text:p>180 <text:s/>кг</text:p>
          </table:table-cell>
          <table:table-cell office:value-type="float" office:value="180" table:style-name="ce2">
            <text:p>180</text:p>
          </table:table-cell>
          <table:table-cell office:value-type="float" office:value="180" table:formula="of:=VALUE(LEFT([.D53];LEN([.D53])-3))" table:style-name="ce13">
            <text:p>180</text:p>
          </table:table-cell>
          <table:table-cell office:value-type="float" office:value="180" table:formula="of:=[.F53]*[.N53]" table:style-name="ce13">
            <text:p>180</text:p>
          </table:table-cell>
          <table:table-cell office:value-type="float" office:value="0" table:formula="of:=[.G53]-[.E53]" table:style-name="ce14">
            <text:p>0<text:s/></text:p>
          </table:table-cell>
          <table:table-cell office:value-type="string" table:style-name="ce15">
            <text:p>SU003010</text:p>
          </table:table-cell>
          <table:table-cell office:value-type="string" table:style-name="ce15">
            <text:p>P003476</text:p>
          </table:table-cell>
          <table:table-cell office:value-type="float" office:value="4301136053" table:style-name="ce15">
            <text:p>4301136053</text:p>
          </table:table-cell>
          <table:table-cell office:value-type="float" office:value="4640242180236" table:style-name="ce15">
            <text:p>4640242180236</text:p>
          </table:table-cell>
          <table:table-cell office:value-type="string" table:style-name="ce16">
            <text:p>Чебуреки «Сочные» Весовые ТМ «Зареченские» 5 кг</text:p>
          </table:table-cell>
          <table:table-cell office:value-type="float" office:value="1" table:style-name="ce17">
            <text:p>1,00</text:p>
          </table:table-cell>
          <table:table-cell office:value-type="float" office:value="5" table:style-name="ce17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5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F53];[.O53]*[.P53])/[.O53]" table:style-name="ce18">
            <text:p>36</text:p>
          </table:table-cell>
          <table:table-cell office:value-type="float" office:value="180" table:formula="of:=[.R53]*[.O53]" table:style-name="ce18">
            <text:p>180</text:p>
          </table:table-cell>
          <table:table-cell table:number-columns-repeated="2" table:style-name="ce1"/>
          <table:table-cell office:value-type="float" office:value="180" table:formula="of:=[.S53]*[.N53]" table:style-name="ce19">
            <text:p>180,00</text:p>
          </table:table-cell>
          <table:table-cell office:value-type="float" office:value="0.42857142857142855" table:formula="of:=[.R53]/[.Q53]" table:style-name="ce19">
            <text:p>0,43</text:p>
          </table:table-cell>
          <table:table-cell table:number-columns-repeated="16361"/>
        </table:table-row>
        <table:table-row table:style-name="ro4">
          <table:table-cell table:number-columns-repeated="2" table:style-name="ce1"/>
          <table:table-cell office:value-type="string" table:style-name="ce12">
            <text:p>итого в кг</text:p>
          </table:table-cell>
          <table:table-cell table:style-name="ce2"/>
          <table:table-cell office:value-type="float" office:value="12484.5" table:formula="of:=SUM([.E2:.E53])" table:style-name="ce2">
            <text:p>12484,5</text:p>
          </table:table-cell>
          <table:table-cell table:style-name="ce13"/>
          <table:table-cell office:value-type="float" office:value="11944.5" table:formula="of:=SUM([.G2:.G53])" table:style-name="ce13">
            <text:p>11944,5</text:p>
          </table:table-cell>
          <table:table-cell table:style-name="ce14"/>
          <table:table-cell table:number-columns-repeated="4" table:style-name="ce15"/>
          <table:table-cell table:style-name="ce16"/>
          <table:table-cell table:number-columns-repeated="2" table:style-name="ce17"/>
          <table:table-cell table:number-columns-repeated="2" table:style-name="ce15"/>
          <table:table-cell table:number-columns-repeated="2" table:style-name="ce18"/>
          <table:table-cell table:number-columns-repeated="2" table:style-name="ce1"/>
          <table:table-cell office:value-type="float" office:value="12115.519999999997" table:formula="of:=SUM([.V2:.V53])" table:style-name="ce23">
            <text:p>12115,52</text:p>
          </table:table-cell>
          <table:table-cell office:value-type="float" office:value="41.737973137973142" table:formula="of:=SUM([.W2:.W53])" table:style-name="ce23">
            <text:p>41,74</text:p>
          </table:table-cell>
          <table:table-cell table:number-columns-repeated="16361"/>
        </table:table-row>
        <table:table-row table:number-rows-repeated="1048522" table:style-name="ro4">
          <table:table-cell table:number-columns-repeated="16384"/>
        </table:table-row>
      </table:table>
      <table:table table:name="Лист2" table:style-name="ta2">
        <table:table-column table:style-name="co15" table:default-cell-style-name="ce1"/>
        <table:table-column table:style-name="co6" table:number-columns-repeated="1023" table:default-cell-style-name="ce1"/>
        <table:table-column table:style-name="co14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2">
        <table:table-column table:style-name="co15" table:default-cell-style-name="ce1"/>
        <table:table-column table:style-name="co6" table:number-columns-repeated="1023" table:default-cell-style-name="ce1"/>
        <table:table-column table:style-name="co14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'file:///C:/WORK/ПОКОМ_Останкино/2025_05/РАБОЧИЙ%20СТОЛ/16,01,26%20ПОКОМ%20ЗПФ%20Коныгин/Бланк%20ЗПФ%20%20клиент%20ООО%20ЛП%20на%20отгрузку%20с%2015.01.2026%20(Сочи).xlsx'#Бланк_заказа" table:style-name="ta3">
        <table:table-source xlink:href="file:///C:/WORK/ПОКОМ_Останкино/2025_05/РАБОЧИЙ%20СТОЛ/16,01,26%20ПОКОМ%20ЗПФ%20Коныгин/Бланк%20ЗПФ%20%20клиент%20ООО%20ЛП%20на%20отгрузку%20с%2015.01.2026%20(Сочи).xlsx" table:table-name="Бланк_заказа" table:mode="copy-results-only"/>
        <table:table-column/>
        <table:table-row>
          <table:table-cell table:number-columns-repeated="3"/>
          <table:table-cell office:value-type="string" office:string-value="  БЛАНК ЗАКАЗА "/>
          <table:table-cell table:number-columns-repeated="2"/>
          <table:table-cell office:value-type="string" office:string-value="ЗПФ"/>
          <table:table-cell office:value-type="string" office:string-value="на отгрузку продукции с ООО Трейд-Сервис с"/>
          <table:table-cell table:number-columns-repeated="9"/>
          <table:table-cell office:value-type="string" office:string-value="15.01.2026"/>
          <table:table-cell table:number-columns-repeated="16366"/>
        </table:table-row>
        <table:table-row>
          <table:table-cell office:value-type="string" office:string-value="бланк создан"/>
          <table:table-cell office:value-type="string" office:string-value="12.01.2026"/>
          <table:table-cell table:number-columns-repeated="13"/>
          <table:table-cell office:value-type="string" office:string-value=""/>
          <table:table-cell table:number-columns-repeated="16368"/>
        </table:table-row>
        <table:table-row>
          <table:table-cell/>
          <table:table-cell office:value-type="string" office:string-value="-поле, обязательное к заполнению"/>
          <table:table-cell table:number-columns-repeated="3"/>
          <table:table-cell office:value-type="string" office:string-value="-поля, не обязательные к заполнению"/>
          <table:table-cell table:number-columns-repeated="16378"/>
        </table:table-row>
        <table:table-row>
          <table:table-cell table:number-columns-repeated="16384"/>
        </table:table-row>
        <table:table-row>
          <table:table-cell office:value-type="string" office:string-value="Ваш контактный телефон и имя: "/>
          <table:table-cell table:number-columns-repeated="4"/>
          <table:table-cell office:value-type="string" office:string-value="Комментарий к заказу:"/>
          <table:table-cell table:number-columns-repeated="9"/>
          <table:table-cell office:value-type="string" office:string-value="Дата загрузки"/>
          <table:table-cell office:value-type="float" office:value="46041"/>
          <table:table-cell table:number-columns-repeated="2"/>
          <table:table-cell office:value-type="string" office:string-value="Способ доставки (доставка/самовывоз)"/>
          <table:table-cell/>
          <table:table-cell office:value-type="string" office:string-value="Самовывоз"/>
          <table:table-cell table:number-columns-repeated="16362"/>
        </table:table-row>
        <table:table-row>
          <table:table-cell office:value-type="string" office:string-value="Адрес доставки:"/>
          <table:table-cell table:number-columns-repeated="2"/>
          <table:table-cell office:value-type="string" office:string-value="ЛП, ООО, Краснодарский край, Сочи г, Строительный пер, д. 10А,"/>
          <table:table-cell table:number-columns-repeated="11"/>
          <table:table-cell office:value-type="string" office:string-value="День недели"/>
          <table:table-cell office:value-type="string" office:string-value="Понедельник"/>
          <table:table-cell table:number-columns-repeated="2"/>
          <table:table-cell office:value-type="string" office:string-value="Наименование клиента"/>
          <table:table-cell/>
          <table:table-cell office:value-type="string" office:string-value="ОБЩЕСТВО С ОГРАНИЧЕННОЙ ОТВЕТСТВЕННОСТЬЮ &quot;ЛОГИСТИЧЕСКИЙ ПАРТНЕР&quot;"/>
          <table:table-cell table:number-columns-repeated="16362"/>
        </table:table-row>
        <table:table-row>
          <table:table-cell table:number-columns-repeated="3"/>
          <table:table-cell office:value-type="string" office:string-value="1"/>
          <table:table-cell table:number-columns-repeated="16380"/>
        </table:table-row>
        <table:table-row>
          <table:table-cell office:value-type="string" office:string-value="Адрес сдачи груза:"/>
          <table:table-cell table:number-columns-repeated="2"/>
          <table:table-cell office:value-type="string" office:string-value="354068Российская Федерация, Краснодарский край, Сочи г, Строительный пер, д. 10А,"/>
          <table:table-cell table:number-columns-repeated="11"/>
          <table:table-cell office:value-type="string" office:string-value="Время загрузки"/>
          <table:table-cell office:value-type="float" office:value="0.375"/>
          <table:table-cell table:number-columns-repeated="16367"/>
        </table:table-row>
        <table:table-row>
          <table:table-cell office:value-type="string" office:string-value=""/>
          <table:table-cell table:number-columns-repeated="2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"/>
          <table:table-cell table:number-columns-repeated="5"/>
          <table:table-cell office:value-type="string" office:string-value="Дата доставки"/>
          <table:table-cell table:number-columns-repeated="16368"/>
        </table:table-row>
        <table:table-row>
          <table:table-cell office:value-type="string" office:string-value=""/>
          <table:table-cell table:number-columns-repeated="4"/>
          <table:table-cell office:value-type="string" office:string-value=""/>
          <table:table-cell/>
          <table:table-cell office:value-type="string" office:string-value=""/>
          <table:table-cell table:number-columns-repeated="7"/>
          <table:table-cell office:value-type="string" office:string-value="Время доставки"/>
          <table:table-cell table:number-columns-repeated="4"/>
          <table:table-cell office:value-type="string" office:string-value="КОД Аксапты Клиента"/>
          <table:table-cell office:value-type="string" office:string-value="590704"/>
          <table:table-cell table:number-columns-repeated="16362"/>
        </table:table-row>
        <table:table-row>
          <table:table-cell office:value-type="string" office:string-value="Справочная информация:"/>
          <table:table-cell table:number-columns-repeated="14"/>
          <table:table-cell office:value-type="string" office:string-value="Время доставки 2 машины"/>
          <table:table-cell table:number-columns-repeated="4"/>
          <table:table-cell office:value-type="string" office:string-value="Тип заказа"/>
          <table:table-cell office:value-type="string" office:string-value="Основной заказ"/>
          <table:table-cell table:number-columns-repeated="16362"/>
        </table:table-row>
        <table:table-row>
          <table:table-cell office:value-type="string" office:string-value="Телефоны для заказов:8(919)022-63-02 E-mail: Zamorozka@abiproduct.ru, Телефон сотрудников склада: 8-980-75-76-203"/>
          <table:table-cell table:number-columns-repeated="14"/>
          <table:table-cell office:value-type="string" office:string-value="Время доставки 3 машины"/>
          <table:table-cell table:number-columns-repeated="4"/>
          <table:table-cell office:value-type="string" office:string-value=""/>
          <table:table-cell table:number-columns-repeated="16363"/>
        </table:table-row>
        <table:table-row>
          <table:table-cell office:value-type="string" office:string-value="График приема заказов: Заказы принимаются за ДВА дня до отгрузки Пн-Пт: с 9:00 до 14:00, Суб. - Вс. выходной"/>
          <table:table-cell table:number-columns-repeated="14"/>
          <table:table-cell office:value-type="string" office:string-value="Время доставки 4 машины"/>
          <table:table-cell table:number-columns-repeated="16368"/>
        </table:table-row>
        <table:table-row>
          <table:table-cell office:value-type="string" office:string-value="Телефон менеджера по логистике: 8 (919) 012-30-55 - по вопросам доставки продукции"/>
          <table:table-cell table:number-columns-repeated="16383"/>
        </table:table-row>
        <table:table-row>
          <table:table-cell office:value-type="string" office:string-value="Телефон по работе с претензиями/жалобами (WhatSapp): 8 (980) 757-69-93       E-mail: Claims@abiproduct.ru"/>
          <table:table-cell table:number-columns-repeated="14"/>
          <table:table-cell office:value-type="string" office:string-value="Кликните на продукт, чтобы просмотреть изображение"/>
          <table:table-cell table:number-columns-repeated="16368"/>
        </table:table-row>
        <table:table-row>
          <table:table-cell table:number-columns-repeated="16384"/>
        </table:table-row>
        <table:table-row>
          <table:table-cell office:value-type="string" office:string-value="Код единицы продаж"/>
          <table:table-cell office:value-type="string" office:string-value="Код продукта"/>
          <table:table-cell office:value-type="string" office:string-value="Номер варианта"/>
          <table:table-cell office:value-type="string" office:string-value="Штрих-код "/>
          <table:table-cell/>
          <table:table-cell office:value-type="string" office:string-value="Вес нетто штуки, кг"/>
          <table:table-cell office:value-type="string" office:string-value="Кол-во штук в коробе, шт"/>
          <table:table-cell office:value-type="string" office:string-value="Вес нетто короба, кг"/>
          <table:table-cell office:value-type="string" office:string-value="Вес брутто короба, кг"/>
          <table:table-cell office:value-type="string" office:string-value="Кол-во кор. на паллте, шт"/>
          <table:table-cell office:value-type="string" office:string-value="Коробов в слое"/>
          <table:table-cell office:value-type="string" office:string-value="Квант заказа"/>
          <table:table-cell office:value-type="string" office:string-value="Завод"/>
          <table:table-cell office:value-type="string" office:string-value="Внешний код номенклатуры"/>
          <table:table-cell office:value-type="string" office:string-value="Срок годности, сут."/>
          <table:table-cell office:value-type="string" office:string-value="Наименование"/>
          <table:table-cell table:number-columns-repeated="4"/>
          <table:table-cell office:value-type="string" office:string-value="Доступно к отгрузке"/>
          <table:table-cell/>
          <table:table-cell office:value-type="string" office:string-value="Ед. изм."/>
          <table:table-cell office:value-type="string" office:string-value="Заказ"/>
          <table:table-cell office:value-type="string" office:string-value="Заказ с округлением до короба"/>
          <table:table-cell office:value-type="string" office:string-value="Объём заказа, м3"/>
          <table:table-cell table:number-columns-repeated="16358"/>
        </table:table-row>
        <table:table-row>
          <table:table-cell table:number-columns-repeated="20"/>
          <table:table-cell office:value-type="string" office:string-value="начиная с"/>
          <table:table-cell office:value-type="string" office:string-value="до"/>
          <table:table-cell table:number-columns-repeated="16362"/>
        </table:table-row>
        <table:table-row>
          <table:table-cell office:value-type="string" office:string-value="Медвежье ушко"/>
          <table:table-cell table:number-columns-repeated="16383"/>
        </table:table-row>
        <table:table-row>
          <table:table-cell office:value-type="string" office:string-value="Медвежье ушко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974"/>
          <table:table-cell office:value-type="string" office:string-value="P005106"/>
          <table:table-cell office:value-type="float" office:value="4301071108"/>
          <table:table-cell office:value-type="float" office:value="4607111035912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19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 и свининой» 0,43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68"/>
          <table:table-cell office:value-type="string" office:string-value="P005109"/>
          <table:table-cell office:value-type="float" office:value="4301071110"/>
          <table:table-cell office:value-type="float" office:value="4607111035103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19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из свинины и говядины» 0,43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5"/>
          <table:table-cell office:value-type="string" office:string-value="P005107"/>
          <table:table-cell office:value-type="float" office:value="4301071109"/>
          <table:table-cell office:value-type="float" office:value="4607111035929"/>
          <table:table-cell/>
          <table:table-cell office:value-type="float" office:value="0.9"/>
          <table:table-cell office:value-type="float" office:value="8"/>
          <table:table-cell office:value-type="float" office:value="7.2"/>
          <table:table-cell office:value-type="float" office:value="7.4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 и свининой» 0,9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2"/>
          <table:table-cell office:value-type="string" office:string-value="P005104"/>
          <table:table-cell office:value-type="float" office:value="4301071106"/>
          <table:table-cell office:value-type="float" office:value="4607111035882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19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» 0,43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1"/>
          <table:table-cell office:value-type="string" office:string-value="P005103"/>
          <table:table-cell office:value-type="float" office:value="4301071105"/>
          <table:table-cell office:value-type="float" office:value="4607111035110"/>
          <table:table-cell/>
          <table:table-cell office:value-type="float" office:value="0.9"/>
          <table:table-cell office:value-type="float" office:value="8"/>
          <table:table-cell office:value-type="float" office:value="7.2"/>
          <table:table-cell office:value-type="float" office:value="7.4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из говядины» 0,9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3"/>
          <table:table-cell office:value-type="string" office:string-value="P005105"/>
          <table:table-cell office:value-type="float" office:value="4301071107"/>
          <table:table-cell office:value-type="float" office:value="4607111035905"/>
          <table:table-cell/>
          <table:table-cell office:value-type="float" office:value="0.9"/>
          <table:table-cell office:value-type="float" office:value="8"/>
          <table:table-cell office:value-type="float" office:value="7.2"/>
          <table:table-cell office:value-type="float" office:value="7.4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» 0,9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очные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964"/>
          <table:table-cell office:value-type="string" office:string-value="P005097"/>
          <table:table-cell office:value-type="float" office:value="4301071099"/>
          <table:table-cell office:value-type="float" office:value="4607111039019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2060000000000004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Сочные» 0,43 сфера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65"/>
          <table:table-cell office:value-type="string" office:string-value="P005098"/>
          <table:table-cell office:value-type="float" office:value="4301071100"/>
          <table:table-cell office:value-type="float" office:value="4607111038708"/>
          <table:table-cell/>
          <table:table-cell office:value-type="float" office:value="0.8"/>
          <table:table-cell office:value-type="float" office:value="8"/>
          <table:table-cell office:value-type="float" office:value="6.4"/>
          <table:table-cell office:value-type="float" office:value="6.6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Сочные» 0,8 сфера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Горячая штучка"/>
          <table:table-cell table:number-columns-repeated="16383"/>
        </table:table-row>
        <table:table-row>
          <table:table-cell office:value-type="string" office:string-value="Наггетсы ГШ"/>
          <table:table-cell table:number-columns-repeated="16383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598"/>
          <table:table-cell office:value-type="string" office:string-value="P004602"/>
          <table:table-cell office:value-type="float" office:value="4301132190"/>
          <table:table-cell office:value-type="float" office:value="4607111036537"/>
          <table:table-cell/>
          <table:table-cell office:value-type="float" office:value="0.25"/>
          <table:table-cell office:value-type="float" office:value="6"/>
          <table:table-cell office:value-type="float" office:value="1.5"/>
          <table:table-cell office:value-type="float" office:value="1.9218"/>
          <table:table-cell office:value-type="float" office:value="14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Нагетосы Сочная курочка» Фикс.вес 0,25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00"/>
          <table:table-cell office:value-type="string" office:string-value="P004600"/>
          <table:table-cell office:value-type="float" office:value="4301132188"/>
          <table:table-cell office:value-type="float" office:value="4607111036605"/>
          <table:table-cell/>
          <table:table-cell office:value-type="float" office:value="0.25"/>
          <table:table-cell office:value-type="float" office:value="6"/>
          <table:table-cell office:value-type="float" office:value="1.5"/>
          <table:table-cell office:value-type="float" office:value="1.9218"/>
          <table:table-cell office:value-type="float" office:value="14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Нагетосы Сочная курочка со сметаной и зеленью» Фикс.вес 0,25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Grandmeni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826"/>
          <table:table-cell office:value-type="string" office:string-value="P004887"/>
          <table:table-cell office:value-type="float" office:value="4301071090"/>
          <table:table-cell office:value-type="float" office:value="4620207490075"/>
          <table:table-cell/>
          <table:table-cell office:value-type="float" office:value="0.7"/>
          <table:table-cell office:value-type="float" office:value="8"/>
          <table:table-cell office:value-type="float" office:value="5.6"/>
          <table:table-cell office:value-type="float" office:value="5.87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Grandmeni с говядиной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28"/>
          <table:table-cell office:value-type="string" office:string-value="P004889"/>
          <table:table-cell office:value-type="float" office:value="4301071092"/>
          <table:table-cell office:value-type="float" office:value="4620207490174"/>
          <table:table-cell/>
          <table:table-cell office:value-type="float" office:value="0.7"/>
          <table:table-cell office:value-type="float" office:value="8"/>
          <table:table-cell office:value-type="float" office:value="5.6"/>
          <table:table-cell office:value-type="float" office:value="5.8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Grandmeni с говядиной и свининой» Фикс.вес 0,7 классическая форм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27"/>
          <table:table-cell office:value-type="string" office:string-value="P004888"/>
          <table:table-cell office:value-type="float" office:value="4301071091"/>
          <table:table-cell office:value-type="float" office:value="4620207490044"/>
          <table:table-cell/>
          <table:table-cell office:value-type="float" office:value="0.7"/>
          <table:table-cell office:value-type="float" office:value="8"/>
          <table:table-cell office:value-type="float" office:value="5.6"/>
          <table:table-cell office:value-type="float" office:value="5.87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Grandmeni со сливочным маслом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игбули ГШ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532"/>
          <table:table-cell office:value-type="string" office:string-value="P004440"/>
          <table:table-cell office:value-type="float" office:value="4301071044"/>
          <table:table-cell office:value-type="float" office:value="4607111039385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#МЕГАВКУСИЩЕ с сочной грудинкой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85"/>
          <table:table-cell office:value-type="string" office:string-value="P004203"/>
          <table:table-cell office:value-type="float" office:value="4301071031"/>
          <table:table-cell office:value-type="float" office:value="4607111038982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59999999999996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#МЕГАМАСЛИЩЕ со сливочным маслом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30"/>
          <table:table-cell office:value-type="string" office:string-value="P004443"/>
          <table:table-cell office:value-type="float" office:value="4301071046"/>
          <table:table-cell office:value-type="float" office:value="4607111039354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9599999999999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с мясом» 0,4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29"/>
          <table:table-cell office:value-type="string" office:string-value="P004442"/>
          <table:table-cell office:value-type="float" office:value="4301071047"/>
          <table:table-cell office:value-type="float" office:value="4607111039330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с мясом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Foodgital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691"/>
          <table:table-cell office:value-type="string" office:string-value="P004772"/>
          <table:table-cell office:value-type="float" office:value="4301071073"/>
          <table:table-cell office:value-type="float" office:value="4620207490822"/>
          <table:table-cell/>
          <table:table-cell office:value-type="float" office:value="0.43"/>
          <table:table-cell office:value-type="float" office:value="8"/>
          <table:table-cell office:value-type="float" office:value="3.44"/>
          <table:table-cell office:value-type="float" office:value="3.64"/>
          <table:table-cell office:value-type="float" office:value="14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Пельмени «Пельмени» Фикс.вес 0,43 сфера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678"/>
          <table:table-cell office:value-type="string" office:string-value="P004731"/>
          <table:table-cell office:value-type="float" office:value="4301132194"/>
          <table:table-cell office:value-type="float" office:value="4607111039712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Наггетсы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реки"/>
          <table:table-cell table:number-columns-repeated="16383"/>
        </table:table-row>
        <table:table-row>
          <table:table-cell office:value-type="string" office:string-value="SU002657"/>
          <table:table-cell office:value-type="string" office:string-value="P003038"/>
          <table:table-cell office:value-type="float" office:value="4301136018"/>
          <table:table-cell office:value-type="float" office:value="4607111037008"/>
          <table:table-cell/>
          <table:table-cell office:value-type="float" office:value="0.36"/>
          <table:table-cell office:value-type="float" office:value="4"/>
          <table:table-cell office:value-type="float" office:value="1.44"/>
          <table:table-cell office:value-type="float" office:value="1.74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Чебуреки из растительного белка Foodgital фикс.вес 0,36 лоток Горячая штучка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607"/>
          <table:table-cell office:value-type="string" office:string-value="P002938"/>
          <table:table-cell office:value-type="float" office:value="4301136015"/>
          <table:table-cell office:value-type="float" office:value="4607111037398"/>
          <table:table-cell/>
          <table:table-cell office:value-type="float" office:value="0.09"/>
          <table:table-cell office:value-type="float" office:value="24"/>
          <table:table-cell office:value-type="float" office:value="2.16"/>
          <table:table-cell office:value-type="float" office:value="4.0199999999999996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Чебуреки «из растительного белка» штучка 0,09 кг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680"/>
          <table:table-cell office:value-type="string" office:string-value="P004732"/>
          <table:table-cell office:value-type="float" office:value="4301135664"/>
          <table:table-cell office:value-type="float" office:value="4607111039705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Снеки «Чебупели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77"/>
          <table:table-cell office:value-type="string" office:string-value="P004733"/>
          <table:table-cell office:value-type="float" office:value="4301135665"/>
          <table:table-cell office:value-type="float" office:value="4607111039729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Снеки «Чебупицца Маргарита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76"/>
          <table:table-cell office:value-type="string" office:string-value="P004818"/>
          <table:table-cell office:value-type="float" office:value="4301135702"/>
          <table:table-cell office:value-type="float" office:value="4620207490228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Снеки «Чебупицца со вкусом 4 сыра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ульмени вес ГШ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798"/>
          <table:table-cell office:value-type="string" office:string-value="P003687"/>
          <table:table-cell office:value-type="float" office:value="4301070977"/>
          <table:table-cell office:value-type="float" office:value="4607111037411"/>
          <table:table-cell/>
          <table:table-cell office:value-type="float" office:value="2.7"/>
          <table:table-cell office:value-type="float" office:value="1"/>
          <table:table-cell office:value-type="float" office:value="2.7"/>
          <table:table-cell office:value-type="float" office:value="2.8132000000000001"/>
          <table:table-cell office:value-type="float" office:value="234"/>
          <table:table-cell office:value-type="string" office:string-value="18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 Наваристые» Весовые Сфера ТМ «Горячая штучка» 2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595"/>
          <table:table-cell office:value-type="string" office:string-value="P003697"/>
          <table:table-cell office:value-type="float" office:value="4301070981"/>
          <table:table-cell office:value-type="float" office:value="4607111036728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131999999999996"/>
          <table:table-cell office:value-type="float" office:value="14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 Наваристые» Весовые Сфера ТМ «Горячая штучка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ельмеши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93"/>
          <table:table-cell office:value-type="string" office:string-value="P004598"/>
          <table:table-cell office:value-type="float" office:value="4301135574"/>
          <table:table-cell office:value-type="float" office:value="4607111033659"/>
          <table:table-cell/>
          <table:table-cell office:value-type="float" office:value="0.3"/>
          <table:table-cell office:value-type="float" office:value="12"/>
          <table:table-cell office:value-type="float" office:value="3.6"/>
          <table:table-cell office:value-type="float" office:value="4.3036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Бельмеши сочные с мясом» Фикс.вес 0,3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Крылышки ГШ"/>
          <table:table-cell table:number-columns-repeated="16383"/>
        </table:table-row>
        <table:table-row>
          <table:table-cell office:value-type="string" office:string-value="Крылья"/>
          <table:table-cell table:number-columns-repeated="16383"/>
        </table:table-row>
        <table:table-row>
          <table:table-cell office:value-type="string" office:string-value="SU003591"/>
          <table:table-cell office:value-type="string" office:string-value="P004588"/>
          <table:table-cell office:value-type="float" office:value="4301131047"/>
          <table:table-cell office:value-type="float" office:value="4607111034120"/>
          <table:table-cell/>
          <table:table-cell office:value-type="float" office:value="0.3"/>
          <table:table-cell office:value-type="float" office:value="12"/>
          <table:table-cell office:value-type="float" office:value="3.6"/>
          <table:table-cell office:value-type="float" office:value="4.3036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Крылья «Хрустящие крылышки» Фикс.вес 0,3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07"/>
          <table:table-cell office:value-type="string" office:string-value="P004589"/>
          <table:table-cell office:value-type="float" office:value="4301131046"/>
          <table:table-cell office:value-type="float" office:value="4607111034137"/>
          <table:table-cell/>
          <table:table-cell office:value-type="float" office:value="0.3"/>
          <table:table-cell office:value-type="float" office:value="12"/>
          <table:table-cell office:value-type="float" office:value="3.6"/>
          <table:table-cell office:value-type="float" office:value="4.3036000000000003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Крылья «Крылышки острые к пиву» Фикс.вес 0,3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пели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887"/>
          <table:table-cell office:value-type="string" office:string-value="P004969"/>
          <table:table-cell office:value-type="float" office:value="4301135763"/>
          <table:table-cell office:value-type="float" office:value="4620207491027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острые с мяс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89"/>
          <table:table-cell office:value-type="string" office:string-value="P004971"/>
          <table:table-cell office:value-type="float" office:value="4301135793"/>
          <table:table-cell office:value-type="float" office:value="4620207491003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 ветчиной и сыр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92"/>
          <table:table-cell office:value-type="string" office:string-value="P004974"/>
          <table:table-cell office:value-type="float" office:value="4301135768"/>
          <table:table-cell office:value-type="float" office:value="4620207491034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 мяс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84"/>
          <table:table-cell office:value-type="string" office:string-value="P004966"/>
          <table:table-cell office:value-type="float" office:value="4301135760"/>
          <table:table-cell office:value-type="float" office:value="4620207491010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очные с мяс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05"/>
          <table:table-cell office:value-type="string" office:string-value="P004595"/>
          <table:table-cell office:value-type="float" office:value="4301135571"/>
          <table:table-cell office:value-type="float" office:value="4607111035028"/>
          <table:table-cell/>
          <table:table-cell office:value-type="float" office:value="0.48"/>
          <table:table-cell office:value-type="float" office:value="8"/>
          <table:table-cell office:value-type="float" office:value="3.84"/>
          <table:table-cell office:value-type="float" office:value="4.4488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очные с мясом» Фикс.вес 0,48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293"/>
          <table:table-cell office:value-type="string" office:string-value="P004113"/>
          <table:table-cell office:value-type="float" office:value="4301135285"/>
          <table:table-cell office:value-type="float" office:value="4607111036407"/>
          <table:table-cell/>
          <table:table-cell office:value-type="float" office:value="0.3"/>
          <table:table-cell office:value-type="float" office:value="14"/>
          <table:table-cell office:value-type="float" office:value="4.2"/>
          <table:table-cell office:value-type="float" office:value="4.5292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пели Курочка гриль Базовый ассортимент Фикс.вес 0,3 Пакет Горячая штучка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реки ГШ"/>
          <table:table-cell table:number-columns-repeated="16383"/>
        </table:table-row>
        <table:table-row>
          <table:table-cell office:value-type="string" office:string-value="Чебуреки"/>
          <table:table-cell table:number-columns-repeated="16383"/>
        </table:table-row>
        <table:table-row>
          <table:table-cell office:value-type="string" office:string-value="SU002573"/>
          <table:table-cell office:value-type="string" office:string-value="P004138"/>
          <table:table-cell office:value-type="float" office:value="4301136070"/>
          <table:table-cell office:value-type="float" office:value="4607025784012"/>
          <table:table-cell/>
          <table:table-cell office:value-type="float" office:value="0.09"/>
          <table:table-cell office:value-type="float" office:value="24"/>
          <table:table-cell office:value-type="float" office:value="2.16"/>
          <table:table-cell office:value-type="float" office:value="2.4912000000000001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с мясом Базовый ассортимент Штучка 0,09 Пленка Горячая штучка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13"/>
          <table:table-cell office:value-type="string" office:string-value="P004583"/>
          <table:table-cell office:value-type="float" office:value="4301136079"/>
          <table:table-cell office:value-type="float" office:value="4607025784319"/>
          <table:table-cell/>
          <table:table-cell office:value-type="float" office:value="0.36"/>
          <table:table-cell office:value-type="float" office:value="10"/>
          <table:table-cell office:value-type="float" office:value="3.6"/>
          <table:table-cell office:value-type="float" office:value="4.2439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Чебуреки со свининой и говядиной» Фикс.вес 0,36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ульмени ГШ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717"/>
          <table:table-cell office:value-type="string" office:string-value="P004819"/>
          <table:table-cell office:value-type="float" office:value="4301071074"/>
          <table:table-cell office:value-type="float" office:value="4620207491157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мини с мясом и оливковым маслом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4078"/>
          <table:table-cell office:value-type="string" office:string-value="P005209"/>
          <table:table-cell office:value-type="float" office:value="4301071121"/>
          <table:table-cell office:value-type="float" office:value="4620207491393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мини с мясом и сыром» Фикс.вес 0,4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27"/>
          <table:table-cell office:value-type="string" office:string-value="P004474"/>
          <table:table-cell office:value-type="float" office:value="4301071051"/>
          <table:table-cell office:value-type="float" office:value="4607111039262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9599999999999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» 0,4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60"/>
          <table:table-cell office:value-type="string" office:string-value="P004345"/>
          <table:table-cell office:value-type="float" office:value="4301071038"/>
          <table:table-cell office:value-type="float" office:value="4607111039248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863"/>
          <table:table-cell office:value-type="string" office:string-value="P003689"/>
          <table:table-cell office:value-type="float" office:value="4301070979"/>
          <table:table-cell office:value-type="float" office:value="4607111037145"/>
          <table:table-cell/>
          <table:table-cell office:value-type="float" office:value="0.8"/>
          <table:table-cell office:value-type="float" office:value="8"/>
          <table:table-cell office:value-type="float" office:value="6.4"/>
          <table:table-cell office:value-type="float" office:value="6.6748000000000003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» 0,8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28"/>
          <table:table-cell office:value-type="string" office:string-value="P004444"/>
          <table:table-cell office:value-type="float" office:value="4301071049"/>
          <table:table-cell office:value-type="float" office:value="4607111039293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9599999999999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о сливочным маслом» Фикс.вес 0,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59"/>
          <table:table-cell office:value-type="string" office:string-value="P004346"/>
          <table:table-cell office:value-type="float" office:value="4301071039"/>
          <table:table-cell office:value-type="float" office:value="4607111039279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о сливочным маслом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98"/>
          <table:table-cell office:value-type="string" office:string-value="P004825"/>
          <table:table-cell office:value-type="float" office:value="4301071075"/>
          <table:table-cell office:value-type="float" office:value="4620207491102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3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 Северная коллекция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945"/>
          <table:table-cell office:value-type="string" office:string-value="P005065"/>
          <table:table-cell office:value-type="float" office:value="4301135826"/>
          <table:table-cell office:value-type="float" office:value="4620207490983"/>
          <table:table-cell/>
          <table:table-cell office:value-type="float" office:value="0.22"/>
          <table:table-cell office:value-type="float" office:value="12"/>
          <table:table-cell office:value-type="float" office:value="2.64"/>
          <table:table-cell office:value-type="float" office:value="3.3435999999999999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Бульмени хрустящие с мясом» Фикс.вес 0,22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Пельмени ПГП"/>
          <table:table-cell table:number-columns-repeated="16383"/>
        </table:table-row>
        <table:table-row>
          <table:table-cell office:value-type="string" office:string-value="SU003845"/>
          <table:table-cell office:value-type="string" office:string-value="P004909"/>
          <table:table-cell office:value-type="float" office:value="4301071094"/>
          <table:table-cell office:value-type="float" office:value="4620207491140"/>
          <table:table-cell/>
          <table:table-cell office:value-type="float" office:value="0.6"/>
          <table:table-cell office:value-type="float" office:value="10"/>
          <table:table-cell office:value-type="float" office:value="6"/>
          <table:table-cell office:value-type="float" office:value="6.28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ПГП «Пельмени Бульмени Нейробуст с мясом» Фикс.вес 0,6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пицца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78"/>
          <table:table-cell office:value-type="string" office:string-value="P004484"/>
          <table:table-cell office:value-type="float" office:value="4301135555"/>
          <table:table-cell office:value-type="float" office:value="4607111034014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Чебупицца курочка По-итальянски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80"/>
          <table:table-cell office:value-type="string" office:string-value="P004486"/>
          <table:table-cell office:value-type="float" office:value="4301135532"/>
          <table:table-cell office:value-type="float" office:value="4607111033994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Чебупицца Пепперони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Хотстер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944"/>
          <table:table-cell office:value-type="string" office:string-value="P005058"/>
          <table:table-cell office:value-type="float" office:value="4301135824"/>
          <table:table-cell office:value-type="float" office:value="4607111039095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480000000000002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Хотстеры с сыром» Фикс.вес 0,25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76"/>
          <table:table-cell office:value-type="string" office:string-value="P004489"/>
          <table:table-cell office:value-type="float" office:value="4301135550"/>
          <table:table-cell office:value-type="float" office:value="4607111034199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Хотстеры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Круггетс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872"/>
          <table:table-cell office:value-type="string" office:string-value="P004956"/>
          <table:table-cell office:value-type="float" office:value="4301135753"/>
          <table:table-cell office:value-type="float" office:value="4620207490914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2.6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Круггетсы с сырным соусом» Фикс.вес 0,2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70"/>
          <table:table-cell office:value-type="string" office:string-value="P004953"/>
          <table:table-cell office:value-type="float" office:value="4301135778"/>
          <table:table-cell office:value-type="float" office:value="4620207490853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2.6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Круггетсы сочные» Фикс.вес 0,2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Пекерс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96"/>
          <table:table-cell office:value-type="string" office:string-value="P004594"/>
          <table:table-cell office:value-type="float" office:value="4301135570"/>
          <table:table-cell office:value-type="float" office:value="4607111035806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Пекерсы с индейкой в сливочном соусе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Хот-Догстер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632"/>
          <table:table-cell office:value-type="string" office:string-value="P004630"/>
          <table:table-cell office:value-type="float" office:value="4301135607"/>
          <table:table-cell office:value-type="float" office:value="4607111039613"/>
          <table:table-cell/>
          <table:table-cell office:value-type="float" office:value="0.09"/>
          <table:table-cell office:value-type="float" office:value="30"/>
          <table:table-cell office:value-type="float" office:value="2.7"/>
          <table:table-cell office:value-type="float" office:value="3.0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Хот-догстер» Фикс.вес 0,09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упермени"/>
          <table:table-cell table:number-columns-repeated="16383"/>
        </table:table-row>
        <table:table-row>
          <table:table-cell office:value-type="string" office:string-value="Пельмени ПГП"/>
          <table:table-cell table:number-columns-repeated="16383"/>
        </table:table-row>
        <table:table-row>
          <table:table-cell office:value-type="string" office:string-value="SU002177"/>
          <table:table-cell office:value-type="string" office:string-value="P004523"/>
          <table:table-cell office:value-type="float" office:value="4301135540"/>
          <table:table-cell office:value-type="float" office:value="4607111035646"/>
          <table:table-cell/>
          <table:table-cell office:value-type="float" office:value="0.2"/>
          <table:table-cell office:value-type="float" office:value="8"/>
          <table:table-cell office:value-type="float" office:value="1.6"/>
          <table:table-cell office:value-type="float" office:value="2.12"/>
          <table:table-cell office:value-type="float" office:value="72"/>
          <table:table-cell office:value-type="string" office:string-value="6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ПГП «Супермени со сливочным маслом» 0,2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ман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601"/>
          <table:table-cell office:value-type="string" office:string-value="P004597"/>
          <table:table-cell office:value-type="float" office:value="4301135591"/>
          <table:table-cell office:value-type="float" office:value="4607111036568"/>
          <table:table-cell/>
          <table:table-cell office:value-type="float" office:value="0.28000000000000003"/>
          <table:table-cell office:value-type="float" office:value="6"/>
          <table:table-cell office:value-type="float" office:value="1.68"/>
          <table:table-cell office:value-type="float" office:value="2.1017999999999999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Чебуманы с говядиной» Фикс.вес 0,28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No Name"/>
          <table:table-cell table:number-columns-repeated="16383"/>
        </table:table-row>
        <table:table-row>
          <table:table-cell office:value-type="string" office:string-value="No Name ЗПФ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396"/>
          <table:table-cell office:value-type="string" office:string-value="P004620"/>
          <table:table-cell office:value-type="float" office:value="4301071062"/>
          <table:table-cell office:value-type="float" office:value="4607111036384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106000000000003"/>
          <table:table-cell office:value-type="float" office:value="14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Зареченские» Весовые Сфера ТМ «No name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0197"/>
          <table:table-cell office:value-type="string" office:string-value="P004472"/>
          <table:table-cell office:value-type="float" office:value="4301071050"/>
          <table:table-cell office:value-type="float" office:value="4607111036216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131999999999996"/>
          <table:table-cell office:value-type="float" office:value="14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Пуговки с говядиной и свининой» Весовые Сфера ТМ «No Name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Вязанка"/>
          <table:table-cell table:number-columns-repeated="16383"/>
        </table:table-row>
        <table:table-row>
          <table:table-cell office:value-type="string" office:string-value="Сливушка"/>
          <table:table-cell table:number-columns-repeated="16383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797"/>
          <table:table-cell office:value-type="string" office:string-value="P004497"/>
          <table:table-cell office:value-type="float" office:value="4301132179"/>
          <table:table-cell office:value-type="float" office:value="4607111035691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3879999999999999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из печи» Фикс.вес 0,25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00"/>
          <table:table-cell office:value-type="string" office:string-value="P004496"/>
          <table:table-cell office:value-type="float" office:value="4301132182"/>
          <table:table-cell office:value-type="float" office:value="4607111035721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3879999999999999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с индейкой» Фикс.вес 0,25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95"/>
          <table:table-cell office:value-type="string" office:string-value="P004535"/>
          <table:table-cell office:value-type="float" office:value="4301132170"/>
          <table:table-cell office:value-type="float" office:value="4607111038487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360000000000002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с куриным филе и сыром» Фикс.вес 0,25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4023"/>
          <table:table-cell office:value-type="string" office:string-value="P005157"/>
          <table:table-cell office:value-type="float" office:value="4301132243"/>
          <table:table-cell office:value-type="float" office:value="4620207491195"/>
          <table:table-cell/>
          <table:table-cell office:value-type="float" office:value="0.23"/>
          <table:table-cell office:value-type="float" office:value="12"/>
          <table:table-cell office:value-type="float" office:value="2.76"/>
          <table:table-cell office:value-type="float" office:value="3.1480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Сливушки в темпуре» Фикс.вес 0,23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осиски замороженные"/>
          <table:table-cell table:number-columns-repeated="16383"/>
        </table:table-row>
        <table:table-row>
          <table:table-cell office:value-type="string" office:string-value="SU003643"/>
          <table:table-cell office:value-type="string" office:string-value="P004612"/>
          <table:table-cell office:value-type="float" office:value="4301051855"/>
          <table:table-cell office:value-type="float" office:value="4680115885875"/>
          <table:table-cell/>
          <table:table-cell office:value-type="float" office:value="1"/>
          <table:table-cell office:value-type="float" office:value="9"/>
          <table:table-cell office:value-type="float" office:value="9"/>
          <table:table-cell office:value-type="float" office:value="9.41"/>
          <table:table-cell office:value-type="float" office:value="64"/>
          <table:table-cell office:value-type="string" office:string-value="8"/>
          <table:table-cell office:value-type="string" office:string-value="Короб, мин. 1"/>
          <table:table-cell office:value-type="string" office:string-value="СК2"/>
          <table:table-cell/>
          <table:table-cell office:value-type="float" office:value="365"/>
          <table:table-cell office:value-type="string" office:string-value="Сосиски замороженные «Сосиски с сыром» Весовой ТМ «Вязанка» для корн-догов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тародворье"/>
          <table:table-cell table:number-columns-repeated="16383"/>
        </table:table-row>
        <table:table-row>
          <table:table-cell office:value-type="string" office:string-value="Стародворье ПГП"/>
          <table:table-cell table:number-columns-repeated="16383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930"/>
          <table:table-cell office:value-type="string" office:string-value="P005043"/>
          <table:table-cell office:value-type="float" office:value="4301132227"/>
          <table:table-cell office:value-type="float" office:value="4620207491133"/>
          <table:table-cell/>
          <table:table-cell office:value-type="float" office:value="0.23"/>
          <table:table-cell office:value-type="float" office:value="12"/>
          <table:table-cell office:value-type="float" office:value="2.76"/>
          <table:table-cell office:value-type="float" office:value="2.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Хрустящие с сочной курочкой» Фикс.вес 0,23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4012"/>
          <table:table-cell office:value-type="string" office:string-value="P005129"/>
          <table:table-cell office:value-type="float" office:value="4301135834"/>
          <table:table-cell office:value-type="float" office:value="4620207491188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еные вареники с картофелем и беконом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77"/>
          <table:table-cell office:value-type="string" office:string-value="P004822"/>
          <table:table-cell office:value-type="float" office:value="4301135707"/>
          <table:table-cell office:value-type="float" office:value="4620207490198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-ладушки с клубникой и вишней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63"/>
          <table:table-cell office:value-type="string" office:string-value="P005095"/>
          <table:table-cell office:value-type="float" office:value="4301135829"/>
          <table:table-cell office:value-type="float" office:value="4620207490235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-ладушки с мясом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22"/>
          <table:table-cell office:value-type="string" office:string-value="P004812"/>
          <table:table-cell office:value-type="float" office:value="4301135697"/>
          <table:table-cell office:value-type="float" office:value="4620207490259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-ладушки с яблоком и грушей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12"/>
          <table:table-cell office:value-type="string" office:string-value="P004785"/>
          <table:table-cell office:value-type="float" office:value="4301135681"/>
          <table:table-cell office:value-type="float" office:value="4620207490143"/>
          <table:table-cell/>
          <table:table-cell office:value-type="float" office:value="0.22"/>
          <table:table-cell office:value-type="float" office:value="12"/>
          <table:table-cell office:value-type="float" office:value="2.64"/>
          <table:table-cell office:value-type="float" office:value="3.3435999999999999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Куриные биточки в кляре с сырным соусом» Фикс.вес 0,2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тародворские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935"/>
          <table:table-cell office:value-type="string" office:string-value="P005048"/>
          <table:table-cell office:value-type="float" office:value="4301071097"/>
          <table:table-cell office:value-type="float" office:value="4620207491096"/>
          <table:table-cell/>
          <table:table-cell office:value-type="float" office:value="1"/>
          <table:table-cell office:value-type="float" office:value="5"/>
          <table:table-cell office:value-type="float" office:value="5"/>
          <table:table-cell office:value-type="float" office:value="5.23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Мясные с говядиной» Фикс.вес 1 сфера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Добросельские ЭТМ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706"/>
          <table:table-cell office:value-type="string" office:string-value="P004804"/>
          <table:table-cell office:value-type="float" office:value="4301135691"/>
          <table:table-cell office:value-type="float" office:value="4620207490549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еные пельмени с мясом Добросельские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07"/>
          <table:table-cell office:value-type="string" office:string-value="P004805"/>
          <table:table-cell office:value-type="float" office:value="4301135694"/>
          <table:table-cell office:value-type="float" office:value="4620207490501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еные пельмени с мясом и сыром Добросельские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Колбасный стандарт"/>
          <table:table-cell table:number-columns-repeated="16383"/>
        </table:table-row>
        <table:table-row>
          <table:table-cell office:value-type="string" office:string-value="Владимирский Стандарт ЗПФ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267"/>
          <table:table-cell office:value-type="string" office:string-value="P004241"/>
          <table:table-cell office:value-type="float" office:value="4301071036"/>
          <table:table-cell office:value-type="float" office:value="4607111036162"/>
          <table:table-cell/>
          <table:table-cell office:value-type="float" office:value="0.8"/>
          <table:table-cell office:value-type="float" office:value="8"/>
          <table:table-cell office:value-type="float" office:value="6.4"/>
          <table:table-cell office:value-type="float" office:value="6.6811999999999996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90"/>
          <table:table-cell office:value-type="string" office:string-value="Пельмени «Владимирский стандарт с говядиной и свининой» флоу-пак 0,8 Сфера ТМ «Владимирский стандарт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Особый рецепт"/>
          <table:table-cell table:number-columns-repeated="16383"/>
        </table:table-row>
        <table:table-row>
          <table:table-cell office:value-type="string" office:string-value="Любимая ложка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268"/>
          <table:table-cell office:value-type="string" office:string-value="P004081"/>
          <table:table-cell office:value-type="float" office:value="4301071029"/>
          <table:table-cell office:value-type="float" office:value="4607111035899"/>
          <table:table-cell/>
          <table:table-cell office:value-type="float" office:value="1"/>
          <table:table-cell office:value-type="float" office:value="5"/>
          <table:table-cell office:value-type="float" office:value="5"/>
          <table:table-cell office:value-type="float" office:value="5.2619999999999996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Со свининой и говядиной Любимая ложка 1,0 Равиоли Особый рецепт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Владимирский стандарт"/>
          <table:table-cell table:number-columns-repeated="16383"/>
        </table:table-row>
        <table:table-row>
          <table:table-cell office:value-type="string" office:string-value="Владимирский Стандарт ПГП"/>
          <table:table-cell table:number-columns-repeated="16383"/>
        </table:table-row>
        <table:table-row>
          <table:table-cell office:value-type="string" office:string-value="Печеные пельмени"/>
          <table:table-cell table:number-columns-repeated="16383"/>
        </table:table-row>
        <table:table-row>
          <table:table-cell office:value-type="string" office:string-value="SU003457"/>
          <table:table-cell office:value-type="string" office:string-value="P004382"/>
          <table:table-cell office:value-type="float" office:value="4301133004"/>
          <table:table-cell office:value-type="float" office:value="4607111039774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22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ченые пельмени «Владимирский стандарт с сочной курочкой» Фикс.вес 0,25 ТМ «Владимирский стандарт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458"/>
          <table:table-cell office:value-type="string" office:string-value="P004385"/>
          <table:table-cell office:value-type="float" office:value="4301135400"/>
          <table:table-cell office:value-type="float" office:value="4607111039361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пицца Владимирский стандарт с ветчиной и грибами» ф/в 0,25 ТМ «Владимирский стандарт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Зареченские продукты"/>
          <table:table-cell table:number-columns-repeated="16383"/>
        </table:table-row>
        <table:table-row>
          <table:table-cell office:value-type="string" office:string-value="Зареченские продукты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319"/>
          <table:table-cell office:value-type="string" office:string-value="P004053"/>
          <table:table-cell office:value-type="float" office:value="4301071014"/>
          <table:table-cell office:value-type="float" office:value="4640242181264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Домашние» 0,7 сфера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20"/>
          <table:table-cell office:value-type="string" office:string-value="P004060"/>
          <table:table-cell office:value-type="float" office:value="4301071021"/>
          <table:table-cell office:value-type="float" office:value="4640242181325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Домашние со сливочным маслом» 0,7 сфера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020"/>
          <table:table-cell office:value-type="string" office:string-value="P003486"/>
          <table:table-cell office:value-type="float" office:value="4301132080"/>
          <table:table-cell office:value-type="float" office:value="4640242180397"/>
          <table:table-cell/>
          <table:table-cell office:value-type="float" office:value="1"/>
          <table:table-cell office:value-type="float" office:value="6"/>
          <table:table-cell office:value-type="float" office:value="6"/>
          <table:table-cell office:value-type="float" office:value="6.26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Хрустящие» Весовые ТМ «Зареченские» 6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реки"/>
          <table:table-cell table:number-columns-repeated="16383"/>
        </table:table-row>
        <table:table-row>
          <table:table-cell office:value-type="string" office:string-value="SU003012"/>
          <table:table-cell office:value-type="string" office:string-value="P003478"/>
          <table:table-cell office:value-type="float" office:value="4301136051"/>
          <table:table-cell office:value-type="float" office:value="4640242180304"/>
          <table:table-cell/>
          <table:table-cell office:value-type="float" office:value="2.7"/>
          <table:table-cell office:value-type="float" office:value="1"/>
          <table:table-cell office:value-type="float" office:value="2.7"/>
          <table:table-cell office:value-type="float" office:value="2.8906000000000001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Мясные» Весовые ТМ «Зареченские» 2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010"/>
          <table:table-cell office:value-type="string" office:string-value="P003476"/>
          <table:table-cell office:value-type="float" office:value="4301136053"/>
          <table:table-cell office:value-type="float" office:value="4640242180236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35000000000000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Сочные» Весовые ТМ «Зареченские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025"/>
          <table:table-cell office:value-type="string" office:string-value="P003495"/>
          <table:table-cell office:value-type="float" office:value="4301136052"/>
          <table:table-cell office:value-type="float" office:value="4640242180410"/>
          <table:table-cell/>
          <table:table-cell office:value-type="float" office:value="2.2400000000000002"/>
          <table:table-cell office:value-type="float" office:value="1"/>
          <table:table-cell office:value-type="float" office:value="2.2400000000000002"/>
          <table:table-cell office:value-type="float" office:value="2.43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Сочный мегачебурек» Весовой ТМ «Зареченские» 2,24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10"/>
          <table:table-cell office:value-type="string" office:string-value="P004457"/>
          <table:table-cell office:value-type="float" office:value="4301135504"/>
          <table:table-cell office:value-type="float" office:value="4640242181554"/>
          <table:table-cell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3.1920000000000002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пицца с ветчиной и сыром» Весовые ТМ «Зареченские продукты» 3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54"/>
          <table:table-cell office:value-type="string" office:string-value="P004364"/>
          <table:table-cell office:value-type="float" office:value="4301135518"/>
          <table:table-cell office:value-type="float" office:value="4640242181561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сосиски в тесте» Весовые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34"/>
          <table:table-cell office:value-type="string" office:string-value="P004358"/>
          <table:table-cell office:value-type="float" office:value="4301135374"/>
          <table:table-cell office:value-type="float" office:value="4640242181424"/>
          <table:table-cell/>
          <table:table-cell office:value-type="float" office:value="5.5"/>
          <table:table-cell office:value-type="float" office:value="1"/>
          <table:table-cell office:value-type="float" office:value="5.5"/>
          <table:table-cell office:value-type="float" office:value="5.735000000000000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чебуречки с мясом» Весовой ТМ «Зареченские» 5,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48"/>
          <table:table-cell office:value-type="string" office:string-value="P004394"/>
          <table:table-cell office:value-type="float" office:value="4301135405"/>
          <table:table-cell office:value-type="float" office:value="4640242181523"/>
          <table:table-cell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3.1920000000000002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шарики с курочкой и сыром» Весовой ТМ «Зареченские» 3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39"/>
          <table:table-cell office:value-type="string" office:string-value="P004359"/>
          <table:table-cell office:value-type="float" office:value="4301135375"/>
          <table:table-cell office:value-type="float" office:value="4640242181486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«Пирожки с мясом» Весовые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42"/>
          <table:table-cell office:value-type="string" office:string-value="P004391"/>
          <table:table-cell office:value-type="float" office:value="4301135402"/>
          <table:table-cell office:value-type="float" office:value="4640242181493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Пирожки с мясом, картофелем и грибами» Весовые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44"/>
          <table:table-cell office:value-type="string" office:string-value="P004392"/>
          <table:table-cell office:value-type="float" office:value="4301135403"/>
          <table:table-cell office:value-type="float" office:value="4640242181509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Пирожки с яблоком и грушей» Весовой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83"/>
          <table:table-cell office:value-type="string" office:string-value="P004191"/>
          <table:table-cell office:value-type="float" office:value="4301135304"/>
          <table:table-cell office:value-type="float" office:value="4640242181240"/>
          <table:table-cell/>
          <table:table-cell office:value-type="float" office:value="0.3"/>
          <table:table-cell office:value-type="float" office:value="9"/>
          <table:table-cell office:value-type="float" office:value="2.7"/>
          <table:table-cell office:value-type="float" office:value="2.88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пицца с ветчиной и сыром» Фикс.вес 0,3 ф/п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82"/>
          <table:table-cell office:value-type="string" office:string-value="P004195"/>
          <table:table-cell office:value-type="float" office:value="4301135610"/>
          <table:table-cell office:value-type="float" office:value="4640242181318"/>
          <table:table-cell/>
          <table:table-cell office:value-type="float" office:value="0.3"/>
          <table:table-cell office:value-type="float" office:value="9"/>
          <table:table-cell office:value-type="float" office:value="2.7"/>
          <table:table-cell office:value-type="float" office:value="2.988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сосиски в тесте» Фикс.вес 0,3 ф/п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77"/>
          <table:table-cell office:value-type="string" office:string-value="P004193"/>
          <table:table-cell office:value-type="float" office:value="4301135306"/>
          <table:table-cell office:value-type="float" office:value="4640242181387"/>
          <table:table-cell/>
          <table:table-cell office:value-type="float" office:value="0.3"/>
          <table:table-cell office:value-type="float" office:value="9"/>
          <table:table-cell office:value-type="float" office:value="2.7"/>
          <table:table-cell office:value-type="float" office:value="2.8450000000000002"/>
          <table:table-cell office:value-type="float" office:value="234"/>
          <table:table-cell office:value-type="string" office:string-value="18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чебуречки с мясом» Фикс.вес 0,3 ф/п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ИТОГО НЕТТ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ИТОГО БРУТТ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Кол-во паллет"/>
          <table:table-cell table:number-columns-repeated="6"/>
          <table:table-cell office:value-type="string" office:string-value="шт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Вес брутто  с паллетами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Кол-во коробок"/>
          <table:table-cell table:number-columns-repeated="6"/>
          <table:table-cell office:value-type="string" office:string-value="шт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Объем заказа"/>
          <table:table-cell table:number-columns-repeated="6"/>
          <table:table-cell office:value-type="string" office:string-value="м3"/>
          <table:table-cell table:number-columns-repeated="2"/>
          <table:table-cell office:value-type="float" office:value="0"/>
          <table:table-cell table:number-columns-repeated="16358"/>
        </table:table-row>
        <table:table-row>
          <table:table-cell table:number-columns-repeated="16384"/>
        </table:table-row>
        <table:table-row>
          <table:table-cell office:value-type="string" office:string-value="ТОРГОВАЯ МАРКА"/>
          <table:table-cell office:value-type="string" office:string-value="Медвежье ушко"/>
          <table:table-cell office:value-type="string" office:string-value="Медвежье ушко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No Name"/>
          <table:table-cell office:value-type="string" office:string-value="Вязанка"/>
          <table:table-cell office:value-type="string" office:string-value="Стародворье"/>
          <table:table-cell office:value-type="string" office:string-value="Стародворье"/>
          <table:table-cell office:value-type="string" office:string-value="Стародворье"/>
          <table:table-cell table:number-columns-repeated="16358"/>
        </table:table-row>
        <table:table-row>
          <table:table-cell office:value-type="string" office:string-value="СЕРИЯ"/>
          <table:table-cell office:value-type="string" office:string-value="Медвежье ушко"/>
          <table:table-cell office:value-type="string" office:string-value="Сочные"/>
          <table:table-cell office:value-type="string" office:string-value="Наггетсы ГШ"/>
          <table:table-cell office:value-type="string" office:string-value="Grandmeni"/>
          <table:table-cell office:value-type="string" office:string-value="Бигбули ГШ"/>
          <table:table-cell office:value-type="string" office:string-value="Foodgital"/>
          <table:table-cell office:value-type="string" office:string-value="Бульмени вес ГШ"/>
          <table:table-cell office:value-type="string" office:string-value="Бельмеши"/>
          <table:table-cell office:value-type="string" office:string-value="Крылышки ГШ"/>
          <table:table-cell office:value-type="string" office:string-value="Чебупели"/>
          <table:table-cell office:value-type="string" office:string-value="Чебуреки ГШ"/>
          <table:table-cell office:value-type="string" office:string-value="Бульмени ГШ"/>
          <table:table-cell/>
          <table:table-cell office:value-type="string" office:string-value="Чебупицца"/>
          <table:table-cell office:value-type="string" office:string-value="Хотстеры"/>
          <table:table-cell office:value-type="string" office:string-value="Круггетсы"/>
          <table:table-cell office:value-type="string" office:string-value="Пекерсы"/>
          <table:table-cell office:value-type="string" office:string-value="Хот-Догстер"/>
          <table:table-cell office:value-type="string" office:string-value="Супермени"/>
          <table:table-cell office:value-type="string" office:string-value="Чебуманы"/>
          <table:table-cell office:value-type="string" office:string-value="No Name ЗПФ"/>
          <table:table-cell office:value-type="string" office:string-value="Сливушка"/>
          <table:table-cell office:value-type="string" office:string-value="Стародворье ПГП"/>
          <table:table-cell office:value-type="string" office:string-value="Стародворские"/>
          <table:table-cell office:value-type="string" office:string-value="Добросельские ЭТМ"/>
          <table:table-cell table:number-columns-repeated="16358"/>
        </table:table-row>
        <table:table-row>
          <table:table-cell table:number-columns-repeated="16384"/>
        </table:table-row>
        <table:table-row>
          <table:table-cell office:value-type="string" office:string-value="ИТОГО, кг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6384"/>
        </table:table-row>
        <table:table-row>
          <table:table-cell office:value-type="string" office:string-value="ЗПФ, кг"/>
          <table:table-cell office:value-type="string" office:string-value="ПГП, кг "/>
          <table:table-cell office:value-type="string" office:string-value="КИЗ, кг"/>
          <table:table-cell table:number-columns-repeated="16381"/>
        </table:table-row>
        <table:table-row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81"/>
        </table:table-row>
        <table:table-row table:number-rows-repeated="1048297">
          <table:table-cell table:number-columns-repeated="16381"/>
        </table:table-row>
      </table:table>
      <table:table table:name="'file:///C:/WORK/ПОКОМ_Останкино/2025_05/РАБОЧИЙ%20СТОЛ/16,01,26%20ПОКОМ%20ЗПФ%20Коныгин/Бланк%20ЗПФ%20%20клиент%20ООО%20ЛП%20на%20отгрузку%20с%2015.01.2026%20(Сочи).xlsx'#Setting" table:style-name="ta3">
        <table:table-source xlink:href="file:///C:/WORK/ПОКОМ_Останкино/2025_05/РАБОЧИЙ%20СТОЛ/16,01,26%20ПОКОМ%20ЗПФ%20Коныгин/Бланк%20ЗПФ%20%20клиент%20ООО%20ЛП%20на%20отгрузку%20с%2015.01.2026%20(Сочи).xlsx" table:table-name="Setting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Андрей </meta:initial-creator>
    <dc:creator>User</dc:creator>
    <meta:creation-date>2026-01-15T10:23:26Z</meta:creation-date>
    <dc:date>2026-01-16T15:55:31Z</dc:date>
    <meta:editing-cycles>2</meta:editing-cycles>
    <meta:editing-duration>PT4590S</meta:editing-duration>
  </office:meta>
</office:document-meta>
</file>
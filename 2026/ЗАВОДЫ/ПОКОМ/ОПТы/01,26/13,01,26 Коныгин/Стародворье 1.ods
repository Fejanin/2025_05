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6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fo:background-color="#99FFCC"/>
    </style:style>
    <style:style style:name="ce19" style:family="table-cell" style:parent-style-name="Default" style:data-style-name="N38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21" style:family="table-cell" style:parent-style-name="Default" style:data-style-name="N0">
      <style:table-cell-properties fo:border="thin solid #993300" style:vertical-align="top" fo:wrap-option="wrap"/>
    </style:style>
    <style:style style:name="ce2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7.62125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481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2.4pt" style:use-optimal-row-height="false" fo:break-before="auto"/>
    </style:style>
    <style:style style:name="ro4" style:family="table-row">
      <style:table-row-properties style:row-height="16.15pt" style:use-optimal-row-height="false" fo:break-before="auto"/>
    </style:style>
    <style:style style:name="ro5" style:family="table-row">
      <style:table-row-properties style:row-height="11.25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8" table:visibility="collapse"/>
        <table:table-column table:style-name="co3" table:default-cell-style-name="ce20" table:visibility="collapse"/>
        <table:table-column table:style-name="co2" table:default-cell-style-name="ce22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office:value-type="string" table:style-name="ce1">
            <text:p>кооф</text:p>
          </table:table-cell>
          <table:table-cell office:value-type="string" table:style-name="ce1">
            <text:p>ВЕС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2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000" table:formula="of:=[.G2]*[.E2]" table:style-name="ce1">
            <text:p>20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2" table:style-name="ce1"/>
          <table:table-cell office:value-type="float" office:value="0" table:formula="of:=VLOOKUP([.A3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3]*[.E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4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360" table:formula="of:=[.G4]*[.E4]" table:style-name="ce1">
            <text:p>36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5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000" table:formula="of:=[.G5]*[.E5]" table:style-name="ce1">
            <text:p>20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2" table:style-name="ce1"/>
          <table:table-cell office:value-type="float" office:value="0" table:formula="of:=VLOOKUP([.A6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6]*[.E6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7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450" table:formula="of:=[.G7]*[.E7]" table:style-name="ce1">
            <text:p>450</text:p>
          </table:table-cell>
          <table:table-cell table:number-columns-repeated="16376"/>
        </table:table-row>
        <table:table-row table:style-name="ro2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5" table:formula="of:=VLOOKUP([.A8];['file:///C:/WORK/ПОКОМ_Останкино/2025_05/2025/ЗАВОДЫ/ПОКОМ/ОПТы/2025/12,25/31,12,25%20Коныгин/Стародворье%20104.ods'#Лист1.$A:.$G];7;0)" table:style-name="ce1">
            <text:p>0,5</text:p>
          </table:table-cell>
          <table:table-cell office:value-type="float" office:value="90" table:formula="of:=[.G8]*[.E8]" table:style-name="ce1">
            <text:p>9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9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20" table:formula="of:=[.G9]*[.E9]" table:style-name="ce1">
            <text:p>1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10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00" table:formula="of:=[.G10]*[.E10]" table:style-name="ce1">
            <text:p>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11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200" table:formula="of:=[.G11]*[.E11]" table:style-name="ce1">
            <text:p>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12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300" table:formula="of:=[.G12]*[.E12]" table:style-name="ce1">
            <text:p>3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2" table:style-name="ce1"/>
          <table:table-cell office:value-type="float" office:value="0" table:formula="of:=VLOOKUP([.A13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13]*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14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00" table:formula="of:=[.G14]*[.E14]" table:style-name="ce1">
            <text:p>2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2" table:style-name="ce1"/>
          <table:table-cell office:value-type="float" office:value="0" table:formula="of:=VLOOKUP([.A15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15]*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2" table:style-name="ce1"/>
          <table:table-cell office:value-type="float" office:value="0" table:formula="of:=VLOOKUP([.A16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16]*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2" table:style-name="ce1"/>
          <table:table-cell office:value-type="float" office:value="0" table:formula="of:=VLOOKUP([.A17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17]*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2" table:style-name="ce1"/>
          <table:table-cell office:value-type="float" office:value="0" table:formula="of:=VLOOKUP([.A18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18]*[.E1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2" table:style-name="ce1"/>
          <table:table-cell office:value-type="float" office:value="0" table:formula="of:=VLOOKUP([.A19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19]*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2" table:style-name="ce1"/>
          <table:table-cell office:value-type="float" office:value="0" table:formula="of:=VLOOKUP([.A20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20]*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21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50" table:formula="of:=[.G21]*[.E21]" table:style-name="ce1">
            <text:p>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22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00" table:formula="of:=[.G22]*[.E22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table:style-name="ce1"/>
          <table:table-cell office:value-type="string" table:style-name="ce1">
            <text:p>кг</text:p>
          </table:table-cell>
          <table:table-cell office:value-type="float" office:value="1" table:formula="of:=VLOOKUP([.A23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0" table:formula="of:=[.G23]*[.E2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24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0" table:formula="of:=[.G24]*[.E24]" table:style-name="ce1">
            <text:p>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style-name="ce1"/>
          <table:table-cell office:value-type="string" table:style-name="ce1">
            <text:p>кг</text:p>
          </table:table-cell>
          <table:table-cell office:value-type="float" office:value="1" table:formula="of:=VLOOKUP([.A25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0" table:formula="of:=[.G25]*[.E25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26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50" table:formula="of:=[.G26]*[.E26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27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50" table:formula="of:=[.G27]*[.E27]" table:style-name="ce1">
            <text:p>2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2" table:style-name="ce1"/>
          <table:table-cell office:value-type="float" office:value="0" table:formula="of:=VLOOKUP([.A28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28]*[.E2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29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6" table:formula="of:=[.G29]*[.E29]" table:style-name="ce1">
            <text:p>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2" table:style-name="ce1"/>
          <table:table-cell office:value-type="float" office:value="0" table:formula="of:=VLOOKUP([.A30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30]*[.E3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31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00" table:formula="of:=[.G31]*[.E31]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32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80" table:formula="of:=[.G32]*[.E32]" table:style-name="ce1">
            <text:p>8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style-name="ce1"/>
          <table:table-cell office:value-type="string" table:style-name="ce1">
            <text:p>кг</text:p>
          </table:table-cell>
          <table:table-cell office:value-type="float" office:value="1" table:formula="of:=VLOOKUP([.A33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0" table:formula="of:=[.G33]*[.E3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34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0" table:formula="of:=[.G34]*[.E34]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style-name="ce1"/>
          <table:table-cell office:value-type="string" table:style-name="ce1">
            <text:p>кг</text:p>
          </table:table-cell>
          <table:table-cell office:value-type="float" office:value="1" table:formula="of:=VLOOKUP([.A35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0" table:formula="of:=[.G35]*[.E35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36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5" table:formula="of:=[.G36]*[.E36]" table:style-name="ce1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37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20" table:formula="of:=[.G37]*[.E37]" table:style-name="ce1">
            <text:p>1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38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50" table:formula="of:=[.G38]*[.E38]" table:style-name="ce1">
            <text:p>2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2" table:style-name="ce1"/>
          <table:table-cell office:value-type="float" office:value="0" table:formula="of:=VLOOKUP([.A39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39]*[.E3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2" table:style-name="ce1"/>
          <table:table-cell office:value-type="float" office:value="0" table:formula="of:=VLOOKUP([.A40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40]*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41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50" table:formula="of:=[.G41]*[.E41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2" table:style-name="ce1"/>
          <table:table-cell office:value-type="float" office:value="0" table:formula="of:=VLOOKUP([.A42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42]*[.E42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43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50" table:formula="of:=[.G43]*[.E43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44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200" table:formula="of:=[.G44]*[.E44]" table:style-name="ce1">
            <text:p>2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45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00" table:formula="of:=[.G45]*[.E45]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46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00" table:formula="of:=[.G46]*[.E46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2" table:style-name="ce1"/>
          <table:table-cell office:value-type="float" office:value="0" table:formula="of:=VLOOKUP([.A47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47]*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48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300" table:formula="of:=[.G48]*[.E48]" table:style-name="ce1">
            <text:p>3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49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60" table:formula="of:=[.G49]*[.E49]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50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3" table:formula="of:=[.G50]*[.E50]" table:style-name="ce1">
            <text:p>3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2" table:style-name="ce1"/>
          <table:table-cell office:value-type="float" office:value="0" table:formula="of:=VLOOKUP([.A51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51]*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52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80" table:formula="of:=[.G52]*[.E52]" table:style-name="ce1">
            <text:p>8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2" table:style-name="ce1"/>
          <table:table-cell office:value-type="float" office:value="0" table:formula="of:=VLOOKUP([.A53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53]*[.E5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кг</text:p>
          </table:table-cell>
          <table:table-cell office:value-type="float" office:value="0" table:formula="of:=VLOOKUP([.A54];['file:///C:/WORK/ПОКОМ_Останкино/2025_05/2025/ЗАВОДЫ/ПОКОМ/ОПТы/2025/12,25/31,12,25%20Коныгин/Стародворье%20104.ods'#Лист1.$A:.$G];7;0)" table:style-name="ce1">
            <text:p>0</text:p>
          </table:table-cell>
          <table:table-cell office:value-type="float" office:value="0" table:formula="of:=[.G54]*[.E54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сырокопченая Баварская ТМ Стародворье б/о т/п ф/в 0,17 кг АК</text:p>
          </table:table-cell>
          <table:table-cell table:style-name="ce1"/>
          <table:table-cell table:style-name="ce18"/>
          <table:table-cell table:style-name="ce10"/>
          <table:table-cell office:value-type="float" office:value="150" table:style-name="ce1">
            <text:p>150</text:p>
          </table:table-cell>
          <table:table-cell office:value-type="string" table:style-name="ce1">
            <text:p>шт</text:p>
          </table:table-cell>
          <table:table-cell office:value-type="float" office:value="0.17" table:formula="of:=VLOOKUP([.A55];['file:///C:/WORK/ПОКОМ_Останкино/2025_05/2025/ЗАВОДЫ/ПОКОМ/ОПТы/2025/12,25/31,12,25%20Коныгин/Стародворье%20104.ods'#Лист1.$A:.$G];7;0)" table:style-name="ce1">
            <text:p>0,17</text:p>
          </table:table-cell>
          <table:table-cell office:value-type="float" office:value="25.500000000000004" table:formula="of:=[.G55]*[.E55]" table:style-name="ce1">
            <text:p>25,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сырокопченая Швейцарская ТМ Стародворье фиброуз терм/п ф/в 0,17 кг АК</text:p>
          </table:table-cell>
          <table:table-cell table:style-name="ce1"/>
          <table:table-cell table:style-name="ce18"/>
          <table:table-cell table:style-name="ce10"/>
          <table:table-cell office:value-type="float" office:value="45" table:style-name="ce1">
            <text:p>45</text:p>
          </table:table-cell>
          <table:table-cell office:value-type="string" table:style-name="ce1">
            <text:p>шт</text:p>
          </table:table-cell>
          <table:table-cell office:value-type="float" office:value="0.17" table:formula="of:=VLOOKUP([.A56];['file:///C:/WORK/ПОКОМ_Останкино/2025_05/2025/ЗАВОДЫ/ПОКОМ/ОПТы/2025/12,25/31,12,25%20Коныгин/Стародворье%20104.ods'#Лист1.$A:.$G];7;0)" table:style-name="ce1">
            <text:p>0,17</text:p>
          </table:table-cell>
          <table:table-cell office:value-type="float" office:value="7.65" table:formula="of:=[.G56]*[.E56]" table:style-name="ce1">
            <text:p>7,6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Балыковая ТМ Стародворские колбасы ТС Вязанка фиброуз в/у вес НД2 СК1</text:p>
          </table:table-cell>
          <table:table-cell table:style-name="ce1"/>
          <table:table-cell table:style-name="ce18"/>
          <table:table-cell table:style-name="ce10"/>
          <table:table-cell table:style-name="ce1"/>
          <table:table-cell office:value-type="string" table:style-name="ce1">
            <text:p>кг</text:p>
          </table:table-cell>
          <table:table-cell office:value-type="float" office:value="1" table:formula="of:=VLOOKUP([.A57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0" table:formula="of:=[.G57]*[.E5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Кремлевский ТМ Стародворье фиброуз в/у ф/в 0,35 кг срез УВС СК2</text:p>
          </table:table-cell>
          <table:table-cell table:style-name="ce1"/>
          <table:table-cell table:style-name="ce18"/>
          <table:table-cell table:style-name="ce10"/>
          <table:table-cell office:value-type="float" office:value="84" table:style-name="ce1">
            <text:p>84</text:p>
          </table:table-cell>
          <table:table-cell office:value-type="string" table:style-name="ce1">
            <text:p>шт</text:p>
          </table:table-cell>
          <table:table-cell office:value-type="float" office:value="0.35" table:formula="of:=VLOOKUP([.A58];['file:///C:/WORK/ПОКОМ_Останкино/2025_05/2025/ЗАВОДЫ/ПОКОМ/ОПТы/2025/12,25/31,12,25%20Коныгин/Стародворье%20104.ods'#Лист1.$A:.$G];7;0)" table:style-name="ce1">
            <text:p>0,35</text:p>
          </table:table-cell>
          <table:table-cell office:value-type="float" office:value="29.4" table:formula="of:=[.G58]*[.E58]" table:style-name="ce1">
            <text:p>29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очинка по-европейски с сочной грудинкой ТМ Стародворье фиброуз в/у вес СК2</text:p>
          </table:table-cell>
          <table:table-cell table:style-name="ce1"/>
          <table:table-cell table:style-name="ce18"/>
          <table:table-cell table:style-name="ce19"/>
          <table:table-cell office:value-type="float" office:value="20" table:style-name="ce1">
            <text:p>2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59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0" table:formula="of:=[.G59]*[.E59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Аль-Ислами ТМ Вязанка Халяль фиброуз в/у ф/в 0,35 кг АК</text:p>
          </table:table-cell>
          <table:table-cell table:style-name="ce1"/>
          <table:table-cell table:style-name="ce18"/>
          <table:table-cell table:style-name="ce10"/>
          <table:table-cell office:value-type="float" office:value="80" table:style-name="ce1">
            <text:p>80</text:p>
          </table:table-cell>
          <table:table-cell office:value-type="string" table:style-name="ce1">
            <text:p>шт</text:p>
          </table:table-cell>
          <table:table-cell office:value-type="float" office:value="0.35" table:formula="of:=VLOOKUP([.A60];['file:///C:/WORK/ПОКОМ_Останкино/2025_05/2025/ЗАВОДЫ/ПОКОМ/ОПТы/2025/12,25/31,12,25%20Коныгин/Стародворье%20104.ods'#Лист1.$A:.$G];7;0)" table:style-name="ce1">
            <text:p>0,35</text:p>
          </table:table-cell>
          <table:table-cell office:value-type="float" office:value="28" table:formula="of:=[.G60]*[.E60]" table:style-name="ce1">
            <text:p>2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Сочинка рубленая с сочным окороком ТМ Стародворье фиброуз в/у ф/в 0,3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3" table:formula="of:=VLOOKUP([.A61];['file:///C:/WORK/ПОКОМ_Останкино/2025_05/2025/ЗАВОДЫ/ПОКОМ/ОПТы/2025/12,25/31,12,25%20Коныгин/Стародворье%20104.ods'#Лист1.$A:.$G];7;0)" table:style-name="ce1">
            <text:p>0,3</text:p>
          </table:table-cell>
          <table:table-cell office:value-type="float" office:value="54" table:formula="of:=[.G61]*[.E61]" table:style-name="ce1">
            <text:p>5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Дугушка ТМ Стародворье ТС Дугушка полиамид ф/в 0,4 кг СК1</text:p>
          </table:table-cell>
          <table:table-cell table:style-name="ce1"/>
          <table:table-cell table:style-name="ce18"/>
          <table:table-cell table:style-name="ce10"/>
          <table:table-cell office:value-type="float" office:value="24" table:style-name="ce1">
            <text:p>24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62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9.6000000000000014" table:formula="of:=[.G62]*[.E62]" table:style-name="ce1">
            <text:p>9,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Традиционная ТМ Стародворье полиамид ф/в 0,4 кг СК1</text:p>
          </table:table-cell>
          <table:table-cell table:style-name="ce1"/>
          <table:table-cell table:style-name="ce18"/>
          <table:table-cell table:style-name="ce10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63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72" table:formula="of:=[.G63]*[.E63]" table:style-name="ce1">
            <text:p>7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усульманская Халяль ТМ Вязанка вектор ф/в 0,4 кг АК</text:p>
          </table:table-cell>
          <table:table-cell table:style-name="ce1"/>
          <table:table-cell table:style-name="ce18"/>
          <table:table-cell table:style-name="ce10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64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48" table:formula="of:=[.G64]*[.E64]" table:style-name="ce1">
            <text:p>4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Стародворская Традиционная ТМ Стародворье полиамид ф/в 0,4 кг СК1</text:p>
          </table:table-cell>
          <table:table-cell table:style-name="ce1"/>
          <table:table-cell table:style-name="ce18"/>
          <table:table-cell table:style-name="ce10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65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72" table:formula="of:=[.G65]*[.E65]" table:style-name="ce1">
            <text:p>7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Ветчина Сливушка с индейкой ТМ Вязанка полиамид 0,3 кг УВС СК1</text:p>
          </table:table-cell>
          <table:table-cell table:style-name="ce1"/>
          <table:table-cell table:style-name="ce18"/>
          <table:table-cell table:style-name="ce10"/>
          <table:table-cell office:value-type="float" office:value="80" table:style-name="ce1">
            <text:p>80</text:p>
          </table:table-cell>
          <table:table-cell office:value-type="string" table:style-name="ce1">
            <text:p>шт</text:p>
          </table:table-cell>
          <table:table-cell office:value-type="float" office:value="0.3" table:formula="of:=VLOOKUP([.A66];['file:///C:/WORK/ПОКОМ_Останкино/2025_05/2025/ЗАВОДЫ/ПОКОМ/ОПТы/2025/12,25/31,12,25%20Коныгин/Стародворье%20104.ods'#Лист1.$A:.$G];7;0)" table:style-name="ce1">
            <text:p>0,3</text:p>
          </table:table-cell>
          <table:table-cell office:value-type="float" office:value="24" table:formula="of:=[.G66]*[.E66]" table:style-name="ce1">
            <text:p>2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Ветчина Филейская ТМ Вязанка ТС Столичная полиамид ф/в 0,45 кг НД СК3</text:p>
          </table:table-cell>
          <table:table-cell table:style-name="ce1"/>
          <table:table-cell table:style-name="ce18"/>
          <table:table-cell table:style-name="ce10"/>
          <table:table-cell office:value-type="float" office:value="240" table:style-name="ce1">
            <text:p>240</text:p>
          </table:table-cell>
          <table:table-cell office:value-type="string" table:style-name="ce1">
            <text:p>шт</text:p>
          </table:table-cell>
          <table:table-cell office:value-type="float" office:value="0.45" table:formula="of:=VLOOKUP([.A67];['file:///C:/WORK/ПОКОМ_Останкино/2025_05/2025/ЗАВОДЫ/ПОКОМ/ОПТы/2025/12,25/31,12,25%20Коныгин/Стародворье%20104.ods'#Лист1.$A:.$G];7;0)" table:style-name="ce1">
            <text:p>0,45</text:p>
          </table:table-cell>
          <table:table-cell office:value-type="float" office:value="108" table:formula="of:=[.G67]*[.E67]" table:style-name="ce1">
            <text:p>10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Восточные халяль ТМ Вязанка полиамид в/у ф/в 0,33 кг АК</text:p>
          </table:table-cell>
          <table:table-cell table:style-name="ce1"/>
          <table:table-cell table:style-name="ce18"/>
          <table:table-cell table:style-name="ce10"/>
          <table:table-cell office:value-type="float" office:value="56" table:style-name="ce1">
            <text:p>56</text:p>
          </table:table-cell>
          <table:table-cell office:value-type="string" table:style-name="ce1">
            <text:p>шт</text:p>
          </table:table-cell>
          <table:table-cell office:value-type="float" office:value="0.33" table:formula="of:=VLOOKUP([.A68];['file:///C:/WORK/ПОКОМ_Останкино/2025_05/2025/ЗАВОДЫ/ПОКОМ/ОПТы/2025/12,25/31,12,25%20Коныгин/Стародворье%20104.ods'#Лист1.$A:.$G];7;0)" table:style-name="ce1">
            <text:p>0,33</text:p>
          </table:table-cell>
          <table:table-cell office:value-type="float" office:value="18.48" table:formula="of:=[.G68]*[.E68]" table:style-name="ce1">
            <text:p>18,4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Сочинки по-баварски с сыром ТМ Стародворье полиамид мгс ф/в 0,4 кг УВС СК4</text:p>
          </table:table-cell>
          <table:table-cell table:style-name="ce1"/>
          <table:table-cell table:style-name="ce18"/>
          <table:table-cell table:style-name="ce10"/>
          <table:table-cell office:value-type="float" office:value="30" table:style-name="ce1">
            <text:p>3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69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12" table:formula="of:=[.G69]*[.E69]" table:style-name="ce1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Бекон Вяленый выдержанный ТМ Стародворье в/у ф/в 0,05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54" table:style-name="ce1">
            <text:p>54</text:p>
          </table:table-cell>
          <table:table-cell office:value-type="string" table:style-name="ce1">
            <text:p>шт</text:p>
          </table:table-cell>
          <table:table-cell office:value-type="float" office:value="5.5E-2" table:formula="of:=VLOOKUP([.A70];['file:///C:/WORK/ПОКОМ_Останкино/2025_05/2025/ЗАВОДЫ/ПОКОМ/ОПТы/2025/12,25/31,12,25%20Коныгин/Стародворье%20104.ods'#Лист1.$A:.$G];7;0)" table:style-name="ce1">
            <text:p>0,055</text:p>
          </table:table-cell>
          <table:table-cell office:value-type="float" office:value="2.97" table:formula="of:=[.G70]*[.E70]" table:style-name="ce1">
            <text:p>2,97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Бекон сырокопченый ТМ Стародворье в/у ф/в 0,12 кг нарезка УМК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45" table:style-name="ce1">
            <text:p>45</text:p>
          </table:table-cell>
          <table:table-cell office:value-type="string" table:style-name="ce1">
            <text:p>шт</text:p>
          </table:table-cell>
          <table:table-cell office:value-type="float" office:value="0.12" table:formula="of:=VLOOKUP([.A71];['file:///C:/WORK/ПОКОМ_Останкино/2025_05/2025/ЗАВОДЫ/ПОКОМ/ОПТы/2025/12,25/31,12,25%20Коныгин/Стародворье%20104.ods'#Лист1.$A:.$G];7;0)" table:style-name="ce1">
            <text:p>0,12</text:p>
          </table:table-cell>
          <table:table-cell office:value-type="float" office:value="5.3999999999999995" table:formula="of:=[.G71]*[.E71]" table:style-name="ce1">
            <text:p>5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Грудинка копчено-вареная ТМ Стародворье в/у ф/в 0,12 кг нарезка УМК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45" table:style-name="ce1">
            <text:p>45</text:p>
          </table:table-cell>
          <table:table-cell office:value-type="string" table:style-name="ce1">
            <text:p>шт</text:p>
          </table:table-cell>
          <table:table-cell office:value-type="float" office:value="0.12" table:formula="of:=VLOOKUP([.A72];['file:///C:/WORK/ПОКОМ_Останкино/2025_05/2025/ЗАВОДЫ/ПОКОМ/ОПТы/2025/12,25/31,12,25%20Коныгин/Стародворье%20104.ods'#Лист1.$A:.$G];7;0)" table:style-name="ce1">
            <text:p>0,12</text:p>
          </table:table-cell>
          <table:table-cell office:value-type="float" office:value="5.3999999999999995" table:formula="of:=[.G72]*[.E72]" table:style-name="ce1">
            <text:p>5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сырокопченая Мраморная ТМ Стародворье в/у ф/в 0,07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126" table:style-name="ce1">
            <text:p>126</text:p>
          </table:table-cell>
          <table:table-cell office:value-type="string" table:style-name="ce1">
            <text:p>шт</text:p>
          </table:table-cell>
          <table:table-cell office:value-type="float" office:value="7.0000000000000007E-2" table:formula="of:=VLOOKUP([.A73];['file:///C:/WORK/ПОКОМ_Останкино/2025_05/2025/ЗАВОДЫ/ПОКОМ/ОПТы/2025/12,25/31,12,25%20Коныгин/Стародворье%20104.ods'#Лист1.$A:.$G];7;0)" table:style-name="ce1">
            <text:p>0,07</text:p>
          </table:table-cell>
          <table:table-cell office:value-type="float" office:value="8.82" table:formula="of:=[.G73]*[.E73]" table:style-name="ce1">
            <text:p>8,8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рейка Вяленая выдержанная ТМ Стародворье в/у ф/в 0,0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36" table:style-name="ce1">
            <text:p>36</text:p>
          </table:table-cell>
          <table:table-cell office:value-type="string" table:style-name="ce1">
            <text:p>шт</text:p>
          </table:table-cell>
          <table:table-cell office:value-type="float" office:value="0.05" table:formula="of:=VLOOKUP([.A74];['file:///C:/WORK/ПОКОМ_Останкино/2025_05/2025/ЗАВОДЫ/ПОКОМ/ОПТы/2025/12,25/31,12,25%20Коныгин/Стародворье%20104.ods'#Лист1.$A:.$G];7;0)" table:style-name="ce1">
            <text:p>0,05</text:p>
          </table:table-cell>
          <table:table-cell office:value-type="float" office:value="1.8" table:formula="of:=[.G74]*[.E74]" table:style-name="ce1">
            <text:p>1,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Окорок Прошутто сыровяленый выдержанный ТМ Стародворье в/у ф/в 0,05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90" table:style-name="ce1">
            <text:p>90</text:p>
          </table:table-cell>
          <table:table-cell office:value-type="string" table:style-name="ce1">
            <text:p>шт</text:p>
          </table:table-cell>
          <table:table-cell office:value-type="float" office:value="5.5E-2" table:formula="of:=VLOOKUP([.A75];['file:///C:/WORK/ПОКОМ_Останкино/2025_05/2025/ЗАВОДЫ/ПОКОМ/ОПТы/2025/12,25/31,12,25%20Коныгин/Стародворье%20104.ods'#Лист1.$A:.$G];7;0)" table:style-name="ce1">
            <text:p>0,055</text:p>
          </table:table-cell>
          <table:table-cell office:value-type="float" office:value="4.95" table:formula="of:=[.G75]*[.E75]" table:style-name="ce1">
            <text:p>4,9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Окорок Хамон Вяленый выдержанный ТМ Стародворье в/у ф/в 0,05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36" table:style-name="ce1">
            <text:p>36</text:p>
          </table:table-cell>
          <table:table-cell office:value-type="string" table:style-name="ce1">
            <text:p>шт</text:p>
          </table:table-cell>
          <table:table-cell office:value-type="float" office:value="5.5E-2" table:formula="of:=VLOOKUP([.A76];['file:///C:/WORK/ПОКОМ_Останкино/2025_05/2025/ЗАВОДЫ/ПОКОМ/ОПТы/2025/12,25/31,12,25%20Коныгин/Стародворье%20104.ods'#Лист1.$A:.$G];7;0)" table:style-name="ce1">
            <text:p>0,055</text:p>
          </table:table-cell>
          <table:table-cell office:value-type="float" office:value="1.98" table:formula="of:=[.G76]*[.E76]" table:style-name="ce1">
            <text:p>1,9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Паштет Любительский ТМ Стародворье ламистер ф/в 0,1 кг РК</text:p>
          </table:table-cell>
          <table:table-cell table:style-name="ce1"/>
          <table:table-cell table:style-name="ce18"/>
          <table:table-cell table:style-name="ce10"/>
          <table:table-cell office:value-type="float" office:value="80" table:style-name="ce1">
            <text:p>80</text:p>
          </table:table-cell>
          <table:table-cell office:value-type="string" table:style-name="ce1">
            <text:p>шт</text:p>
          </table:table-cell>
          <table:table-cell office:value-type="float" office:value="0.1" table:formula="of:=VLOOKUP([.A77];['file:///C:/WORK/ПОКОМ_Останкино/2025_05/2025/ЗАВОДЫ/ПОКОМ/ОПТы/2025/12,25/31,12,25%20Коныгин/Стародворье%20104.ods'#Лист1.$A:.$G];7;0)" table:style-name="ce1">
            <text:p>0,1</text:p>
          </table:table-cell>
          <table:table-cell office:value-type="float" office:value="8" table:formula="of:=[.G77]*[.E77]" table:style-name="ce1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Паштет печеночный с морковью ТМ Стародворье ламистер ф/в 0,1 кг НКК, Топ-ЛКК, Дистр РК</text:p>
          </table:table-cell>
          <table:table-cell table:style-name="ce1"/>
          <table:table-cell table:style-name="ce18"/>
          <table:table-cell table:style-name="ce10"/>
          <table:table-cell office:value-type="float" office:value="80" table:style-name="ce1">
            <text:p>80</text:p>
          </table:table-cell>
          <table:table-cell office:value-type="string" table:style-name="ce1">
            <text:p>шт</text:p>
          </table:table-cell>
          <table:table-cell office:value-type="float" office:value="0.1" table:formula="of:=VLOOKUP([.A78];['file:///C:/WORK/ПОКОМ_Останкино/2025_05/2025/ЗАВОДЫ/ПОКОМ/ОПТы/2025/12,25/31,12,25%20Коныгин/Стародворье%20104.ods'#Лист1.$A:.$G];7;0)" table:style-name="ce1">
            <text:p>0,1</text:p>
          </table:table-cell>
          <table:table-cell office:value-type="float" office:value="8" table:formula="of:=[.G78]*[.E78]" table:style-name="ce1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Мясорубская ТМ Стародворье с рубленой грудинкой фиброуз в/у ф/в 0,35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250" table:style-name="ce1">
            <text:p>250</text:p>
          </table:table-cell>
          <table:table-cell office:value-type="string" table:style-name="ce1">
            <text:p>шт</text:p>
          </table:table-cell>
          <table:table-cell office:value-type="float" office:value="0.35" table:formula="of:=VLOOKUP([.A79];['file:///C:/WORK/ПОКОМ_Останкино/2025_05/2025/ЗАВОДЫ/ПОКОМ/ОПТы/2025/12,25/31,12,25%20Коныгин/Стародворье%20104.ods'#Лист1.$A:.$G];7;0)" table:style-name="ce1">
            <text:p>0,35</text:p>
          </table:table-cell>
          <table:table-cell office:value-type="float" office:value="87.5" table:formula="of:=[.G79]*[.E79]" table:style-name="ce1">
            <text:p>87,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Рубленая Запеченная ТМ Стародворье ТС Дугушка вектор ф/в 0,6 кг УВС1 СК1</text:p>
          </table:table-cell>
          <table:table-cell table:style-name="ce1"/>
          <table:table-cell table:style-name="ce18"/>
          <table:table-cell table:style-name="ce10"/>
          <table:table-cell office:value-type="float" office:value="16" table:style-name="ce1">
            <text:p>16</text:p>
          </table:table-cell>
          <table:table-cell office:value-type="string" table:style-name="ce1">
            <text:p>шт</text:p>
          </table:table-cell>
          <table:table-cell office:value-type="float" office:value="0.6" table:formula="of:=VLOOKUP([.A80];['file:///C:/WORK/ПОКОМ_Останкино/2025_05/2025/ЗАВОДЫ/ПОКОМ/ОПТы/2025/12,25/31,12,25%20Коныгин/Стародворье%20104.ods'#Лист1.$A:.$G];7;0)" table:style-name="ce1">
            <text:p>0,6</text:p>
          </table:table-cell>
          <table:table-cell office:value-type="float" office:value="9.6" table:formula="of:=[.G80]*[.E80]" table:style-name="ce1">
            <text:p>9,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алями Запеченная ТМ Стародворье ТС Дугушка вектор ф/в 0,6 кг УВС1 СК2</text:p>
          </table:table-cell>
          <table:table-cell table:style-name="ce1"/>
          <table:table-cell table:style-name="ce18"/>
          <table:table-cell table:style-name="ce10"/>
          <table:table-cell office:value-type="float" office:value="24" table:style-name="ce1">
            <text:p>24</text:p>
          </table:table-cell>
          <table:table-cell office:value-type="string" table:style-name="ce1">
            <text:p>шт</text:p>
          </table:table-cell>
          <table:table-cell office:value-type="float" office:value="0.6" table:formula="of:=VLOOKUP([.A81];['file:///C:/WORK/ПОКОМ_Останкино/2025_05/2025/ЗАВОДЫ/ПОКОМ/ОПТы/2025/12,25/31,12,25%20Коныгин/Стародворье%20104.ods'#Лист1.$A:.$G];7;0)" table:style-name="ce1">
            <text:p>0,6</text:p>
          </table:table-cell>
          <table:table-cell office:value-type="float" office:value="14.399999999999999" table:formula="of:=[.G81]*[.E81]" table:style-name="ce1">
            <text:p>14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алями Мясорубская ТМ Стародворье с рубленым шпиком фиброуз в/у ф/в 0,35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35" table:formula="of:=VLOOKUP([.A82];['file:///C:/WORK/ПОКОМ_Останкино/2025_05/2025/ЗАВОДЫ/ПОКОМ/ОПТы/2025/12,25/31,12,25%20Коныгин/Стародворье%20104.ods'#Лист1.$A:.$G];7;0)" table:style-name="ce1">
            <text:p>0,35</text:p>
          </table:table-cell>
          <table:table-cell office:value-type="float" office:value="42" table:formula="of:=[.G82]*[.E82]" table:style-name="ce1">
            <text:p>4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алями Филейбургская зернистая ТМ Баварушка фиброуз в/у ф/в 0,35 кг срез УВС2 СК2</text:p>
          </table:table-cell>
          <table:table-cell table:style-name="ce1"/>
          <table:table-cell table:style-name="ce18"/>
          <table:table-cell table:style-name="ce10"/>
          <table:table-cell office:value-type="float" office:value="12" table:style-name="ce1">
            <text:p>12</text:p>
          </table:table-cell>
          <table:table-cell office:value-type="string" table:style-name="ce1">
            <text:p>шт</text:p>
          </table:table-cell>
          <table:table-cell office:value-type="float" office:value="0.35" table:formula="of:=VLOOKUP([.A83];['file:///C:/WORK/ПОКОМ_Останкино/2025_05/2025/ЗАВОДЫ/ПОКОМ/ОПТы/2025/12,25/31,12,25%20Коныгин/Стародворье%20104.ods'#Лист1.$A:.$G];7;0)" table:style-name="ce1">
            <text:p>0,35</text:p>
          </table:table-cell>
          <table:table-cell office:value-type="float" office:value="4.1999999999999993" table:formula="of:=[.G83]*[.E83]" table:style-name="ce1">
            <text:p>4,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Запеченный ТМ Стародворье ТС Дугушка вектор ф/в 0,6 кг УВС1 СК2</text:p>
          </table:table-cell>
          <table:table-cell table:style-name="ce1"/>
          <table:table-cell table:style-name="ce18"/>
          <table:table-cell table:style-name="ce10"/>
          <table:table-cell office:value-type="float" office:value="16" table:style-name="ce1">
            <text:p>16</text:p>
          </table:table-cell>
          <table:table-cell office:value-type="string" table:style-name="ce1">
            <text:p>шт</text:p>
          </table:table-cell>
          <table:table-cell office:value-type="float" office:value="0.6" table:formula="of:=VLOOKUP([.A84];['file:///C:/WORK/ПОКОМ_Останкино/2025_05/2025/ЗАВОДЫ/ПОКОМ/ОПТы/2025/12,25/31,12,25%20Коныгин/Стародворье%20104.ods'#Лист1.$A:.$G];7;0)" table:style-name="ce1">
            <text:p>0,6</text:p>
          </table:table-cell>
          <table:table-cell office:value-type="float" office:value="9.6" table:formula="of:=[.G84]*[.E84]" table:style-name="ce1">
            <text:p>9,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Мясорубский ТМ Стародворье с мелкорубленным окороком фиброуз в/у вес СК2</text:p>
          </table:table-cell>
          <table:table-cell table:style-name="ce1"/>
          <table:table-cell table:style-name="ce18"/>
          <table:table-cell table:style-name="ce10"/>
          <table:table-cell office:value-type="float" office:value="40" table:style-name="ce1">
            <text:p>4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85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40" table:formula="of:=[.G85]*[.E85]" table:style-name="ce1">
            <text:p>4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Мясорубский ТМ Стародворье с мелкорубленным окороком фиброуз в/у ф/в 0,35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35" table:formula="of:=VLOOKUP([.A86];['file:///C:/WORK/ПОКОМ_Останкино/2025_05/2025/ЗАВОДЫ/ПОКОМ/ОПТы/2025/12,25/31,12,25%20Коныгин/Стародворье%20104.ods'#Лист1.$A:.$G];7;0)" table:style-name="ce1">
            <text:p>0,35</text:p>
          </table:table-cell>
          <table:table-cell office:value-type="float" office:value="42" table:formula="of:=[.G86]*[.E86]" table:style-name="ce1">
            <text:p>4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Филедворский ТМ Стародворье фиброуз в/у ф/в 0,35 кг срез НД2 СК2</text:p>
          </table:table-cell>
          <table:table-cell table:style-name="ce1"/>
          <table:table-cell table:style-name="ce18"/>
          <table:table-cell table:style-name="ce10"/>
          <table:table-cell office:value-type="float" office:value="60" table:style-name="ce1">
            <text:p>60</text:p>
          </table:table-cell>
          <table:table-cell office:value-type="string" table:style-name="ce1">
            <text:p>шт</text:p>
          </table:table-cell>
          <table:table-cell office:value-type="float" office:value="0.35" table:formula="of:=VLOOKUP([.A87];['file:///C:/WORK/ПОКОМ_Останкино/2025_05/2025/ЗАВОДЫ/ПОКОМ/ОПТы/2025/12,25/31,12,25%20Коныгин/Стародворье%20104.ods'#Лист1.$A:.$G];7;0)" table:style-name="ce1">
            <text:p>0,35</text:p>
          </table:table-cell>
          <table:table-cell office:value-type="float" office:value="21" table:formula="of:=[.G87]*[.E87]" table:style-name="ce1">
            <text:p>21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очинка по-европейски с сочной грудинкой ТМ Стародворье фиброуз в/у ф/в 0,3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210" table:style-name="ce1">
            <text:p>210</text:p>
          </table:table-cell>
          <table:table-cell office:value-type="string" table:style-name="ce1">
            <text:p>шт</text:p>
          </table:table-cell>
          <table:table-cell office:value-type="float" office:value="0.3" table:formula="of:=VLOOKUP([.A88];['file:///C:/WORK/ПОКОМ_Останкино/2025_05/2025/ЗАВОДЫ/ПОКОМ/ОПТы/2025/12,25/31,12,25%20Коныгин/Стародворье%20104.ods'#Лист1.$A:.$G];7;0)" table:style-name="ce1">
            <text:p>0,3</text:p>
          </table:table-cell>
          <table:table-cell office:value-type="float" office:value="63" table:formula="of:=[.G88]*[.E88]" table:style-name="ce1">
            <text:p>63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очинка по-фински с сочным окороком ТМ Стародворье фиброуз в/у ф/в 0,3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150" table:style-name="ce1">
            <text:p>150</text:p>
          </table:table-cell>
          <table:table-cell office:value-type="string" table:style-name="ce1">
            <text:p>шт</text:p>
          </table:table-cell>
          <table:table-cell office:value-type="float" office:value="0.3" table:formula="of:=VLOOKUP([.A89];['file:///C:/WORK/ПОКОМ_Останкино/2025_05/2025/ЗАВОДЫ/ПОКОМ/ОПТы/2025/12,25/31,12,25%20Коныгин/Стародворье%20104.ods'#Лист1.$A:.$G];7;0)" table:style-name="ce1">
            <text:p>0,3</text:p>
          </table:table-cell>
          <table:table-cell office:value-type="float" office:value="45" table:formula="of:=[.G89]*[.E89]" table:style-name="ce1">
            <text:p>4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Кракушка пряная с сальцем ТМ Стародворье ТС Баварушка черева в/у ф/в 0,3 кг СК2</text:p>
          </table:table-cell>
          <table:table-cell table:style-name="ce1"/>
          <table:table-cell table:style-name="ce18"/>
          <table:table-cell table:style-name="ce10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3" table:formula="of:=VLOOKUP([.A90];['file:///C:/WORK/ПОКОМ_Останкино/2025_05/2025/ЗАВОДЫ/ПОКОМ/ОПТы/2025/12,25/31,12,25%20Коныгин/Стародворье%20104.ods'#Лист1.$A:.$G];7;0)" table:style-name="ce1">
            <text:p>0,3</text:p>
          </table:table-cell>
          <table:table-cell office:value-type="float" office:value="54" table:formula="of:=[.G90]*[.E90]" table:style-name="ce1">
            <text:p>5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Сочинка зернистая с сочной грудинкой ТМ Стародворье фиброуз в/у вес СК2</text:p>
          </table:table-cell>
          <table:table-cell table:style-name="ce1"/>
          <table:table-cell table:style-name="ce18"/>
          <table:table-cell table:style-name="ce10"/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91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00" table:formula="of:=[.G91]*[.E91]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Докторская ТМ Стародворье ТС Дугушка полиамид ф/в 0,6 кг УВК СК3</text:p>
          </table:table-cell>
          <table:table-cell table:style-name="ce1"/>
          <table:table-cell table:style-name="ce18"/>
          <table:table-cell table:style-name="ce10"/>
          <table:table-cell office:value-type="float" office:value="16" table:style-name="ce1">
            <text:p>16</text:p>
          </table:table-cell>
          <table:table-cell office:value-type="string" table:style-name="ce1">
            <text:p>шт</text:p>
          </table:table-cell>
          <table:table-cell office:value-type="float" office:value="0.6" table:formula="of:=VLOOKUP([.A92];['file:///C:/WORK/ПОКОМ_Останкино/2025_05/2025/ЗАВОДЫ/ПОКОМ/ОПТы/2025/12,25/31,12,25%20Коныгин/Стародворье%20104.ods'#Лист1.$A:.$G];7;0)" table:style-name="ce1">
            <text:p>0,6</text:p>
          </table:table-cell>
          <table:table-cell office:value-type="float" office:value="9.6" table:formula="of:=[.G92]*[.E92]" table:style-name="ce1">
            <text:p>9,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Докторский гарант ТМ Вязанка вектор ф/в 0,4 кг СК3</text:p>
          </table:table-cell>
          <table:table-cell table:style-name="ce1"/>
          <table:table-cell table:style-name="ce18"/>
          <table:table-cell table:style-name="ce10"/>
          <table:table-cell office:value-type="float" office:value="400" table:style-name="ce1">
            <text:p>40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93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160" table:formula="of:=[.G93]*[.E93]" table:style-name="ce1">
            <text:p>1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куша ТМ Вязанка полиамид ф/в 0,45 кг СК3</text:p>
          </table:table-cell>
          <table:table-cell table:style-name="ce1"/>
          <table:table-cell table:style-name="ce18"/>
          <table:table-cell table:style-name="ce10"/>
          <table:table-cell office:value-type="float" office:value="480" table:style-name="ce1">
            <text:p>480</text:p>
          </table:table-cell>
          <table:table-cell office:value-type="string" table:style-name="ce1">
            <text:p>шт</text:p>
          </table:table-cell>
          <table:table-cell office:value-type="float" office:value="0.45" table:formula="of:=VLOOKUP([.A94];['file:///C:/WORK/ПОКОМ_Останкино/2025_05/2025/ЗАВОДЫ/ПОКОМ/ОПТы/2025/12,25/31,12,25%20Коныгин/Стародворье%20104.ods'#Лист1.$A:.$G];7;0)" table:style-name="ce1">
            <text:p>0,45</text:p>
          </table:table-cell>
          <table:table-cell office:value-type="float" office:value="216" table:formula="of:=[.G94]*[.E94]" table:style-name="ce1">
            <text:p>21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по-стародворски ТМ Стародворье полиамид вес СК2</text:p>
          </table:table-cell>
          <table:table-cell table:style-name="ce1"/>
          <table:table-cell table:style-name="ce18"/>
          <table:table-cell table:style-name="ce10"/>
          <table:table-cell office:value-type="float" office:value="180" table:style-name="ce1">
            <text:p>18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95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80" table:formula="of:=[.G95]*[.E95]" table:style-name="ce1">
            <text:p>18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Традиционная ТМ Стародворье полиамид вес СК1</text:p>
          </table:table-cell>
          <table:table-cell table:style-name="ce1"/>
          <table:table-cell table:style-name="ce18"/>
          <table:table-cell table:style-name="ce10"/>
          <table:table-cell office:value-type="float" office:value="150" table:style-name="ce1">
            <text:p>1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96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50" table:formula="of:=[.G96]*[.E96]" table:style-name="ce1">
            <text:p>15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Сливушка ТМ Вязанка полиамид вес СК3</text:p>
          </table:table-cell>
          <table:table-cell table:style-name="ce1"/>
          <table:table-cell table:style-name="ce18"/>
          <table:table-cell table:style-name="ce10"/>
          <table:table-cell office:value-type="float" office:value="200" table:style-name="ce1">
            <text:p>20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97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200" table:formula="of:=[.G97]*[.E97]" table:style-name="ce1">
            <text:p>20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Колбаса вареная Сливушка ТМ Вязанка полиамид 0,375 кг СК3</text:p>
          </table:table-cell>
          <table:table-cell table:style-name="ce1"/>
          <table:table-cell table:style-name="ce18"/>
          <table:table-cell table:style-name="ce10"/>
          <table:table-cell office:value-type="float" office:value="210" table:style-name="ce1">
            <text:p>210</text:p>
          </table:table-cell>
          <table:table-cell office:value-type="string" table:style-name="ce1">
            <text:p>шт</text:p>
          </table:table-cell>
          <table:table-cell office:value-type="float" office:value="0.375" table:formula="of:=VLOOKUP([.A98];['file:///C:/WORK/ПОКОМ_Останкино/2025_05/2025/ЗАВОДЫ/ПОКОМ/ОПТы/2025/12,25/31,12,25%20Коныгин/Стародворье%20104.ods'#Лист1.$A:.$G];7;0)" table:style-name="ce1">
            <text:p>0,375</text:p>
          </table:table-cell>
          <table:table-cell office:value-type="float" office:value="78.75" table:formula="of:=[.G98]*[.E98]" table:style-name="ce1">
            <text:p>78,75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Колбаса вареная Сливушка ТМ Вязанка полиамид 0,45 кг СК3</text:p>
          </table:table-cell>
          <table:table-cell table:style-name="ce1"/>
          <table:table-cell table:style-name="ce18"/>
          <table:table-cell table:style-name="ce10"/>
          <table:table-cell office:value-type="float" office:value="240" table:style-name="ce1">
            <text:p>240</text:p>
          </table:table-cell>
          <table:table-cell office:value-type="string" table:style-name="ce1">
            <text:p>шт</text:p>
          </table:table-cell>
          <table:table-cell office:value-type="float" office:value="0.45" table:formula="of:=VLOOKUP([.A99];['file:///C:/WORK/ПОКОМ_Останкино/2025_05/2025/ЗАВОДЫ/ПОКОМ/ОПТы/2025/12,25/31,12,25%20Коныгин/Стародворье%20104.ods'#Лист1.$A:.$G];7;0)" table:style-name="ce1">
            <text:p>0,45</text:p>
          </table:table-cell>
          <table:table-cell office:value-type="float" office:value="108" table:formula="of:=[.G99]*[.E99]" table:style-name="ce1">
            <text:p>108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Колбаса вареная Стародворская Традиционная со шпиком ТМ Стародворье полиамид вес СК1</text:p>
          </table:table-cell>
          <table:table-cell table:style-name="ce1"/>
          <table:table-cell table:style-name="ce18"/>
          <table:table-cell table:style-name="ce20"/>
          <table:table-cell office:value-type="float" office:value="150" table:style-name="ce1">
            <text:p>1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100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150" table:formula="of:=[.G100]*[.E100]" table:style-name="ce1">
            <text:p>150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Колбаса вареная Филедворская по-стародворски ТМ Стародворье полиамид вес СК2</text:p>
          </table:table-cell>
          <table:table-cell table:style-name="ce1"/>
          <table:table-cell table:style-name="ce18"/>
          <table:table-cell table:style-name="ce20"/>
          <table:table-cell office:value-type="float" office:value="50" table:style-name="ce1">
            <text:p>50</text:p>
          </table:table-cell>
          <table:table-cell office:value-type="string" table:style-name="ce1">
            <text:p>кг</text:p>
          </table:table-cell>
          <table:table-cell office:value-type="float" office:value="1" table:formula="of:=VLOOKUP([.A101];['file:///C:/WORK/ПОКОМ_Останкино/2025_05/2025/ЗАВОДЫ/ПОКОМ/ОПТы/2025/12,25/31,12,25%20Коныгин/Стародворье%20104.ods'#Лист1.$A:.$G];7;0)" table:style-name="ce1">
            <text:p>1</text:p>
          </table:table-cell>
          <table:table-cell office:value-type="float" office:value="50" table:formula="of:=[.G101]*[.E101]" table:style-name="ce1">
            <text:p>50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Колбаса вареная Филейная ТМ Особый рецепт полиамид ф/в 0,5 кг СК4</text:p>
          </table:table-cell>
          <table:table-cell table:style-name="ce1"/>
          <table:table-cell table:style-name="ce18"/>
          <table:table-cell table:style-name="ce20"/>
          <table:table-cell office:value-type="float" office:value="110" table:style-name="ce1">
            <text:p>110</text:p>
          </table:table-cell>
          <table:table-cell office:value-type="string" table:style-name="ce1">
            <text:p>шт</text:p>
          </table:table-cell>
          <table:table-cell office:value-type="float" office:value="0.5" table:formula="of:=VLOOKUP([.A102];['file:///C:/WORK/ПОКОМ_Останкино/2025_05/2025/ЗАВОДЫ/ПОКОМ/ОПТы/2025/12,25/31,12,25%20Коныгин/Стародворье%20104.ods'#Лист1.$A:.$G];7;0)" table:style-name="ce1">
            <text:p>0,5</text:p>
          </table:table-cell>
          <table:table-cell office:value-type="float" office:value="55" table:formula="of:=[.G102]*[.E102]" table:style-name="ce1">
            <text:p>55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Колбаса вареная Филейская ТМ Вязанка ТС Классическая полиамид ф/в 0,45 кг НД СК3</text:p>
          </table:table-cell>
          <table:table-cell table:style-name="ce1"/>
          <table:table-cell table:style-name="ce18"/>
          <table:table-cell table:style-name="ce20"/>
          <table:table-cell office:value-type="float" office:value="300" table:style-name="ce1">
            <text:p>300</text:p>
          </table:table-cell>
          <table:table-cell office:value-type="string" table:style-name="ce1">
            <text:p>шт</text:p>
          </table:table-cell>
          <table:table-cell office:value-type="float" office:value="0.45" table:formula="of:=VLOOKUP([.A103];['file:///C:/WORK/ПОКОМ_Останкино/2025_05/2025/ЗАВОДЫ/ПОКОМ/ОПТы/2025/12,25/31,12,25%20Коныгин/Стародворье%20104.ods'#Лист1.$A:.$G];7;0)" table:style-name="ce1">
            <text:p>0,45</text:p>
          </table:table-cell>
          <table:table-cell office:value-type="float" office:value="135" table:formula="of:=[.G103]*[.E103]" table:style-name="ce1">
            <text:p>135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Ветчина Нежная ТМ Особый рецепт полиамид ф/в 0,4 кг СК1</text:p>
          </table:table-cell>
          <table:table-cell table:style-name="ce1"/>
          <table:table-cell table:style-name="ce18"/>
          <table:table-cell table:style-name="ce20"/>
          <table:table-cell office:value-type="float" office:value="50" table:style-name="ce1">
            <text:p>5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104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20" table:formula="of:=[.G104]*[.E104]" table:style-name="ce1">
            <text:p>20</text:p>
          </table:table-cell>
          <table:table-cell table:number-columns-repeated="16376"/>
        </table:table-row>
        <table:table-row table:style-name="ro5">
          <table:table-cell office:value-type="string" table:style-name="ce21">
            <text:p>Сосиски Баварские 350гр ТМ Стародворье (1/6шт) Стародворье</text:p>
          </table:table-cell>
          <table:table-cell table:style-name="ce1"/>
          <table:table-cell table:style-name="ce18"/>
          <table:table-cell table:style-name="ce20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42" table:formula="of:=[.G105]*[.E105]" table:style-name="ce1">
            <text:p>42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Баварские с сыром ТМ Стародворье айпил мгс ф/в 0,35 кг СК4</text:p>
          </table:table-cell>
          <table:table-cell table:style-name="ce1"/>
          <table:table-cell table:style-name="ce18"/>
          <table:table-cell table:style-name="ce20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35" table:formula="of:=VLOOKUP([.A106];['file:///C:/WORK/ПОКОМ_Останкино/2025_05/2025/ЗАВОДЫ/ПОКОМ/ОПТы/2025/12,25/31,12,25%20Коныгин/Стародворье%20104.ods'#Лист1.$A:.$G];7;0)" table:style-name="ce1">
            <text:p>0,35</text:p>
          </table:table-cell>
          <table:table-cell office:value-type="float" office:value="42" table:formula="of:=[.G106]*[.E106]" table:style-name="ce1">
            <text:p>42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Ганноверские ТМ Стародворье амицел мгс ф/в 0,5 кг СК4</text:p>
          </table:table-cell>
          <table:table-cell table:style-name="ce1"/>
          <table:table-cell table:style-name="ce18"/>
          <table:table-cell table:style-name="ce20"/>
          <table:table-cell office:value-type="float" office:value="60" table:style-name="ce1">
            <text:p>60</text:p>
          </table:table-cell>
          <table:table-cell office:value-type="string" table:style-name="ce1">
            <text:p>шт</text:p>
          </table:table-cell>
          <table:table-cell office:value-type="float" office:value="0.5" table:formula="of:=VLOOKUP([.A107];['file:///C:/WORK/ПОКОМ_Останкино/2025_05/2025/ЗАВОДЫ/ПОКОМ/ОПТы/2025/12,25/31,12,25%20Коныгин/Стародворье%20104.ods'#Лист1.$A:.$G];7;0)" table:style-name="ce1">
            <text:p>0,5</text:p>
          </table:table-cell>
          <table:table-cell office:value-type="float" office:value="30" table:formula="of:=[.G107]*[.E107]" table:style-name="ce1">
            <text:p>30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Молокуши миникушай ТМ Вязанка амицел мгс ф/в 0,33 кг УВС СК3</text:p>
          </table:table-cell>
          <table:table-cell table:style-name="ce1"/>
          <table:table-cell table:style-name="ce18"/>
          <table:table-cell table:style-name="ce20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33" table:formula="of:=VLOOKUP([.A108];['file:///C:/WORK/ПОКОМ_Останкино/2025_05/2025/ЗАВОДЫ/ПОКОМ/ОПТы/2025/12,25/31,12,25%20Коныгин/Стародворье%20104.ods'#Лист1.$A:.$G];7;0)" table:style-name="ce1">
            <text:p>0,33</text:p>
          </table:table-cell>
          <table:table-cell office:value-type="float" office:value="59.400000000000006" table:formula="of:=[.G108]*[.E108]" table:style-name="ce1">
            <text:p>59,4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Вязанка Молочные ТМ Вязанка амицел мгс ф/в 0,45 кг УВС НД СК3</text:p>
          </table:table-cell>
          <table:table-cell table:style-name="ce1"/>
          <table:table-cell table:style-name="ce18"/>
          <table:table-cell table:style-name="ce20"/>
          <table:table-cell office:value-type="float" office:value="90" table:style-name="ce1">
            <text:p>90</text:p>
          </table:table-cell>
          <table:table-cell office:value-type="string" table:style-name="ce1">
            <text:p>шт</text:p>
          </table:table-cell>
          <table:table-cell office:value-type="float" office:value="0.45" table:formula="of:=VLOOKUP([.A109];['file:///C:/WORK/ПОКОМ_Останкино/2025_05/2025/ЗАВОДЫ/ПОКОМ/ОПТы/2025/12,25/31,12,25%20Коныгин/Стародворье%20104.ods'#Лист1.$A:.$G];7;0)" table:style-name="ce1">
            <text:p>0,45</text:p>
          </table:table-cell>
          <table:table-cell office:value-type="float" office:value="40.5" table:formula="of:=[.G109]*[.E109]" table:style-name="ce1">
            <text:p>40,5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Молочные для завтрака ТМ Особый рецепт полиамид мгс ф/в 0,4 кг НД2 СК3</text:p>
          </table:table-cell>
          <table:table-cell table:style-name="ce1"/>
          <table:table-cell table:style-name="ce18"/>
          <table:table-cell table:style-name="ce20"/>
          <table:table-cell office:value-type="float" office:value="80" table:style-name="ce1">
            <text:p>8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110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32" table:formula="of:=[.G110]*[.E110]" table:style-name="ce1">
            <text:p>32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Вязанка Сливочные ТМ Вязанка амицел мгс ф/в 0,33 кг УВС НД СК3</text:p>
          </table:table-cell>
          <table:table-cell table:style-name="ce1"/>
          <table:table-cell table:style-name="ce18"/>
          <table:table-cell table:style-name="ce20"/>
          <table:table-cell office:value-type="float" office:value="90" table:style-name="ce1">
            <text:p>90</text:p>
          </table:table-cell>
          <table:table-cell office:value-type="string" table:style-name="ce1">
            <text:p>шт</text:p>
          </table:table-cell>
          <table:table-cell office:value-type="float" office:value="0.33" table:formula="of:=VLOOKUP([.A111];['file:///C:/WORK/ПОКОМ_Останкино/2025_05/2025/ЗАВОДЫ/ПОКОМ/ОПТы/2025/12,25/31,12,25%20Коныгин/Стародворье%20104.ods'#Лист1.$A:.$G];7;0)" table:style-name="ce1">
            <text:p>0,33</text:p>
          </table:table-cell>
          <table:table-cell office:value-type="float" office:value="29.700000000000003" table:formula="of:=[.G111]*[.E111]" table:style-name="ce1">
            <text:p>29,7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Вязанка Сливочные ТМ Вязанка амицел мгс ф/в 0,45 кг УВС НД СК3</text:p>
          </table:table-cell>
          <table:table-cell table:style-name="ce1"/>
          <table:table-cell table:style-name="ce18"/>
          <table:table-cell table:style-name="ce20"/>
          <table:table-cell office:value-type="float" office:value="90" table:style-name="ce1">
            <text:p>90</text:p>
          </table:table-cell>
          <table:table-cell office:value-type="string" table:style-name="ce1">
            <text:p>шт</text:p>
          </table:table-cell>
          <table:table-cell office:value-type="float" office:value="0.45" table:formula="of:=VLOOKUP([.A112];['file:///C:/WORK/ПОКОМ_Останкино/2025_05/2025/ЗАВОДЫ/ПОКОМ/ОПТы/2025/12,25/31,12,25%20Коныгин/Стародворье%20104.ods'#Лист1.$A:.$G];7;0)" table:style-name="ce1">
            <text:p>0,45</text:p>
          </table:table-cell>
          <table:table-cell office:value-type="float" office:value="40.5" table:formula="of:=[.G112]*[.E112]" table:style-name="ce1">
            <text:p>40,5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Сочинки Молочные ТМ Стародворье амицел мгс ф/в 0,4 кг СК4</text:p>
          </table:table-cell>
          <table:table-cell table:style-name="ce1"/>
          <table:table-cell table:style-name="ce18"/>
          <table:table-cell table:style-name="ce20"/>
          <table:table-cell office:value-type="float" office:value="180" table:style-name="ce1">
            <text:p>18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113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72" table:formula="of:=[.G113]*[.E113]" table:style-name="ce1">
            <text:p>72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Сочинки по-баварски ТМ Стародворье полиамид мгс ф/в 0,4 кг СК3</text:p>
          </table:table-cell>
          <table:table-cell table:style-name="ce1"/>
          <table:table-cell table:style-name="ce18"/>
          <table:table-cell table:style-name="ce20"/>
          <table:table-cell office:value-type="float" office:value="24" table:style-name="ce1">
            <text:p>24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114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9.6000000000000014" table:formula="of:=[.G114]*[.E114]" table:style-name="ce1">
            <text:p>9,6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Сочинки ТМ Стародворье с сочной грудинкой полиамид мгс ф/в 0,4 кг УВС НД СК4</text:p>
          </table:table-cell>
          <table:table-cell table:style-name="ce1"/>
          <table:table-cell table:style-name="ce18"/>
          <table:table-cell table:style-name="ce20"/>
          <table:table-cell office:value-type="float" office:value="54" table:style-name="ce1">
            <text:p>54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115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21.6" table:formula="of:=[.G115]*[.E115]" table:style-name="ce1">
            <text:p>21,6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Сочинки ТМ Стародворье с сочным окороком полиамид мгс ф/в 0,4 кг УВС НД СК4</text:p>
          </table:table-cell>
          <table:table-cell table:style-name="ce1"/>
          <table:table-cell table:style-name="ce18"/>
          <table:table-cell table:style-name="ce20"/>
          <table:table-cell office:value-type="float" office:value="36" table:style-name="ce1">
            <text:p>36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116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14.4" table:formula="of:=[.G116]*[.E116]" table:style-name="ce1">
            <text:p>14,4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осиски Сочинки Сливочные ТМ Стародворье амицел мгс ф/в 0,4 кг СК3</text:p>
          </table:table-cell>
          <table:table-cell table:style-name="ce1"/>
          <table:table-cell table:style-name="ce18"/>
          <table:table-cell table:style-name="ce20"/>
          <table:table-cell office:value-type="float" office:value="120" table:style-name="ce1">
            <text:p>12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117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48" table:formula="of:=[.G117]*[.E117]" table:style-name="ce1">
            <text:p>48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Сардельки Сочинки ТМ Стародворье полиамид мгс ф/в 0,4 кг НД СК4</text:p>
          </table:table-cell>
          <table:table-cell table:style-name="ce1"/>
          <table:table-cell table:style-name="ce18"/>
          <table:table-cell table:style-name="ce20"/>
          <table:table-cell office:value-type="float" office:value="70" table:style-name="ce1">
            <text:p>70</text:p>
          </table:table-cell>
          <table:table-cell office:value-type="string" table:style-name="ce1">
            <text:p>шт</text:p>
          </table:table-cell>
          <table:table-cell office:value-type="float" office:value="0.4" table:formula="of:=VLOOKUP([.A118];['file:///C:/WORK/ПОКОМ_Останкино/2025_05/2025/ЗАВОДЫ/ПОКОМ/ОПТы/2025/12,25/31,12,25%20Коныгин/Стародворье%20104.ods'#Лист1.$A:.$G];7;0)" table:style-name="ce1">
            <text:p>0,4</text:p>
          </table:table-cell>
          <table:table-cell office:value-type="float" office:value="28" table:formula="of:=[.G118]*[.E118]" table:style-name="ce1">
            <text:p>28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Колбаса сырокопченая Сальчичон ТМ Стародворье в/у ф/в 0,07 кг нарезка Топ-ЛКК, Дистр МЗР</text:p>
          </table:table-cell>
          <table:table-cell table:style-name="ce1"/>
          <table:table-cell table:style-name="ce18"/>
          <table:table-cell table:style-name="ce20"/>
          <table:table-cell office:value-type="float" office:value="90" table:style-name="ce1">
            <text:p>90</text:p>
          </table:table-cell>
          <table:table-cell office:value-type="string" table:style-name="ce1">
            <text:p>шт</text:p>
          </table:table-cell>
          <table:table-cell office:value-type="float" office:value="7.0000000000000007E-2" table:formula="of:=VLOOKUP([.A119];['file:///C:/WORK/ПОКОМ_Останкино/2025_05/2025/ЗАВОДЫ/ПОКОМ/ОПТы/2025/12,25/31,12,25%20Коныгин/Стародворье%20104.ods'#Лист1.$A:.$G];7;0)" table:style-name="ce1">
            <text:p>0,07</text:p>
          </table:table-cell>
          <table:table-cell office:value-type="float" office:value="6.3000000000000007" table:formula="of:=[.G119]*[.E119]" table:style-name="ce1">
            <text:p>6,3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Колбаса сырокопченая Сервелат Ореховый ТМ Стародворье в/у ф/в 0,07 кг нарезка Топ-ЛКК, Дистр МЗР</text:p>
          </table:table-cell>
          <table:table-cell table:style-name="ce1"/>
          <table:table-cell table:style-name="ce18"/>
          <table:table-cell table:style-name="ce20"/>
          <table:table-cell office:value-type="float" office:value="54" table:style-name="ce1">
            <text:p>54</text:p>
          </table:table-cell>
          <table:table-cell office:value-type="string" table:style-name="ce1">
            <text:p>шт</text:p>
          </table:table-cell>
          <table:table-cell office:value-type="float" office:value="7.0000000000000007E-2" table:formula="of:=VLOOKUP([.A120];['file:///C:/WORK/ПОКОМ_Останкино/2025_05/2025/ЗАВОДЫ/ПОКОМ/ОПТы/2025/12,25/31,12,25%20Коныгин/Стародворье%20104.ods'#Лист1.$A:.$G];7;0)" table:style-name="ce1">
            <text:p>0,07</text:p>
          </table:table-cell>
          <table:table-cell office:value-type="float" office:value="3.7800000000000002" table:formula="of:=[.G120]*[.E120]" table:style-name="ce1">
            <text:p>3,78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Колбаса сыровяленая Фуэт ТМ Стародворье в/у ф/в 0,07 кг нарезка Топ-ЛКК, Дистр МЗР</text:p>
          </table:table-cell>
          <table:table-cell table:style-name="ce1"/>
          <table:table-cell table:style-name="ce18"/>
          <table:table-cell table:style-name="ce20"/>
          <table:table-cell office:value-type="float" office:value="36" table:style-name="ce1">
            <text:p>36</text:p>
          </table:table-cell>
          <table:table-cell office:value-type="string" table:style-name="ce1">
            <text:p>шт</text:p>
          </table:table-cell>
          <table:table-cell office:value-type="float" office:value="7.0000000000000007E-2" table:formula="of:=VLOOKUP([.A121];['file:///C:/WORK/ПОКОМ_Останкино/2025_05/2025/ЗАВОДЫ/ПОКОМ/ОПТы/2025/12,25/31,12,25%20Коныгин/Стародворье%20104.ods'#Лист1.$A:.$G];7;0)" table:style-name="ce1">
            <text:p>0,07</text:p>
          </table:table-cell>
          <table:table-cell office:value-type="float" office:value="2.5200000000000005" table:formula="of:=[.G121]*[.E121]" table:style-name="ce1">
            <text:p>2,52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Паштет печеночный Со сливочным маслом ТМ Стародворье ламистер ф/в 0,1 кг РК</text:p>
          </table:table-cell>
          <table:table-cell table:style-name="ce1"/>
          <table:table-cell table:style-name="ce18"/>
          <table:table-cell table:style-name="ce20"/>
          <table:table-cell office:value-type="float" office:value="100" table:style-name="ce1">
            <text:p>100</text:p>
          </table:table-cell>
          <table:table-cell office:value-type="string" table:style-name="ce1">
            <text:p>шт</text:p>
          </table:table-cell>
          <table:table-cell office:value-type="float" office:value="0.1" table:formula="of:=VLOOKUP([.A122];['file:///C:/WORK/ПОКОМ_Останкино/2025_05/2025/ЗАВОДЫ/ПОКОМ/ОПТы/2025/12,25/31,12,25%20Коныгин/Стародворье%20104.ods'#Лист1.$A:.$G];7;0)" table:style-name="ce1">
            <text:p>0,1</text:p>
          </table:table-cell>
          <table:table-cell office:value-type="float" office:value="10" table:formula="of:=[.G122]*[.E122]" table:style-name="ce1">
            <text:p>10</text:p>
          </table:table-cell>
          <table:table-cell table:number-columns-repeated="16376"/>
        </table:table-row>
        <table:table-row table:style-name="ro6">
          <table:table-cell table:number-columns-repeated="2" table:style-name="ce1"/>
          <table:table-cell table:style-name="ce18"/>
          <table:table-cell table:style-name="ce20"/>
          <table:table-cell table:style-name="ce22"/>
          <table:table-cell table:number-columns-repeated="2" table:style-name="ce1"/>
          <table:table-cell office:value-type="float" office:value="13166.9" table:formula="of:=SUM([.H2:.H122])" table:style-name="ce1">
            <text:p>13166,9</text:p>
          </table:table-cell>
          <table:table-cell table:number-columns-repeated="16376"/>
        </table:table-row>
        <table:table-row table:number-rows-repeated="1048453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'file:///C:/WORK/ПОКОМ_Останкино/2025_05/2025/ЗАВОДЫ/ПОКОМ/ОПТы/2025/12,25/31,12,25%20Коныгин/Стародворье%20104.ods'#Лист1" table:style-name="ta2">
        <table:table-source xlink:href="file:///C:/WORK/ПОКОМ_Останкино/2025_05/2025/ЗАВОДЫ/ПОКОМ/ОПТы/2025/12,25/31,12,25%20Коныгин/Стародворье%20104.ods" table:table-name="Лист1" table:mode="copy-results-only"/>
        <table:table-column/>
        <table:table-row>
          <table:table-cell office:value-type="string" office:string-value="позиция"/>
          <table:table-cell office:value-type="string" office:string-value="была"/>
          <table:table-cell office:value-type="string" office:string-value="цена"/>
          <table:table-cell office:value-type="string" office:string-value="отклонение"/>
          <table:table-cell office:value-type="string" office:string-value="Кол-во"/>
          <table:table-cell office:value-type="string" office:string-value="еи"/>
          <table:table-cell office:value-type="string" office:string-value="кооф"/>
          <table:table-cell table:number-columns-repeated="16377"/>
        </table:table-row>
        <table:table-row>
          <table:table-cell office:value-type="string" office:string-value=" 219  Колбаса Докторская Особая ТМ Особый рецепт, ВЕС  ПОКОМ, кг"/>
          <table:table-cell office:value-type="float" office:value="160.79"/>
          <table:table-cell office:value-type="float" office:value="167.25280000000001"/>
          <table:table-cell office:value-type="float" office:value="6.4628000000000156"/>
          <table:table-cell office:value-type="float" office:value="5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58  Колбаса Докторская Особая ТМ Особый рецепт,  0,5кг, ПОКОМ, шт"/>
          <table:table-cell office:value-type="float" office:value="117.62792"/>
          <table:table-cell office:value-type="float" office:value="123.2296"/>
          <table:table-cell office:value-type="float" office:value="5.6016800000000018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30  Колбаса Молочная Особая ТМ Особый рецепт, п/а, ВЕС. ПОКОМ, кг"/>
          <table:table-cell office:value-type="float" office:value="160.80000000000001"/>
          <table:table-cell office:value-type="float" office:value="167.26320000000001"/>
          <table:table-cell office:value-type="float" office:value="6.4632000000000005"/>
          <table:table-cell office:value-type="float" office:value="24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01  Ветчина Нежная ТМ Особый рецепт, (2,5кг), ПОКОМ, кг"/>
          <table:table-cell office:value-type="float" office:value="226.24"/>
          <table:table-cell office:value-type="float" office:value="231.2602"/>
          <table:table-cell office:value-type="float" office:value="5.0201999999999884"/>
          <table:table-cell office:value-type="float" office:value="5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43  Ветчина Нежная ТМ Особый рецепт, п/а, 0,4кг ПОКОМ, шт"/>
          <table:table-cell office:value-type="float" office:value="127.1589"/>
          <table:table-cell office:value-type="float" office:value="133.21360000000001"/>
          <table:table-cell office:value-type="float" office:value="6.0547000000000111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35  Колбаса Особая ТМ Особый рецепт, ВЕС, ТМ Стародворье ПОКОМ, кг"/>
          <table:table-cell office:value-type="float" office:value="160.80000000000001"/>
          <table:table-cell office:value-type="float" office:value="167.49199999999999"/>
          <table:table-cell office:value-type="float" office:value="6.6919999999999789"/>
          <table:table-cell office:value-type="float" office:value="27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68  Колбаса Особая ТМ Особый рецепт, 0,5 кг, ПОКОМ, шт"/>
          <table:table-cell office:value-type="float" office:value="112.02594000000001"/>
          <table:table-cell office:value-type="float" office:value="117.3536"/>
          <table:table-cell office:value-type="float" office:value="5.3276599999999945"/>
          <table:table-cell office:value-type="float" office:value="50"/>
          <table:table-cell office:value-type="string" office:string-value="шт"/>
          <table:table-cell office:value-type="float" office:value="0.5"/>
          <table:table-cell table:number-columns-repeated="16377"/>
        </table:table-row>
        <table:table-row>
          <table:table-cell office:value-type="string" office:string-value="005 Колбаса Докторская ГОСТ, Вязанка вектор,ВЕС. ПОКОМ, кг"/>
          <table:table-cell office:value-type="float" office:value="313.91455200000001"/>
          <table:table-cell office:value-type="float" office:value="328.04719999999998"/>
          <table:table-cell office:value-type="float" office:value="14.132647999999961"/>
          <table:table-cell office:value-type="float" office:value="22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06  Колбаса Докторская Классическая Вязанка вектор,ВЕС. ПОКОМ, кг (Классическая)"/>
          <table:table-cell office:value-type="float" office:value="256.01429999999999"/>
          <table:table-cell office:value-type="float" office:value="268.16399999999999"/>
          <table:table-cell office:value-type="float" office:value="12.149699999999996"/>
          <table:table-cell office:value-type="float" office:value="1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23  Колбаса Докторская ГОСТ, Вязанка вектор, 0,4 кг, ПОКОМ, шт"/>
          <table:table-cell office:value-type="float" office:value="174.51502500000001"/>
          <table:table-cell office:value-type="float" office:value="160.31440000000001"/>
          <table:table-cell office:value-type="float" office:value="-14.200625000000002"/>
          <table:table-cell office:value-type="float" office:value="30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 002   Колб. Молоч. стародворская, Вязанка вектор, ВЕС. ПОКОМ, кг"/>
          <table:table-cell office:value-type="float" office:value="255.70099999999999"/>
          <table:table-cell office:value-type="float" office:value="267.95600000000002"/>
          <table:table-cell office:value-type="float" office:value="12.255000000000024"/>
          <table:table-cell office:value-type="float" office:value="2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25  Колбаса Молочная стародворская, Вязанка вектор 0,5 кг,ПОКОМ, шт"/>
          <table:table-cell office:value-type="float" office:value="165.70038"/>
          <table:table-cell office:value-type="float" office:value="146.37540000000001"/>
          <table:table-cell office:value-type="float" office:value="-19.324979999999982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001 Ветчина Столичная Вязанка, вектор, ВЕС.ПОКОМ, кг"/>
          <table:table-cell office:value-type="float" office:value="266.52"/>
          <table:table-cell office:value-type="float" office:value="278.6472"/>
          <table:table-cell office:value-type="float" office:value="12.127200000000016"/>
          <table:table-cell office:value-type="float" office:value="3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20  Ветчина Столичная Вязанка, вектор 0.5кг, ПОКОМ, шт"/>
          <table:table-cell office:value-type="float" office:value="194.98908800000001"/>
          <table:table-cell office:value-type="float" office:value="182.37299999999999"/>
          <table:table-cell office:value-type="float" office:value="-12.616088000000019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004   Колбаса Вязанка со шпиком, вектор ВЕС, ПОКОМ, кг"/>
          <table:table-cell office:value-type="float" office:value="278.83849199999997"/>
          <table:table-cell office:value-type="float" office:value="285.7124"/>
          <table:table-cell office:value-type="float" office:value="6.8739080000000286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022  Колбаса Вязанка со шпиком, вектор 0,5кг, ПОКОМ, шт"/>
          <table:table-cell office:value-type="float" office:value="173.60811000000001"/>
          <table:table-cell office:value-type="float" office:value="159.48759999999999"/>
          <table:table-cell office:value-type="float" office:value="-14.120510000000024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37  Колбаса Русская по-стародворски, ВЕС.  ПОКОМ, кг"/>
          <table:table-cell office:value-type="float" office:value="219.70142200000001"/>
          <table:table-cell office:value-type="float" office:value="213.71719999999999"/>
          <table:table-cell office:value-type="float" office:value="-5.9842220000000168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20  Колбаса Докторская по-стародворски, амифлекс, ВЕС,   ПОКОМ, кг"/>
          <table:table-cell office:value-type="float" office:value="217.610938"/>
          <table:table-cell office:value-type="float" office:value="211.68199999999999"/>
          <table:table-cell office:value-type="float" office:value="-5.9289380000000165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059  Колбаса Докторская по-стародворски  0.5 кг, ПОКОМ, шт"/>
          <table:table-cell office:value-type="float" office:value="120.120814"/>
          <table:table-cell office:value-type="float" office:value="111.6604"/>
          <table:table-cell office:value-type="float" office:value="-8.4604140000000001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222 Колбаса Докторская стародворская, ВЕС, ВсхЗв ПОКОМ, кг"/>
          <table:table-cell office:value-type="float" office:value="248.82038600000001"/>
          <table:table-cell office:value-type="float" office:value="242.02979999999999"/>
          <table:table-cell office:value-type="float" office:value="-6.7905860000000189"/>
          <table:table-cell office:value-type="float" office:value="5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00  Ветчина Дугушка ТМ Стародворье, вектор в/у    ПОКОМ, кг"/>
          <table:table-cell office:value-type="float" office:value="260.20047"/>
          <table:table-cell office:value-type="float" office:value="275.18400000000003"/>
          <table:table-cell office:value-type="float" office:value="14.98353000000003"/>
          <table:table-cell office:value-type="float" office:value="2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17  Колбаса Докторская Дугушка, ВЕС, НЕ ГОСТ, ТМ Стародворье ПОКОМ, кг"/>
          <table:table-cell office:value-type="float" office:value="218.82871"/>
          <table:table-cell office:value-type="float" office:value="229.23679999999999"/>
          <table:table-cell office:value-type="float" office:value="10.408089999999987"/>
          <table:table-cell office:value-type="float" office:value="25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239 Колбаса Салями запеч Дугушка, оболочка вектор, ВЕС, ТМ Стародворье ПОКОМ, кг"/>
          <table:table-cell office:value-type="float" office:value="287.48537599999997"/>
          <table:table-cell office:value-type="float" office:value="304.05439999999999"/>
          <table:table-cell office:value-type="float" office:value="16.569024000000013"/>
          <table:table-cell office:value-type="float" office:value="8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36  Колбаса Рубленая ЗАПЕЧ. Дугушка ТМ Стародворье, вектор, в/к    ПОКОМ, кг"/>
          <table:table-cell office:value-type="float" office:value="273.982145"/>
          <table:table-cell office:value-type="float" office:value="289.79599999999999"/>
          <table:table-cell office:value-type="float" office:value="15.81385499999999"/>
          <table:table-cell office:value-type="float" office:value="5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242 Колбаса Сервелат ЗАПЕЧ.Дугушка ТМ Стародворье, вектор, в/к ПОКОМ, кг"/>
          <table:table-cell office:value-type="float" office:value="271.28205000000003"/>
          <table:table-cell office:value-type="float" office:value="286.93599999999998"/>
          <table:table-cell office:value-type="float" office:value="15.653949999999952"/>
          <table:table-cell office:value-type="float" office:value="2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34  Колбаса Нежная, п/а, ВЕС, ТМ КОЛБАСНЫЙ СТАНДАРТ ВсхЗв ПОКОМ, кг"/>
          <table:table-cell office:value-type="float" office:value="148.63"/>
          <table:table-cell office:value-type="float" office:value="155.68799999999999"/>
          <table:table-cell office:value-type="float" office:value="7.0579999999999927"/>
          <table:table-cell office:value-type="float" office:value="24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03   Колбаса Вязанка с индейкой, вектор ВЕС, ПОКОМ, кгВЫВЕЛИ!!!!"/>
          <table:table-cell office:value-type="float" office:value="298.84685000000002"/>
          <table:table-cell office:value-type="float" office:value="304.69920000000002"/>
          <table:table-cell office:value-type="float" office:value="5.8523500000000013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40  Колбаса Салями охотничья, ВЕС. ПОКОМ, кг"/>
          <table:table-cell office:value-type="float" office:value="736.27"/>
          <table:table-cell office:value-type="float" office:value="741.61360000000002"/>
          <table:table-cell office:value-type="float" office:value="5.3436000000000377"/>
          <table:table-cell office:value-type="float" office:value="18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13  Сардельки Вязанка Стародворские NDX, ВЕС.  ПОКОМ, кг"/>
          <table:table-cell office:value-type="float" office:value="286.38917099999998"/>
          <table:table-cell office:value-type="float" office:value="261.90480000000002"/>
          <table:table-cell office:value-type="float" office:value="-24.484370999999953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47  Сардельки Нежные, ВЕС.  ПОКОМ, кг"/>
          <table:table-cell office:value-type="float" office:value="252.64304000000001"/>
          <table:table-cell office:value-type="float" office:value="234.3236"/>
          <table:table-cell office:value-type="float" office:value="-18.319440000000014"/>
          <table:table-cell office:value-type="float" office:value="8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16  Сосиски Вязанка Молочные, Вязанка вискофан  ВЕС.ПОКОМ, кг"/>
          <table:table-cell office:value-type="float" office:value="280.31457999999998"/>
          <table:table-cell office:value-type="float" office:value="281.67360000000002"/>
          <table:table-cell office:value-type="float" office:value="1.3590200000000436"/>
          <table:table-cell office:value-type="float" office:value="8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38  Колбаса Салями Баварушка зернистая, оболочка фиброуз, ВЕС, ТС Баварушка  ПОКОМ, кг"/>
          <table:table-cell office:value-type="float" office:value="323.81"/>
          <table:table-cell office:value-type="float" office:value="329.42"/>
          <table:table-cell office:value-type="float" office:value="5.6100000000000136"/>
          <table:table-cell office:value-type="float" office:value="3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66  Колбаса Филейбургская с сочным окороком, ВЕС, ТМ Баварушка  ПОКОМ, кг"/>
          <table:table-cell office:value-type="float" office:value="316.08999999999997"/>
          <table:table-cell office:value-type="float" office:value="321.55759999999998"/>
          <table:table-cell office:value-type="float" office:value="5.4676000000000045"/>
          <table:table-cell office:value-type="float" office:value="3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11  Колбаса Баварушка с душистым чесноком, ВЕС, фиброуз в/у, ТМ Стародворье ПОКОМ, кг"/>
          <table:table-cell office:value-type="float" office:value="319.94639999999998"/>
          <table:table-cell office:value-type="float" office:value="325.48880000000003"/>
          <table:table-cell office:value-type="float" office:value="5.5424000000000433"/>
          <table:table-cell office:value-type="float" office:value="2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265 Колбаса Балыкбургская, ВЕС, ТМ Баварушка ПОКОМ, кг"/>
          <table:table-cell office:value-type="float" office:value="326.83087"/>
          <table:table-cell office:value-type="float" office:value="332.4984"/>
          <table:table-cell office:value-type="float" office:value="5.6675299999999993"/>
          <table:table-cell office:value-type="float" office:value="2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43  Колбаса Сервелат Зернистый, ВЕС.  ПОКОМ, кг"/>
          <table:table-cell office:value-type="float" office:value="319.63"/>
          <table:table-cell office:value-type="float" office:value="301.0718"/>
          <table:table-cell office:value-type="float" office:value="-18.558199999999999"/>
          <table:table-cell office:value-type="float" office:value="15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244 Колбаса Сервелат Кремлевский, ВЕС. ПОКОМ, кг"/>
          <table:table-cell office:value-type="float" office:value="288.51130000000001"/>
          <table:table-cell office:value-type="float" office:value="299.32240000000002"/>
          <table:table-cell office:value-type="float" office:value="10.81110000000001"/>
          <table:table-cell office:value-type="float" office:value="3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70  Колбаса Сервелат Филейный ТМ Особый Рецепт, ВЕС. ПОКОМ, кг"/>
          <table:table-cell office:value-type="float" office:value="270.57995"/>
          <table:table-cell office:value-type="float" office:value="272.54239999999999"/>
          <table:table-cell office:value-type="float" office:value="1.9624499999999898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71  Колбаса Сервелат Левантский ТМ Особый Рецепт, ВЕС. ПОКОМ, кг"/>
          <table:table-cell office:value-type="float" office:value="254.74727999999999"/>
          <table:table-cell office:value-type="float" office:value="234.03739999999999"/>
          <table:table-cell office:value-type="float" office:value="-20.709879999999998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51  Сосиски Баварские, ВЕС.  ПОКОМ, кг"/>
          <table:table-cell office:value-type="float" office:value="226.72954999999999"/>
          <table:table-cell office:value-type="float" office:value="235.22720000000001"/>
          <table:table-cell office:value-type="float" office:value="8.4976500000000215"/>
          <table:table-cell office:value-type="float" office:value="16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57  Сосиски Молочные оригинальные ТМ Особый рецепт, ВЕС.   ПОКОМ, кг"/>
          <table:table-cell office:value-type="float" office:value="208.57095000000001"/>
          <table:table-cell office:value-type="float" office:value="218.48320000000001"/>
          <table:table-cell office:value-type="float" office:value="9.9122500000000002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55  Сосиски Молочные для завтрака ТМ Особый рецепт, п/а МГС, ВЕС, ТМ Стародворье  ПОКОМ, кг"/>
          <table:table-cell office:value-type="float" office:value="199.584"/>
          <table:table-cell office:value-type="float" office:value="209.08160000000001"/>
          <table:table-cell office:value-type="float" office:value="9.4976000000000056"/>
          <table:table-cell office:value-type="float" office:value="45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53  Сосиски Ганноверские   ПОКОМ, кг"/>
          <table:table-cell office:value-type="float" office:value="177.67252500000001"/>
          <table:table-cell office:value-type="float" office:value="187.91759999999999"/>
          <table:table-cell office:value-type="float" office:value="10.245074999999986"/>
          <table:table-cell office:value-type="float" office:value="10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17  Сосиски Вязанка Сливочные, Вязанка амицел ВЕС.ПОКОМ, кг"/>
          <table:table-cell office:value-type="float" office:value="294.38225699999998"/>
          <table:table-cell office:value-type="float" office:value="295.79680000000002"/>
          <table:table-cell office:value-type="float" office:value="1.4145430000000374"/>
          <table:table-cell office:value-type="float" office:value="4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63  Шпикачки Стародворские, ВЕС.  ПОКОМ, кг"/>
          <table:table-cell office:value-type="float" office:value="274.20883199999997"/>
          <table:table-cell office:value-type="float" office:value="239.3586"/>
          <table:table-cell office:value-type="float" office:value="-34.850231999999977"/>
          <table:table-cell office:value-type="float" office:value="10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012  Колбаса Сервелат Столичный, Вязанка фиброуз в/у, ПОКОМ, кг"/>
          <table:table-cell office:value-type="float" office:value="367.29562499999997"/>
          <table:table-cell office:value-type="float" office:value="369.98"/>
          <table:table-cell office:value-type="float" office:value="2.6843750000000455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29  Колбаса Молочная Дугушка, в/у, ВЕС, ТМ Стародворье   ПОКОМ, кг"/>
          <table:table-cell office:value-type="float" office:value="230.54736"/>
          <table:table-cell office:value-type="float" office:value="241.51920000000001"/>
          <table:table-cell office:value-type="float" office:value="10.971840000000014"/>
          <table:table-cell office:value-type="float" office:value="12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50  Сардельки стародворские с говядиной в обол. NDX, ВЕС. ПОКОМ, кг"/>
          <table:table-cell office:value-type="float" office:value="222.64696000000001"/>
          <table:table-cell office:value-type="float" office:value="234.22880000000001"/>
          <table:table-cell office:value-type="float" office:value="11.58184"/>
          <table:table-cell office:value-type="float" office:value="12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 226  Колбаса Княжеская, с/к белков.обол в термоусад. пакете, ВЕС, ТМ Стародворье ПОКОМ, кг"/>
          <table:table-cell office:value-type="float" office:value="889.2"/>
          <table:table-cell office:value-type="float" office:value="895.65840000000003"/>
          <table:table-cell office:value-type="float" office:value="6.4583999999999833"/>
          <table:table-cell office:value-type="float" office:value="21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Ветчина Вязанка с индейкой вес"/>
          <table:table-cell office:value-type="float" office:value="329.66404999999997"/>
          <table:table-cell office:value-type="float" office:value="336.12799999999999"/>
          <table:table-cell office:value-type="float" office:value="6.4639500000000112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 213  Колбаса в/к Сервелат Рижский, ВЕС.,ТМ КОЛБАСНЫЙ СТАНДАРТ ПОКОМ, кг"/>
          <table:table-cell office:value-type="float" office:value="231.55389"/>
          <table:table-cell office:value-type="float" office:value="212.7208"/>
          <table:table-cell office:value-type="float" office:value="-18.833089999999999"/>
          <table:table-cell office:value-type="float" office:value="4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Ветчина Балыкбургская Баварушка"/>
          <table:table-cell office:value-type="float" office:value="280.21312499999999"/>
          <table:table-cell office:value-type="float" office:value="285.07440000000003"/>
          <table:table-cell office:value-type="float" office:value="4.8612750000000347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Сосиски Датские в газе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77"/>
        </table:table-row>
        <table:table-row>
          <table:table-cell office:value-type="string" office:string-value="Колбаса сырокопченая Баварская ТМ Стародворье б/о т/п ф/в 0,17 кг АК"/>
          <table:table-cell table:number-columns-repeated="3"/>
          <table:table-cell office:value-type="float" office:value="150"/>
          <table:table-cell office:value-type="string" office:string-value="шт"/>
          <table:table-cell office:value-type="float" office:value="0.17"/>
          <table:table-cell table:number-columns-repeated="16377"/>
        </table:table-row>
        <table:table-row>
          <table:table-cell office:value-type="string" office:string-value="Колбаса сырокопченая Швейцарская ТМ Стародворье фиброуз терм/п ф/в 0,17 кг АК"/>
          <table:table-cell table:number-columns-repeated="3"/>
          <table:table-cell office:value-type="float" office:value="150"/>
          <table:table-cell office:value-type="string" office:string-value="шт"/>
          <table:table-cell office:value-type="float" office:value="0.17"/>
          <table:table-cell table:number-columns-repeated="16377"/>
        </table:table-row>
        <table:table-row>
          <table:table-cell office:value-type="string" office:string-value="Колбаса варено-копченая Балыковая ТМ Стародворские колбасы ТС Вязанка фиброуз в/у вес НД2 СК1"/>
          <table:table-cell table:number-columns-repeated="3"/>
          <table:table-cell office:value-type="float" office:value="2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Колбаса варено-копченая Сервелат Кремлевский ТМ Стародворье фиброуз в/у ф/в 0,35 кг срез УВС СК2"/>
          <table:table-cell table:number-columns-repeated="3"/>
          <table:table-cell office:value-type="float" office:value="84"/>
          <table:table-cell office:value-type="string" office:string-value="шт"/>
          <table:table-cell office:value-type="float" office:value="0.35"/>
          <table:table-cell table:number-columns-repeated="16377"/>
        </table:table-row>
        <table:table-row>
          <table:table-cell office:value-type="string" office:string-value="Колбаса варено-копченая Сочинка по-европейски с сочной грудинкой ТМ Стародворье фиброуз в/у вес СК2"/>
          <table:table-cell table:number-columns-repeated="3"/>
          <table:table-cell office:value-type="float" office:value="3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Колбаса полукопченая Аль-Ислами ТМ Вязанка Халяль фиброуз в/у ф/в 0,35 кг АК"/>
          <table:table-cell table:number-columns-repeated="3"/>
          <table:table-cell office:value-type="float" office:value="144"/>
          <table:table-cell office:value-type="string" office:string-value="шт"/>
          <table:table-cell office:value-type="float" office:value="0.35"/>
          <table:table-cell table:number-columns-repeated="16377"/>
        </table:table-row>
        <table:table-row>
          <table:table-cell office:value-type="string" office:string-value="Колбаса полукопченая Сочинка рубленая с сочным окороком ТМ Стародворье фиброуз в/у ф/в 0,3 кг срез СК2"/>
          <table:table-cell table:number-columns-repeated="3"/>
          <table:table-cell office:value-type="float" office:value="90"/>
          <table:table-cell office:value-type="string" office:string-value="шт"/>
          <table:table-cell office:value-type="float" office:value="0.3"/>
          <table:table-cell table:number-columns-repeated="16377"/>
        </table:table-row>
        <table:table-row>
          <table:table-cell office:value-type="string" office:string-value="Колбаса вареная Молочная Дугушка ТМ Стародворье ТС Дугушка полиамид ф/в 0,4 кг СК1"/>
          <table:table-cell table:number-columns-repeated="3"/>
          <table:table-cell office:value-type="float" office:value="12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Колбаса вареная Молочная Традиционная ТМ Стародворье полиамид ф/в 0,4 кг СК1"/>
          <table:table-cell table:number-columns-repeated="3"/>
          <table:table-cell office:value-type="float" office:value="6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Колбаса вареная Мусульманская Халяль ТМ Вязанка вектор ф/в 0,4 кг АК"/>
          <table:table-cell table:number-columns-repeated="3"/>
          <table:table-cell office:value-type="float" office:value="8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Колбаса вареная Стародворская Традиционная ТМ Стародворье полиамид ф/в 0,4 кг СК1"/>
          <table:table-cell table:number-columns-repeated="3"/>
          <table:table-cell office:value-type="float" office:value="9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Ветчина Сливушка с индейкой ТМ Вязанка полиамид 0,3 кг УВС СК1"/>
          <table:table-cell table:number-columns-repeated="3"/>
          <table:table-cell office:value-type="float" office:value="56"/>
          <table:table-cell office:value-type="string" office:string-value="шт"/>
          <table:table-cell office:value-type="float" office:value="0.3"/>
          <table:table-cell table:number-columns-repeated="16377"/>
        </table:table-row>
        <table:table-row>
          <table:table-cell office:value-type="string" office:string-value="Ветчина Филейская ТМ Вязанка ТС Столичная полиамид ф/в 0,45 кг НД СК3"/>
          <table:table-cell table:number-columns-repeated="3"/>
          <table:table-cell office:value-type="float" office:value="240"/>
          <table:table-cell office:value-type="string" office:string-value="шт"/>
          <table:table-cell office:value-type="float" office:value="0.45"/>
          <table:table-cell table:number-columns-repeated="16377"/>
        </table:table-row>
        <table:table-row>
          <table:table-cell office:value-type="string" office:string-value="Сосиски Восточные халяль ТМ Вязанка полиамид в/у ф/в 0,33 кг АК"/>
          <table:table-cell table:number-columns-repeated="3"/>
          <table:table-cell office:value-type="float" office:value="48"/>
          <table:table-cell office:value-type="string" office:string-value="шт"/>
          <table:table-cell office:value-type="float" office:value="0.33"/>
          <table:table-cell table:number-columns-repeated="16377"/>
        </table:table-row>
        <table:table-row>
          <table:table-cell office:value-type="string" office:string-value="Сосиски Сочинки по-баварски с сыром ТМ Стародворье полиамид мгс ф/в 0,4 кг УВС СК4"/>
          <table:table-cell table:number-columns-repeated="3"/>
          <table:table-cell office:value-type="float" office:value="3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Бекон Вяленый выдержанный ТМ Стародворье в/у ф/в 0,055 кг нарезка Топ-ЛКК, Дистр МЗР"/>
          <table:table-cell table:number-columns-repeated="3"/>
          <table:table-cell office:value-type="float" office:value="54"/>
          <table:table-cell office:value-type="string" office:string-value="шт"/>
          <table:table-cell office:value-type="float" office:value="5.5E-2"/>
          <table:table-cell table:number-columns-repeated="16377"/>
        </table:table-row>
        <table:table-row>
          <table:table-cell office:value-type="string" office:string-value="Бекон сырокопченый ТМ Стародворье в/у ф/в 0,12 кг нарезка УМК Топ-ЛКК, Дистр МЗР"/>
          <table:table-cell table:number-columns-repeated="3"/>
          <table:table-cell office:value-type="float" office:value="45"/>
          <table:table-cell office:value-type="string" office:string-value="шт"/>
          <table:table-cell office:value-type="float" office:value="0.12"/>
          <table:table-cell table:number-columns-repeated="16377"/>
        </table:table-row>
        <table:table-row>
          <table:table-cell office:value-type="string" office:string-value="Грудинка копчено-вареная ТМ Стародворье в/у ф/в 0,12 кг нарезка УМК Топ-ЛКК, Дистр МЗР"/>
          <table:table-cell table:number-columns-repeated="3"/>
          <table:table-cell office:value-type="float" office:value="90"/>
          <table:table-cell office:value-type="string" office:string-value="шт"/>
          <table:table-cell office:value-type="float" office:value="0.12"/>
          <table:table-cell table:number-columns-repeated="16377"/>
        </table:table-row>
        <table:table-row>
          <table:table-cell office:value-type="string" office:string-value="Колбаса сырокопченая Мраморная ТМ Стародворье в/у ф/в 0,07 кг нарезка Топ-ЛКК, Дистр МЗР"/>
          <table:table-cell table:number-columns-repeated="3"/>
          <table:table-cell office:value-type="float" office:value="126"/>
          <table:table-cell office:value-type="string" office:string-value="шт"/>
          <table:table-cell office:value-type="float" office:value="7.0000000000000007E-2"/>
          <table:table-cell table:number-columns-repeated="16377"/>
        </table:table-row>
        <table:table-row>
          <table:table-cell office:value-type="string" office:string-value="Корейка Вяленая выдержанная ТМ Стародворье в/у ф/в 0,05 кг нарезка Топ-ЛКК, Дистр МЗР"/>
          <table:table-cell table:number-columns-repeated="3"/>
          <table:table-cell office:value-type="float" office:value="36"/>
          <table:table-cell office:value-type="string" office:string-value="шт"/>
          <table:table-cell office:value-type="float" office:value="0.05"/>
          <table:table-cell table:number-columns-repeated="16377"/>
        </table:table-row>
        <table:table-row>
          <table:table-cell office:value-type="string" office:string-value="Окорок Прошутто сыровяленый выдержанный ТМ Стародворье в/у ф/в 0,055 кг нарезка Топ-ЛКК, Дистр МЗР"/>
          <table:table-cell table:number-columns-repeated="3"/>
          <table:table-cell office:value-type="float" office:value="54"/>
          <table:table-cell office:value-type="string" office:string-value="шт"/>
          <table:table-cell office:value-type="float" office:value="5.5E-2"/>
          <table:table-cell table:number-columns-repeated="16377"/>
        </table:table-row>
        <table:table-row>
          <table:table-cell office:value-type="string" office:string-value="Окорок Хамон Вяленый выдержанный ТМ Стародворье в/у ф/в 0,055 кг нарезка Топ-ЛКК, Дистр МЗР"/>
          <table:table-cell table:number-columns-repeated="3"/>
          <table:table-cell office:value-type="float" office:value="36"/>
          <table:table-cell office:value-type="string" office:string-value="шт"/>
          <table:table-cell office:value-type="float" office:value="5.5E-2"/>
          <table:table-cell table:number-columns-repeated="16377"/>
        </table:table-row>
        <table:table-row>
          <table:table-cell office:value-type="string" office:string-value="Паштет Любительский ТМ Стародворье ламистер ф/в 0,1 кг РК"/>
          <table:table-cell table:number-columns-repeated="3"/>
          <table:table-cell office:value-type="float" office:value="100"/>
          <table:table-cell office:value-type="string" office:string-value="шт"/>
          <table:table-cell office:value-type="float" office:value="0.1"/>
          <table:table-cell table:number-columns-repeated="16377"/>
        </table:table-row>
        <table:table-row>
          <table:table-cell office:value-type="string" office:string-value="Паштет печеночный с морковью ТМ Стародворье ламистер ф/в 0,1 кг НКК, Топ-ЛКК, Дистр РК"/>
          <table:table-cell table:number-columns-repeated="3"/>
          <table:table-cell office:value-type="float" office:value="100"/>
          <table:table-cell office:value-type="string" office:string-value="шт"/>
          <table:table-cell office:value-type="float" office:value="0.1"/>
          <table:table-cell table:number-columns-repeated="16377"/>
        </table:table-row>
        <table:table-row>
          <table:table-cell office:value-type="string" office:string-value="Колбаса варено-копченая Мясорубская ТМ Стародворье с рубленой грудинкой фиброуз в/у ф/в 0,35 кг срез СК2"/>
          <table:table-cell table:number-columns-repeated="3"/>
          <table:table-cell office:value-type="float" office:value="250"/>
          <table:table-cell office:value-type="string" office:string-value="шт"/>
          <table:table-cell office:value-type="float" office:value="0.35"/>
          <table:table-cell table:number-columns-repeated="16377"/>
        </table:table-row>
        <table:table-row>
          <table:table-cell office:value-type="string" office:string-value="Колбаса варено-копченая Рубленая Запеченная ТМ Стародворье ТС Дугушка вектор ф/в 0,6 кг УВС1 СК1"/>
          <table:table-cell table:number-columns-repeated="3"/>
          <table:table-cell office:value-type="float" office:value="16"/>
          <table:table-cell office:value-type="string" office:string-value="шт"/>
          <table:table-cell office:value-type="float" office:value="0.6"/>
          <table:table-cell table:number-columns-repeated="16377"/>
        </table:table-row>
        <table:table-row>
          <table:table-cell office:value-type="string" office:string-value="Колбаса варено-копченая Салями Запеченная ТМ Стародворье ТС Дугушка вектор ф/в 0,6 кг УВС1 СК2"/>
          <table:table-cell table:number-columns-repeated="3"/>
          <table:table-cell office:value-type="float" office:value="16"/>
          <table:table-cell office:value-type="string" office:string-value="шт"/>
          <table:table-cell office:value-type="float" office:value="0.6"/>
          <table:table-cell table:number-columns-repeated="16377"/>
        </table:table-row>
        <table:table-row>
          <table:table-cell office:value-type="string" office:string-value="Колбаса варено-копченая Салями Мясорубская ТМ Стародворье с рубленым шпиком фиброуз в/у ф/в 0,35 кг срез СК2"/>
          <table:table-cell table:number-columns-repeated="3"/>
          <table:table-cell office:value-type="float" office:value="230"/>
          <table:table-cell office:value-type="string" office:string-value="шт"/>
          <table:table-cell office:value-type="float" office:value="0.35"/>
          <table:table-cell table:number-columns-repeated="16377"/>
        </table:table-row>
        <table:table-row>
          <table:table-cell office:value-type="string" office:string-value="Колбаса варено-копченая Салями Филейбургская зернистая ТМ Баварушка фиброуз в/у ф/в 0,35 кг срез УВС2 СК2"/>
          <table:table-cell table:number-columns-repeated="3"/>
          <table:table-cell office:value-type="float" office:value="18"/>
          <table:table-cell office:value-type="string" office:string-value="шт"/>
          <table:table-cell office:value-type="float" office:value="0.35"/>
          <table:table-cell table:number-columns-repeated="16377"/>
        </table:table-row>
        <table:table-row>
          <table:table-cell office:value-type="string" office:string-value="Колбаса варено-копченая Сервелат Запеченный ТМ Стародворье ТС Дугушка вектор ф/в 0,6 кг УВС1 СК2"/>
          <table:table-cell table:number-columns-repeated="3"/>
          <table:table-cell office:value-type="float" office:value="18"/>
          <table:table-cell office:value-type="string" office:string-value="шт"/>
          <table:table-cell office:value-type="float" office:value="0.6"/>
          <table:table-cell table:number-columns-repeated="16377"/>
        </table:table-row>
        <table:table-row>
          <table:table-cell office:value-type="string" office:string-value="Колбаса варено-копченая Сервелат Мясорубский ТМ Стародворье с мелкорубленным окороком фиброуз в/у вес СК2"/>
          <table:table-cell table:number-columns-repeated="3"/>
          <table:table-cell office:value-type="float" office:value="9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Колбаса варено-копченая Сервелат Мясорубский ТМ Стародворье с мелкорубленным окороком фиброуз в/у ф/в 0,35 кг срез СК2"/>
          <table:table-cell table:number-columns-repeated="3"/>
          <table:table-cell office:value-type="float" office:value="240"/>
          <table:table-cell office:value-type="string" office:string-value="шт"/>
          <table:table-cell office:value-type="float" office:value="0.35"/>
          <table:table-cell table:number-columns-repeated="16377"/>
        </table:table-row>
        <table:table-row>
          <table:table-cell office:value-type="string" office:string-value="Колбаса варено-копченая Сервелат Филедворский ТМ Стародворье фиброуз в/у ф/в 0,35 кг срез НД2 СК2"/>
          <table:table-cell table:number-columns-repeated="3"/>
          <table:table-cell office:value-type="float" office:value="120"/>
          <table:table-cell office:value-type="string" office:string-value="шт"/>
          <table:table-cell office:value-type="float" office:value="0.35"/>
          <table:table-cell table:number-columns-repeated="16377"/>
        </table:table-row>
        <table:table-row>
          <table:table-cell office:value-type="string" office:string-value="Колбаса варено-копченая Сочинка по-европейски с сочной грудинкой ТМ Стародворье фиброуз в/у ф/в 0,3 кг срез СК2"/>
          <table:table-cell table:number-columns-repeated="3"/>
          <table:table-cell office:value-type="float" office:value="210"/>
          <table:table-cell office:value-type="string" office:string-value="шт"/>
          <table:table-cell office:value-type="float" office:value="0.3"/>
          <table:table-cell table:number-columns-repeated="16377"/>
        </table:table-row>
        <table:table-row>
          <table:table-cell office:value-type="string" office:string-value="Колбаса варено-копченая Сочинка по-фински с сочным окороком ТМ Стародворье фиброуз в/у ф/в 0,3 кг срез СК2"/>
          <table:table-cell table:number-columns-repeated="3"/>
          <table:table-cell office:value-type="float" office:value="150"/>
          <table:table-cell office:value-type="string" office:string-value="шт"/>
          <table:table-cell office:value-type="float" office:value="0.3"/>
          <table:table-cell table:number-columns-repeated="16377"/>
        </table:table-row>
        <table:table-row>
          <table:table-cell office:value-type="string" office:string-value="Колбаса полукопченая Кракушка пряная с сальцем ТМ Стародворье ТС Баварушка черева в/у ф/в 0,3 кг СК2"/>
          <table:table-cell table:number-columns-repeated="3"/>
          <table:table-cell office:value-type="float" office:value="180"/>
          <table:table-cell office:value-type="string" office:string-value="шт"/>
          <table:table-cell office:value-type="float" office:value="0.3"/>
          <table:table-cell table:number-columns-repeated="16377"/>
        </table:table-row>
        <table:table-row>
          <table:table-cell office:value-type="string" office:string-value="Колбаса полукопченая Сочинка зернистая с сочной грудинкой ТМ Стародворье фиброуз в/у вес СК2"/>
          <table:table-cell table:number-columns-repeated="3"/>
          <table:table-cell office:value-type="float" office:value="2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Колбаса вареная Докторская ТМ Стародворье ТС Дугушка полиамид ф/в 0,6 кг УВК СК3"/>
          <table:table-cell table:number-columns-repeated="3"/>
          <table:table-cell office:value-type="float" office:value="16"/>
          <table:table-cell office:value-type="string" office:string-value="шт"/>
          <table:table-cell office:value-type="float" office:value="0.6"/>
          <table:table-cell table:number-columns-repeated="16377"/>
        </table:table-row>
        <table:table-row>
          <table:table-cell office:value-type="string" office:string-value="Колбаса вареная Докторский гарант ТМ Вязанка вектор ф/в 0,4 кг СК3"/>
          <table:table-cell table:number-columns-repeated="3"/>
          <table:table-cell office:value-type="float" office:value="24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Колбаса вареная Молокуша ТМ Вязанка полиамид ф/в 0,45 кг СК3"/>
          <table:table-cell table:number-columns-repeated="3"/>
          <table:table-cell office:value-type="float" office:value="240"/>
          <table:table-cell office:value-type="string" office:string-value="шт"/>
          <table:table-cell office:value-type="float" office:value="0.45"/>
          <table:table-cell table:number-columns-repeated="16377"/>
        </table:table-row>
        <table:table-row>
          <table:table-cell office:value-type="string" office:string-value="Колбаса вареная Молочная по-стародворски ТМ Стародворье полиамид вес СК2"/>
          <table:table-cell table:number-columns-repeated="3"/>
          <table:table-cell office:value-type="float" office:value="6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Колбаса вареная Молочная Традиционная ТМ Стародворье полиамид вес СК1"/>
          <table:table-cell table:number-columns-repeated="3"/>
          <table:table-cell office:value-type="float" office:value="5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Колбаса вареная Сливушка ТМ Вязанка полиамид вес СК3"/>
          <table:table-cell table:number-columns-repeated="3"/>
          <table:table-cell office:value-type="float" office:value="7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Колбаса вареная Сливушка ТМ Вязанка полиамид 0,375 кг СК3"/>
          <table:table-cell table:number-columns-repeated="3"/>
          <table:table-cell office:value-type="float" office:value="180"/>
          <table:table-cell office:value-type="string" office:string-value="шт"/>
          <table:table-cell office:value-type="float" office:value="0.375"/>
          <table:table-cell table:number-columns-repeated="16377"/>
        </table:table-row>
        <table:table-row>
          <table:table-cell office:value-type="string" office:string-value="Колбаса вареная Сливушка ТМ Вязанка полиамид 0,45 кг СК3"/>
          <table:table-cell table:number-columns-repeated="3"/>
          <table:table-cell office:value-type="float" office:value="120"/>
          <table:table-cell office:value-type="string" office:string-value="шт"/>
          <table:table-cell office:value-type="float" office:value="0.45"/>
          <table:table-cell table:number-columns-repeated="16377"/>
        </table:table-row>
        <table:table-row>
          <table:table-cell office:value-type="string" office:string-value="Колбаса вареная Стародворская Традиционная со шпиком ТМ Стародворье полиамид вес СК1"/>
          <table:table-cell table:number-columns-repeated="3"/>
          <table:table-cell office:value-type="float" office:value="9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Колбаса вареная Филедворская по-стародворски ТМ Стародворье полиамид вес СК2"/>
          <table:table-cell table:number-columns-repeated="3"/>
          <table:table-cell office:value-type="float" office:value="150"/>
          <table:table-cell office:value-type="string" office:string-value="кг"/>
          <table:table-cell office:value-type="float" office:value="1"/>
          <table:table-cell table:number-columns-repeated="16377"/>
        </table:table-row>
        <table:table-row>
          <table:table-cell office:value-type="string" office:string-value="Колбаса вареная Филейная ТМ Особый рецепт полиамид ф/в 0,5 кг СК4"/>
          <table:table-cell table:number-columns-repeated="3"/>
          <table:table-cell office:value-type="float" office:value="70"/>
          <table:table-cell office:value-type="string" office:string-value="шт"/>
          <table:table-cell office:value-type="float" office:value="0.5"/>
          <table:table-cell table:number-columns-repeated="16377"/>
        </table:table-row>
        <table:table-row>
          <table:table-cell office:value-type="string" office:string-value="Колбаса вареная Филейская ТМ Вязанка ТС Классическая полиамид ф/в 0,45 кг НД СК3"/>
          <table:table-cell table:number-columns-repeated="3"/>
          <table:table-cell office:value-type="float" office:value="300"/>
          <table:table-cell office:value-type="string" office:string-value="шт"/>
          <table:table-cell office:value-type="float" office:value="0.45"/>
          <table:table-cell table:number-columns-repeated="16377"/>
        </table:table-row>
        <table:table-row>
          <table:table-cell office:value-type="string" office:string-value="Ветчина Нежная ТМ Особый рецепт полиамид ф/в 0,4 кг СК1"/>
          <table:table-cell table:number-columns-repeated="3"/>
          <table:table-cell office:value-type="float" office:value="3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Сосиски Баварские с сыром ТМ Стародворье айпил мгс ф/в 0,35 кг СК4"/>
          <table:table-cell table:number-columns-repeated="3"/>
          <table:table-cell office:value-type="float" office:value="240"/>
          <table:table-cell office:value-type="string" office:string-value="шт"/>
          <table:table-cell office:value-type="float" office:value="0.35"/>
          <table:table-cell table:number-columns-repeated="16377"/>
        </table:table-row>
        <table:table-row>
          <table:table-cell office:value-type="string" office:string-value="Сосиски Ганноверские ТМ Стародворье амицел мгс ф/в 0,5 кг СК4"/>
          <table:table-cell table:number-columns-repeated="3"/>
          <table:table-cell office:value-type="float" office:value="180"/>
          <table:table-cell office:value-type="string" office:string-value="шт"/>
          <table:table-cell office:value-type="float" office:value="0.5"/>
          <table:table-cell table:number-columns-repeated="16377"/>
        </table:table-row>
        <table:table-row>
          <table:table-cell office:value-type="string" office:string-value="Сосиски Молокуши миникушай ТМ Вязанка амицел мгс ф/в 0,33 кг УВС СК3"/>
          <table:table-cell table:number-columns-repeated="3"/>
          <table:table-cell office:value-type="float" office:value="180"/>
          <table:table-cell office:value-type="string" office:string-value="шт"/>
          <table:table-cell office:value-type="float" office:value="0.33"/>
          <table:table-cell table:number-columns-repeated="16377"/>
        </table:table-row>
        <table:table-row>
          <table:table-cell office:value-type="string" office:string-value="Сосиски Вязанка Молочные ТМ Вязанка амицел мгс ф/в 0,45 кг УВС НД СК3"/>
          <table:table-cell table:number-columns-repeated="3"/>
          <table:table-cell office:value-type="float" office:value="132"/>
          <table:table-cell office:value-type="string" office:string-value="шт"/>
          <table:table-cell office:value-type="float" office:value="0.45"/>
          <table:table-cell table:number-columns-repeated="16377"/>
        </table:table-row>
        <table:table-row>
          <table:table-cell office:value-type="string" office:string-value="Сосиски Молочные для завтрака ТМ Особый рецепт полиамид мгс ф/в 0,4 кг НД2 СК3"/>
          <table:table-cell table:number-columns-repeated="3"/>
          <table:table-cell office:value-type="float" office:value="12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Сосиски Вязанка Сливочные ТМ Вязанка амицел мгс ф/в 0,33 кг УВС НД СК3"/>
          <table:table-cell table:number-columns-repeated="3"/>
          <table:table-cell office:value-type="float" office:value="120"/>
          <table:table-cell office:value-type="string" office:string-value="шт"/>
          <table:table-cell office:value-type="float" office:value="0.33"/>
          <table:table-cell table:number-columns-repeated="16377"/>
        </table:table-row>
        <table:table-row>
          <table:table-cell office:value-type="string" office:string-value="Сосиски Вязанка Сливочные ТМ Вязанка амицел мгс ф/в 0,45 кг УВС НД СК3"/>
          <table:table-cell table:number-columns-repeated="3"/>
          <table:table-cell office:value-type="float" office:value="120"/>
          <table:table-cell office:value-type="string" office:string-value="шт"/>
          <table:table-cell office:value-type="float" office:value="0.45"/>
          <table:table-cell table:number-columns-repeated="16377"/>
        </table:table-row>
        <table:table-row>
          <table:table-cell office:value-type="string" office:string-value="Сосиски Сочинки Молочные ТМ Стародворье амицел мгс ф/в 0,4 кг СК4"/>
          <table:table-cell table:number-columns-repeated="3"/>
          <table:table-cell office:value-type="float" office:value="18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Сосиски Сочинки по-баварски ТМ Стародворье полиамид мгс ф/в 0,4 кг СК3"/>
          <table:table-cell table:number-columns-repeated="3"/>
          <table:table-cell office:value-type="float" office:value="72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Сосиски Сочинки ТМ Стародворье с сочной грудинкой полиамид мгс ф/в 0,4 кг УВС НД СК4"/>
          <table:table-cell table:number-columns-repeated="3"/>
          <table:table-cell office:value-type="float" office:value="5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Сосиски Сочинки ТМ Стародворье с сочным окороком полиамид мгс ф/в 0,4 кг УВС НД СК4"/>
          <table:table-cell table:number-columns-repeated="3"/>
          <table:table-cell office:value-type="float" office:value="5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Сосиски Сочинки Сливочные ТМ Стародворье амицел мгс ф/в 0,4 кг СК3"/>
          <table:table-cell table:number-columns-repeated="3"/>
          <table:table-cell office:value-type="float" office:value="8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Сардельки Сочинки ТМ Стародворье полиамид мгс ф/в 0,4 кг НД СК4"/>
          <table:table-cell table:number-columns-repeated="3"/>
          <table:table-cell office:value-type="float" office:value="60"/>
          <table:table-cell office:value-type="string" office:string-value="шт"/>
          <table:table-cell office:value-type="float" office:value="0.4"/>
          <table:table-cell table:number-columns-repeated="16377"/>
        </table:table-row>
        <table:table-row>
          <table:table-cell office:value-type="string" office:string-value="Колбаса сырокопченая Сальчичон ТМ Стародворье в/у ф/в 0,07 кг нарезка Топ-ЛКК, Дистр МЗР"/>
          <table:table-cell table:number-columns-repeated="3"/>
          <table:table-cell office:value-type="float" office:value="150"/>
          <table:table-cell office:value-type="string" office:string-value="шт"/>
          <table:table-cell office:value-type="float" office:value="7.0000000000000007E-2"/>
          <table:table-cell table:number-columns-repeated="16377"/>
        </table:table-row>
        <table:table-row>
          <table:table-cell office:value-type="string" office:string-value="Колбаса сырокопченая Сервелат Ореховый ТМ Стародворье в/у ф/в 0,07 кг нарезка Топ-ЛКК, Дистр МЗР"/>
          <table:table-cell table:number-columns-repeated="3"/>
          <table:table-cell office:value-type="float" office:value="150"/>
          <table:table-cell office:value-type="string" office:string-value="шт"/>
          <table:table-cell office:value-type="float" office:value="7.0000000000000007E-2"/>
          <table:table-cell table:number-columns-repeated="16377"/>
        </table:table-row>
        <table:table-row>
          <table:table-cell office:value-type="string" office:string-value="Колбаса сыровяленая Фуэт ТМ Стародворье в/у ф/в 0,07 кг нарезка Топ-ЛКК, Дистр МЗР"/>
          <table:table-cell table:number-columns-repeated="3"/>
          <table:table-cell office:value-type="float" office:value="90"/>
          <table:table-cell office:value-type="string" office:string-value="шт"/>
          <table:table-cell office:value-type="float" office:value="7.0000000000000007E-2"/>
          <table:table-cell table:number-columns-repeated="16377"/>
        </table:table-row>
        <table:table-row>
          <table:table-cell office:value-type="string" office:string-value="Паштет печеночный Со сливочным маслом ТМ Стародворье ламистер ф/в 0,1 кг РК"/>
          <table:table-cell table:number-columns-repeated="3"/>
          <table:table-cell office:value-type="float" office:value="200"/>
          <table:table-cell office:value-type="string" office:string-value="шт"/>
          <table:table-cell office:value-type="float" office:value="0.1"/>
          <table:table-cell table:number-columns-repeated="16377"/>
        </table:table-row>
        <table:table-row table:number-rows-repeated="1048455">
          <table:table-cell table:number-columns-repeated="16377"/>
        </table:table-row>
      </table:table>
      <table:table table:name="'file:///C:/WORK/ПОКОМ_Останкино/2025_05/2025/ЗАВОДЫ/ПОКОМ/ОПТы/2025/12,25/31,12,25%20Коныгин/Стародворье%20104.ods'#Лист2" table:style-name="ta2">
        <table:table-source xlink:href="file:///C:/WORK/ПОКОМ_Останкино/2025_05/2025/ЗАВОДЫ/ПОКОМ/ОПТы/2025/12,25/31,12,25%20Коныгин/Стародворье%20104.ods" table:table-name="Лист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ORK/ПОКОМ_Останкино/2025_05/2025/ЗАВОДЫ/ПОКОМ/ОПТы/2025/12,25/31,12,25%20Коныгин/Стародворье%20104.ods'#Лист3" table:style-name="ta2">
        <table:table-source xlink:href="file:///C:/WORK/ПОКОМ_Останкино/2025_05/2025/ЗАВОДЫ/ПОКОМ/ОПТы/2025/12,25/31,12,25%20Коныгин/Стародворье%20104.ods" table:table-name="Лист3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date-style style:name="N38">
      <number:day number:style="long"/>
      <number:text>.</number:text>
      <number:month number:style="long"/>
      <number:text>.</number:text>
      <number:year/>
    </number:date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continue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6-01-13T08:59:52Z</dc:date>
    <meta:print-date>2025-07-12T11:57:59Z</meta:print-date>
    <meta:editing-cycles>198</meta:editing-cycles>
    <meta:editing-duration>PT406833S</meta:editing-duration>
  </office:meta>
</office:document-meta>
</file>
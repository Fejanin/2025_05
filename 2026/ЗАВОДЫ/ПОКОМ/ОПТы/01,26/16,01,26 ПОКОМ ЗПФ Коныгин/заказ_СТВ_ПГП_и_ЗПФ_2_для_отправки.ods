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4" style:family="table-cell" style:parent-style-name="Default" style:data-style-name="N1">
      <style:table-cell-properties fo:border="thin solid #000000" style:vertical-align="middle" fo:wrap-option="wrap" fo:background-color="#FFFF00"/>
    </style:style>
    <style:style style:name="ce5" style:family="table-cell" style:parent-style-name="Default" style:data-style-name="N1">
      <style:table-cell-properties fo:border="thin solid #000000" style:vertical-align="middle" fo:wrap-option="wrap" fo:background-color="#FFFF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background-color="#FFFF00"/>
      <style:text-properties fo:font-weight="bold" style:font-weight-asian="bold" style:font-weight-complex="bold"/>
    </style:style>
    <style:style style:name="ce7" style:family="table-cell" style:parent-style-name="Default" style:data-style-name="N36">
      <style:table-cell-properties fo:border="thin solid #000000" style:vertical-align="middle" fo:wrap-option="wrap" fo:background-color="#FFFF00"/>
      <style:text-properties fo:font-size="9pt" style:font-size-asian="9pt" style:font-size-complex="9pt"/>
    </style:style>
    <style:style style:name="ce8" style:family="table-cell" style:parent-style-name="Default" style:data-style-name="N1">
      <style:table-cell-properties fo:border="thin solid #000000" style:vertical-align="middle" fo:wrap-option="wrap" fo:background-color="#FFFF00"/>
      <style:text-properties fo:font-size="9pt" style:font-size-asian="9pt" style:font-size-complex="9pt"/>
    </style:style>
    <style:style style:name="ce9" style:family="table-cell" style:parent-style-name="Default" style:data-style-name="N2">
      <style:table-cell-properties fo:border="thin solid #000000" style:vertical-align="middle" fo:wrap-option="wrap" fo:background-color="#FFFF00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FFFF00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order="thin solid #000000" style:vertical-align="middle" fo:background-color="#FFFF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/>
    </style:style>
    <style:style style:name="ce1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4" style:family="table-cell" style:parent-style-name="Default" style:data-style-name="N36">
      <style:table-cell-properties fo:border="thin solid #000000"/>
    </style:style>
    <style:style style:name="ce15" style:family="table-cell" style:parent-style-name="Default" style:data-style-name="N1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6" style:family="table-cell" style:parent-style-name="Default" style:data-style-name="N1">
      <style:table-cell-properties fo:border="thin solid #000000" style:vertical-align="automatic" fo:wrap-option="wrap"/>
    </style:style>
    <style:style style:name="ce17" style:family="table-cell" style:parent-style-name="Default" style:data-style-name="N2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8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="thin solid #000000"/>
    </style:style>
    <style:style style:name="ce20" style:family="table-cell" style:parent-style-name="Default" style:data-style-name="N0">
      <style:table-cell-properties fo:border="thin solid #000000" style:vertical-align="automatic" fo:wrap-option="wrap" fo:background-color="#F4B084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F4B084"/>
    </style:style>
    <style:style style:name="ce22" style:family="table-cell" style:parent-style-name="Default" style:data-style-name="N2">
      <style:table-cell-properties fo:border="thin solid #000000" fo:background-color="#F4B084"/>
    </style:style>
    <style:style style:name="ce23" style:family="table-cell" style:parent-style-name="Default" style:data-style-name="N2">
      <style:table-cell-properties fo:border="thin solid #00000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wrap-option="wrap"/>
    </style:style>
    <style:style style:name="ce25" style:family="table-cell" style:parent-style-name="Default" style:data-style-name="N0">
      <style:text-properties fo:font-weight="bold" style:font-weight-asian="bold" style:font-weight-complex="bold"/>
    </style:style>
    <style:style style:name="ce26" style:family="table-cell" style:parent-style-name="Default" style:data-style-name="N36"/>
    <style:style style:name="ce27" style:family="table-cell" style:parent-style-name="Default" style:data-style-name="N1">
      <style:table-cell-properties style:vertical-align="automatic" fo:wrap-option="wrap"/>
      <style:text-properties fo:font-size="9pt" style:font-size-asian="9pt" style:font-size-complex="9pt"/>
    </style:style>
    <style:style style:name="ce28" style:family="table-cell" style:parent-style-name="Default" style:data-style-name="N1">
      <style:table-cell-properties style:vertical-align="automatic" fo:wrap-option="wrap"/>
    </style:style>
    <style:style style:name="ce29" style:family="table-cell" style:parent-style-name="Default" style:data-style-name="N2">
      <style:table-cell-properties style:vertical-align="automatic" fo:wrap-option="wrap"/>
      <style:text-properties fo:font-size="9pt" style:font-size-asian="9pt" style:font-size-complex="9pt"/>
    </style:style>
    <style:style style:name="ce30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31" style:family="table-cell" style:parent-style-name="Default" style:data-style-name="N2"/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1.24354166666667cm"/>
    </style:style>
    <style:style style:name="co3" style:family="table-column">
      <style:table-column-properties fo:break-before="auto" style:column-width="11.0860416666667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1.45520833333333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2.619375cm"/>
    </style:style>
    <style:style style:name="co10" style:family="table-column">
      <style:table-column-properties fo:break-before="auto" style:column-width="10.795cm"/>
    </style:style>
    <style:style style:name="co11" style:family="table-column">
      <style:table-column-properties fo:break-before="auto" style:column-width="1.71979166666667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2.01083333333333cm" style:use-optimal-column-width="true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2.24895833333333cm"/>
    </style:style>
    <style:style style:name="ro1" style:family="table-row">
      <style:table-row-properties style:row-height="60pt" style:use-optimal-row-height="true" fo:break-before="auto"/>
    </style:style>
    <style:style style:name="ro2" style:family="table-row">
      <style:table-row-properties style:row-height="29.25pt" style:use-optimal-row-height="true" fo:break-before="auto"/>
    </style:style>
    <style:style style:name="ro3" style:family="table-row">
      <style:table-row-properties style:row-height="43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 table:visibility="collapse"/>
        <table:table-column table:style-name="co2" table:default-cell-style-name="ce1" table:visibility="collapse"/>
        <table:table-column table:style-name="co3" table:default-cell-style-name="ce24"/>
        <table:table-column table:style-name="co4" table:default-cell-style-name="ce1"/>
        <table:table-column table:style-name="co5" table:default-cell-style-name="ce1"/>
        <table:table-column table:style-name="co5" table:number-columns-repeated="2" table:default-cell-style-name="ce25"/>
        <table:table-column table:style-name="co4" table:default-cell-style-name="ce26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8"/>
        <table:table-column table:style-name="co7" table:number-columns-repeated="2" table:default-cell-style-name="ce29"/>
        <table:table-column table:style-name="co7" table:number-columns-repeated="2" table:default-cell-style-name="ce27"/>
        <table:table-column table:style-name="co11" table:number-columns-repeated="2" table:default-cell-style-name="ce30"/>
        <table:table-column table:style-name="co12" table:default-cell-style-name="ce1"/>
        <table:table-column table:style-name="co13" table:default-cell-style-name="ce1"/>
        <table:table-column table:style-name="co6" table:number-columns-repeated="2" table:default-cell-style-name="ce31"/>
        <table:table-column table:style-name="co6" table:number-columns-repeated="1001" table:default-cell-style-name="ce1"/>
        <table:table-column table:style-name="co14" table:number-columns-repeated="15360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Номенклатура</text:p>
          </table:table-cell>
          <table:table-cell office:value-type="string" table:style-name="ce4">
            <text:p>заказ в шт/кг</text:p>
          </table:table-cell>
          <table:table-cell office:value-type="string" table:style-name="ce4">
            <text:p>общий вес в кг</text:p>
          </table:table-cell>
          <table:table-cell office:value-type="string" table:style-name="ce5">
            <text:p>ЗАКАЗ</text:p>
          </table:table-cell>
          <table:table-cell office:value-type="string" table:style-name="ce6">
            <text:p>ВЕС</text:p>
          </table:table-cell>
          <table:table-cell office:value-type="string" table:style-name="ce7">
            <text:p>Разность вес</text:p>
          </table:table-cell>
          <table:table-cell office:value-type="string" table:style-name="ce8">
            <text:p>Код единицы продаж</text:p>
          </table:table-cell>
          <table:table-cell office:value-type="string" table:style-name="ce8">
            <text:p>Код продукта</text:p>
          </table:table-cell>
          <table:table-cell office:value-type="string" table:style-name="ce8">
            <text:p>Номер варианта</text:p>
          </table:table-cell>
          <table:table-cell office:value-type="string" table:style-name="ce8">
            <text:p>Штрих-код<text:s/></text:p>
          </table:table-cell>
          <table:table-cell office:value-type="string" table:style-name="ce4">
            <text:p>Наименование</text:p>
          </table:table-cell>
          <table:table-cell office:value-type="string" table:style-name="ce9">
            <text:p>Вес нетто штуки, кг</text:p>
          </table:table-cell>
          <table:table-cell office:value-type="string" table:style-name="ce9">
            <text:p>Кол-во штук в коробе, шт</text:p>
          </table:table-cell>
          <table:table-cell office:value-type="string" table:style-name="ce8">
            <text:p>Коробов в слое</text:p>
          </table:table-cell>
          <table:table-cell office:value-type="string" table:style-name="ce8">
            <text:p>Кол-во кор. на паллте, шт</text:p>
          </table:table-cell>
          <table:table-cell office:value-type="string" table:style-name="ce10">
            <text:p>заказ в кор. (кратно слою)</text:p>
          </table:table-cell>
          <table:table-cell office:value-type="string" table:style-name="ce10">
            <text:p>заказ в шт. (ИТОГО)</text:p>
          </table:table-cell>
          <table:table-cell table:number-columns-repeated="2" table:style-name="ce1"/>
          <table:table-cell office:value-type="string" table:style-name="ce11">
            <text:p>ВЕС</text:p>
          </table:table-cell>
          <table:table-cell office:value-type="string" table:style-name="ce11">
            <text:p>паллет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Крылья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Хрустящие крылышки острые к пиву ТМ Горячая штучка ф/п ф/в 0,3 кг НД9 ПГП2 МГ</text:p>
          </table:table-cell>
          <table:table-cell office:value-type="string" table:style-name="ce2">
            <text:p>360 шт</text:p>
          </table:table-cell>
          <table:table-cell office:value-type="float" office:value="108" table:style-name="ce2">
            <text:p>108</text:p>
          </table:table-cell>
          <table:table-cell office:value-type="float" office:value="360" table:formula="of:=VALUE(LEFT([.D2];LEN([.D2])-3))" table:style-name="ce13">
            <text:p>360</text:p>
          </table:table-cell>
          <table:table-cell office:value-type="float" office:value="108" table:formula="of:=[.F2]*[.N2]" table:style-name="ce13">
            <text:p>108</text:p>
          </table:table-cell>
          <table:table-cell office:value-type="float" office:value="0" table:formula="of:=[.G2]-[.E2]" table:style-name="ce14">
            <text:p>0<text:s/></text:p>
          </table:table-cell>
          <table:table-cell office:value-type="string" office:string-value="SU003607" table:formula="of:=VLOOKUP([.C2];['file:///D:/Father/Work/2025_05/РАБОЧИЙ%20СТОЛ/16,01,26%20ПОКОМ%20ЗПФ%20Коныгин/(отмена)рассчет%20заказ%20СТВ%20ПГП%20и%20ЗПФ.ods'#Лист1.$C:.$Q];7;0)" table:style-name="ce15">
            <text:p>SU003607</text:p>
          </table:table-cell>
          <table:table-cell office:value-type="string" office:string-value="P004589" table:formula="of:=VLOOKUP([.C2];['file:///D:/Father/Work/2025_05/РАБОЧИЙ%20СТОЛ/16,01,26%20ПОКОМ%20ЗПФ%20Коныгин/(отмена)рассчет%20заказ%20СТВ%20ПГП%20и%20ЗПФ.ods'#Лист1.$C:.$Q];8;0)" table:style-name="ce15">
            <text:p>P004589</text:p>
          </table:table-cell>
          <table:table-cell office:value-type="float" office:value="4301131046" table:formula="of:=VLOOKUP([.C2];['file:///D:/Father/Work/2025_05/РАБОЧИЙ%20СТОЛ/16,01,26%20ПОКОМ%20ЗПФ%20Коныгин/(отмена)рассчет%20заказ%20СТВ%20ПГП%20и%20ЗПФ.ods'#Лист1.$C:.$Q];9;0)" table:style-name="ce15">
            <text:p>4301131046</text:p>
          </table:table-cell>
          <table:table-cell office:value-type="float" office:value="4607111034137" table:formula="of:=VLOOKUP([.C2];['file:///D:/Father/Work/2025_05/РАБОЧИЙ%20СТОЛ/16,01,26%20ПОКОМ%20ЗПФ%20Коныгин/(отмена)рассчет%20заказ%20СТВ%20ПГП%20и%20ЗПФ.ods'#Лист1.$C:.$Q];10;0)" table:style-name="ce15">
            <text:p>4607111034137</text:p>
          </table:table-cell>
          <table:table-cell office:value-type="string" office:string-value="Крылья «Крылышки острые к пиву» Фикс.вес 0,3 Пакет ТМ «Горячая штучка»" table:formula="of:=VLOOKUP([.C2];['file:///D:/Father/Work/2025_05/РАБОЧИЙ%20СТОЛ/16,01,26%20ПОКОМ%20ЗПФ%20Коныгин/(отмена)рассчет%20заказ%20СТВ%20ПГП%20и%20ЗПФ.ods'#Лист1.$C:.$Q];11;0)" table:style-name="ce16">
            <text:p>Крылья «Крылышки острые к пиву» Фикс.вес 0,3 Пакет ТМ «Горячая штучка»</text:p>
          </table:table-cell>
          <table:table-cell office:value-type="float" office:value="0.3" table:formula="of:=VLOOKUP([.C2];['file:///D:/Father/Work/2025_05/РАБОЧИЙ%20СТОЛ/16,01,26%20ПОКОМ%20ЗПФ%20Коныгин/(отмена)рассчет%20заказ%20СТВ%20ПГП%20и%20ЗПФ.ods'#Лист1.$C:.$Q];12;0)" table:style-name="ce17">
            <text:p>0,30</text:p>
          </table:table-cell>
          <table:table-cell office:value-type="float" office:value="12" table:formula="of:=VLOOKUP([.C2];['file:///D:/Father/Work/2025_05/РАБОЧИЙ%20СТОЛ/16,01,26%20ПОКОМ%20ЗПФ%20Коныгин/(отмена)рассчет%20заказ%20СТВ%20ПГП%20и%20ЗПФ.ods'#Лист1.$C:.$Q];13;0)" table:style-name="ce17">
            <text:p>12,00</text:p>
          </table:table-cell>
          <table:table-cell office:value-type="float" office:value="14" table:formula="of:=VLOOKUP([.C2];['file:///D:/Father/Work/2025_05/РАБОЧИЙ%20СТОЛ/16,01,26%20ПОКОМ%20ЗПФ%20Коныгин/(отмена)рассчет%20заказ%20СТВ%20ПГП%20и%20ЗПФ.ods'#Лист1.$C:.$Q];14;0)" table:style-name="ce15">
            <text:p>14</text:p>
          </table:table-cell>
          <table:table-cell office:value-type="float" office:value="70" table:formula="of:=VLOOKUP([.C2];['file:///D:/Father/Work/2025_05/РАБОЧИЙ%20СТОЛ/16,01,26%20ПОКОМ%20ЗПФ%20Коныгин/(отмена)рассчет%20заказ%20СТВ%20ПГП%20и%20ЗПФ.ods'#Лист1.$C:.$Q];15;0)" table:style-name="ce15">
            <text:p>70</text:p>
          </table:table-cell>
          <table:table-cell office:value-type="float" office:value="28" table:formula="of:=MROUND([.F2];[.O2]*[.P2])/[.O2]" table:style-name="ce18">
            <text:p>28</text:p>
          </table:table-cell>
          <table:table-cell office:value-type="float" office:value="336" table:formula="of:=[.R2]*[.O2]" table:style-name="ce18">
            <text:p>336</text:p>
          </table:table-cell>
          <table:table-cell table:number-columns-repeated="2" table:style-name="ce1"/>
          <table:table-cell office:value-type="float" office:value="100.8" table:formula="of:=[.S2]*[.N2]" table:style-name="ce19">
            <text:p>100,80</text:p>
          </table:table-cell>
          <table:table-cell office:value-type="float" office:value="0.4" table:formula="of:=[.R2]/[.Q2]" table:style-name="ce19">
            <text:p>0,4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Крылья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Хрустящие крылышки ТМ Горячая штучка ф/п ф/в 0,3 кг НД6 ПГП2 МГ</text:p>
          </table:table-cell>
          <table:table-cell office:value-type="string" table:style-name="ce2">
            <text:p>360 шт</text:p>
          </table:table-cell>
          <table:table-cell office:value-type="float" office:value="108" table:style-name="ce2">
            <text:p>108</text:p>
          </table:table-cell>
          <table:table-cell office:value-type="float" office:value="360" table:formula="of:=VALUE(LEFT([.D3];LEN([.D3])-3))" table:style-name="ce13">
            <text:p>360</text:p>
          </table:table-cell>
          <table:table-cell office:value-type="float" office:value="108" table:formula="of:=[.F3]*[.N3]" table:style-name="ce13">
            <text:p>108</text:p>
          </table:table-cell>
          <table:table-cell office:value-type="float" office:value="0" table:formula="of:=[.G3]-[.E3]" table:style-name="ce14">
            <text:p>0<text:s/></text:p>
          </table:table-cell>
          <table:table-cell office:value-type="string" office:string-value="SU003591" table:formula="of:=VLOOKUP([.C3];['file:///D:/Father/Work/2025_05/РАБОЧИЙ%20СТОЛ/16,01,26%20ПОКОМ%20ЗПФ%20Коныгин/(отмена)рассчет%20заказ%20СТВ%20ПГП%20и%20ЗПФ.ods'#Лист1.$C:.$Q];7;0)" table:style-name="ce15">
            <text:p>SU003591</text:p>
          </table:table-cell>
          <table:table-cell office:value-type="string" office:string-value="P004588" table:formula="of:=VLOOKUP([.C3];['file:///D:/Father/Work/2025_05/РАБОЧИЙ%20СТОЛ/16,01,26%20ПОКОМ%20ЗПФ%20Коныгин/(отмена)рассчет%20заказ%20СТВ%20ПГП%20и%20ЗПФ.ods'#Лист1.$C:.$Q];8;0)" table:style-name="ce15">
            <text:p>P004588</text:p>
          </table:table-cell>
          <table:table-cell office:value-type="float" office:value="4301131047" table:formula="of:=VLOOKUP([.C3];['file:///D:/Father/Work/2025_05/РАБОЧИЙ%20СТОЛ/16,01,26%20ПОКОМ%20ЗПФ%20Коныгин/(отмена)рассчет%20заказ%20СТВ%20ПГП%20и%20ЗПФ.ods'#Лист1.$C:.$Q];9;0)" table:style-name="ce15">
            <text:p>4301131047</text:p>
          </table:table-cell>
          <table:table-cell office:value-type="float" office:value="4607111034120" table:formula="of:=VLOOKUP([.C3];['file:///D:/Father/Work/2025_05/РАБОЧИЙ%20СТОЛ/16,01,26%20ПОКОМ%20ЗПФ%20Коныгин/(отмена)рассчет%20заказ%20СТВ%20ПГП%20и%20ЗПФ.ods'#Лист1.$C:.$Q];10;0)" table:style-name="ce15">
            <text:p>4607111034120</text:p>
          </table:table-cell>
          <table:table-cell office:value-type="string" office:string-value="Крылья «Хрустящие крылышки» Фикс.вес 0,3 Пакет ТМ «Горячая штучка»" table:formula="of:=VLOOKUP([.C3];['file:///D:/Father/Work/2025_05/РАБОЧИЙ%20СТОЛ/16,01,26%20ПОКОМ%20ЗПФ%20Коныгин/(отмена)рассчет%20заказ%20СТВ%20ПГП%20и%20ЗПФ.ods'#Лист1.$C:.$Q];11;0)" table:style-name="ce16">
            <text:p>Крылья «Хрустящие крылышки» Фикс.вес 0,3 Пакет ТМ «Горячая штучка»</text:p>
          </table:table-cell>
          <table:table-cell office:value-type="float" office:value="0.3" table:formula="of:=VLOOKUP([.C3];['file:///D:/Father/Work/2025_05/РАБОЧИЙ%20СТОЛ/16,01,26%20ПОКОМ%20ЗПФ%20Коныгин/(отмена)рассчет%20заказ%20СТВ%20ПГП%20и%20ЗПФ.ods'#Лист1.$C:.$Q];12;0)" table:style-name="ce17">
            <text:p>0,30</text:p>
          </table:table-cell>
          <table:table-cell office:value-type="float" office:value="12" table:formula="of:=VLOOKUP([.C3];['file:///D:/Father/Work/2025_05/РАБОЧИЙ%20СТОЛ/16,01,26%20ПОКОМ%20ЗПФ%20Коныгин/(отмена)рассчет%20заказ%20СТВ%20ПГП%20и%20ЗПФ.ods'#Лист1.$C:.$Q];13;0)" table:style-name="ce17">
            <text:p>12,00</text:p>
          </table:table-cell>
          <table:table-cell office:value-type="float" office:value="14" table:formula="of:=VLOOKUP([.C3];['file:///D:/Father/Work/2025_05/РАБОЧИЙ%20СТОЛ/16,01,26%20ПОКОМ%20ЗПФ%20Коныгин/(отмена)рассчет%20заказ%20СТВ%20ПГП%20и%20ЗПФ.ods'#Лист1.$C:.$Q];14;0)" table:style-name="ce15">
            <text:p>14</text:p>
          </table:table-cell>
          <table:table-cell office:value-type="float" office:value="70" table:formula="of:=VLOOKUP([.C3];['file:///D:/Father/Work/2025_05/РАБОЧИЙ%20СТОЛ/16,01,26%20ПОКОМ%20ЗПФ%20Коныгин/(отмена)рассчет%20заказ%20СТВ%20ПГП%20и%20ЗПФ.ods'#Лист1.$C:.$Q];15;0)" table:style-name="ce15">
            <text:p>70</text:p>
          </table:table-cell>
          <table:table-cell office:value-type="float" office:value="28" table:formula="of:=MROUND([.F3];[.O3]*[.P3])/[.O3]" table:style-name="ce18">
            <text:p>28</text:p>
          </table:table-cell>
          <table:table-cell office:value-type="float" office:value="336" table:formula="of:=[.R3]*[.O3]" table:style-name="ce18">
            <text:p>336</text:p>
          </table:table-cell>
          <table:table-cell table:number-columns-repeated="2" table:style-name="ce1"/>
          <table:table-cell office:value-type="float" office:value="100.8" table:formula="of:=[.S3]*[.N3]" table:style-name="ce19">
            <text:p>100,80</text:p>
          </table:table-cell>
          <table:table-cell office:value-type="float" office:value="0.4" table:formula="of:=[.R3]/[.Q3]" table:style-name="ce19">
            <text:p>0,4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Наггетсы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Наггетсы из печи ТМ Вязанка ф/п ф/в 0,25 кг тара2 ПГП2 МГ</text:p>
          </table:table-cell>
          <table:table-cell office:value-type="string" table:style-name="ce2">
            <text:p>360 <text:s/>шт</text:p>
          </table:table-cell>
          <table:table-cell office:value-type="float" office:value="90" table:style-name="ce2">
            <text:p>90</text:p>
          </table:table-cell>
          <table:table-cell office:value-type="float" office:value="360" table:formula="of:=VALUE(LEFT([.D4];LEN([.D4])-3))" table:style-name="ce13">
            <text:p>360</text:p>
          </table:table-cell>
          <table:table-cell office:value-type="float" office:value="90" table:formula="of:=[.F4]*[.N4]" table:style-name="ce13">
            <text:p>90</text:p>
          </table:table-cell>
          <table:table-cell office:value-type="float" office:value="0" table:formula="of:=[.G4]-[.E4]" table:style-name="ce14">
            <text:p>0<text:s/></text:p>
          </table:table-cell>
          <table:table-cell office:value-type="string" office:string-value="SU003797" table:formula="of:=VLOOKUP([.C4];['file:///D:/Father/Work/2025_05/РАБОЧИЙ%20СТОЛ/16,01,26%20ПОКОМ%20ЗПФ%20Коныгин/(отмена)рассчет%20заказ%20СТВ%20ПГП%20и%20ЗПФ.ods'#Лист1.$C:.$Q];7;0)" table:style-name="ce15">
            <text:p>SU003797</text:p>
          </table:table-cell>
          <table:table-cell office:value-type="string" office:string-value="P004497" table:formula="of:=VLOOKUP([.C4];['file:///D:/Father/Work/2025_05/РАБОЧИЙ%20СТОЛ/16,01,26%20ПОКОМ%20ЗПФ%20Коныгин/(отмена)рассчет%20заказ%20СТВ%20ПГП%20и%20ЗПФ.ods'#Лист1.$C:.$Q];8;0)" table:style-name="ce15">
            <text:p>P004497</text:p>
          </table:table-cell>
          <table:table-cell office:value-type="float" office:value="4301132179" table:formula="of:=VLOOKUP([.C4];['file:///D:/Father/Work/2025_05/РАБОЧИЙ%20СТОЛ/16,01,26%20ПОКОМ%20ЗПФ%20Коныгин/(отмена)рассчет%20заказ%20СТВ%20ПГП%20и%20ЗПФ.ods'#Лист1.$C:.$Q];9;0)" table:style-name="ce15">
            <text:p>4301132179</text:p>
          </table:table-cell>
          <table:table-cell office:value-type="float" office:value="4607111035691" table:formula="of:=VLOOKUP([.C4];['file:///D:/Father/Work/2025_05/РАБОЧИЙ%20СТОЛ/16,01,26%20ПОКОМ%20ЗПФ%20Коныгин/(отмена)рассчет%20заказ%20СТВ%20ПГП%20и%20ЗПФ.ods'#Лист1.$C:.$Q];10;0)" table:style-name="ce15">
            <text:p>4607111035691</text:p>
          </table:table-cell>
          <table:table-cell office:value-type="string" office:string-value="Наггетсы «из печи» Фикс.вес 0,25 ТМ «Вязанка»" table:formula="of:=VLOOKUP([.C4];['file:///D:/Father/Work/2025_05/РАБОЧИЙ%20СТОЛ/16,01,26%20ПОКОМ%20ЗПФ%20Коныгин/(отмена)рассчет%20заказ%20СТВ%20ПГП%20и%20ЗПФ.ods'#Лист1.$C:.$Q];11;0)" table:style-name="ce16">
            <text:p>Наггетсы «из печи» Фикс.вес 0,25 ТМ «Вязанка»</text:p>
          </table:table-cell>
          <table:table-cell office:value-type="float" office:value="0.25" table:formula="of:=VLOOKUP([.C4];['file:///D:/Father/Work/2025_05/РАБОЧИЙ%20СТОЛ/16,01,26%20ПОКОМ%20ЗПФ%20Коныгин/(отмена)рассчет%20заказ%20СТВ%20ПГП%20и%20ЗПФ.ods'#Лист1.$C:.$Q];12;0)" table:style-name="ce17">
            <text:p>0,25</text:p>
          </table:table-cell>
          <table:table-cell office:value-type="float" office:value="12" table:formula="of:=VLOOKUP([.C4];['file:///D:/Father/Work/2025_05/РАБОЧИЙ%20СТОЛ/16,01,26%20ПОКОМ%20ЗПФ%20Коныгин/(отмена)рассчет%20заказ%20СТВ%20ПГП%20и%20ЗПФ.ods'#Лист1.$C:.$Q];13;0)" table:style-name="ce17">
            <text:p>12,00</text:p>
          </table:table-cell>
          <table:table-cell office:value-type="float" office:value="14" table:formula="of:=VLOOKUP([.C4];['file:///D:/Father/Work/2025_05/РАБОЧИЙ%20СТОЛ/16,01,26%20ПОКОМ%20ЗПФ%20Коныгин/(отмена)рассчет%20заказ%20СТВ%20ПГП%20и%20ЗПФ.ods'#Лист1.$C:.$Q];14;0)" table:style-name="ce15">
            <text:p>14</text:p>
          </table:table-cell>
          <table:table-cell office:value-type="float" office:value="70" table:formula="of:=VLOOKUP([.C4];['file:///D:/Father/Work/2025_05/РАБОЧИЙ%20СТОЛ/16,01,26%20ПОКОМ%20ЗПФ%20Коныгин/(отмена)рассчет%20заказ%20СТВ%20ПГП%20и%20ЗПФ.ods'#Лист1.$C:.$Q];15;0)" table:style-name="ce15">
            <text:p>70</text:p>
          </table:table-cell>
          <table:table-cell office:value-type="float" office:value="28" table:formula="of:=MROUND([.F4];[.O4]*[.P4])/[.O4]" table:style-name="ce18">
            <text:p>28</text:p>
          </table:table-cell>
          <table:table-cell office:value-type="float" office:value="336" table:formula="of:=[.R4]*[.O4]" table:style-name="ce18">
            <text:p>336</text:p>
          </table:table-cell>
          <table:table-cell table:number-columns-repeated="2" table:style-name="ce1"/>
          <table:table-cell office:value-type="float" office:value="84" table:formula="of:=[.S4]*[.N4]" table:style-name="ce19">
            <text:p>84,00</text:p>
          </table:table-cell>
          <table:table-cell office:value-type="float" office:value="0.4" table:formula="of:=[.R4]/[.Q4]" table:style-name="ce19">
            <text:p>0,4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Наггетсы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Наггетсы Нагетосы Сочная курочка ТМ Горячая штучка ф/п ф/в 0,25 кг тара НД1 ПГП2 МГ</text:p>
          </table:table-cell>
          <table:table-cell office:value-type="string" table:style-name="ce2">
            <text:p>300 шт</text:p>
          </table:table-cell>
          <table:table-cell office:value-type="float" office:value="75" table:style-name="ce2">
            <text:p>75</text:p>
          </table:table-cell>
          <table:table-cell office:value-type="float" office:value="300" table:formula="of:=VALUE(LEFT([.D5];LEN([.D5])-3))" table:style-name="ce13">
            <text:p>300</text:p>
          </table:table-cell>
          <table:table-cell office:value-type="float" office:value="75" table:formula="of:=[.F5]*[.N5]" table:style-name="ce13">
            <text:p>75</text:p>
          </table:table-cell>
          <table:table-cell office:value-type="float" office:value="0" table:formula="of:=[.G5]-[.E5]" table:style-name="ce14">
            <text:p>0<text:s/></text:p>
          </table:table-cell>
          <table:table-cell office:value-type="string" office:string-value="SU003598" table:formula="of:=VLOOKUP([.C5];['file:///D:/Father/Work/2025_05/РАБОЧИЙ%20СТОЛ/16,01,26%20ПОКОМ%20ЗПФ%20Коныгин/(отмена)рассчет%20заказ%20СТВ%20ПГП%20и%20ЗПФ.ods'#Лист1.$C:.$Q];7;0)" table:style-name="ce15">
            <text:p>SU003598</text:p>
          </table:table-cell>
          <table:table-cell office:value-type="string" office:string-value="P004602" table:formula="of:=VLOOKUP([.C5];['file:///D:/Father/Work/2025_05/РАБОЧИЙ%20СТОЛ/16,01,26%20ПОКОМ%20ЗПФ%20Коныгин/(отмена)рассчет%20заказ%20СТВ%20ПГП%20и%20ЗПФ.ods'#Лист1.$C:.$Q];8;0)" table:style-name="ce15">
            <text:p>P004602</text:p>
          </table:table-cell>
          <table:table-cell office:value-type="float" office:value="4301132190" table:formula="of:=VLOOKUP([.C5];['file:///D:/Father/Work/2025_05/РАБОЧИЙ%20СТОЛ/16,01,26%20ПОКОМ%20ЗПФ%20Коныгин/(отмена)рассчет%20заказ%20СТВ%20ПГП%20и%20ЗПФ.ods'#Лист1.$C:.$Q];9;0)" table:style-name="ce15">
            <text:p>4301132190</text:p>
          </table:table-cell>
          <table:table-cell office:value-type="float" office:value="4607111036537" table:formula="of:=VLOOKUP([.C5];['file:///D:/Father/Work/2025_05/РАБОЧИЙ%20СТОЛ/16,01,26%20ПОКОМ%20ЗПФ%20Коныгин/(отмена)рассчет%20заказ%20СТВ%20ПГП%20и%20ЗПФ.ods'#Лист1.$C:.$Q];10;0)" table:style-name="ce15">
            <text:p>4607111036537</text:p>
          </table:table-cell>
          <table:table-cell office:value-type="string" office:string-value="Наггетсы «Нагетосы Сочная курочка» Фикс.вес 0,25 ТМ «Горячая штучка»" table:formula="of:=VLOOKUP([.C5];['file:///D:/Father/Work/2025_05/РАБОЧИЙ%20СТОЛ/16,01,26%20ПОКОМ%20ЗПФ%20Коныгин/(отмена)рассчет%20заказ%20СТВ%20ПГП%20и%20ЗПФ.ods'#Лист1.$C:.$Q];11;0)" table:style-name="ce16">
            <text:p>Наггетсы «Нагетосы Сочная курочка» Фикс.вес 0,25 ТМ «Горячая штучка»</text:p>
          </table:table-cell>
          <table:table-cell office:value-type="float" office:value="0.25" table:formula="of:=VLOOKUP([.C5];['file:///D:/Father/Work/2025_05/РАБОЧИЙ%20СТОЛ/16,01,26%20ПОКОМ%20ЗПФ%20Коныгин/(отмена)рассчет%20заказ%20СТВ%20ПГП%20и%20ЗПФ.ods'#Лист1.$C:.$Q];12;0)" table:style-name="ce17">
            <text:p>0,25</text:p>
          </table:table-cell>
          <table:table-cell office:value-type="float" office:value="6" table:formula="of:=VLOOKUP([.C5];['file:///D:/Father/Work/2025_05/РАБОЧИЙ%20СТОЛ/16,01,26%20ПОКОМ%20ЗПФ%20Коныгин/(отмена)рассчет%20заказ%20СТВ%20ПГП%20и%20ЗПФ.ods'#Лист1.$C:.$Q];13;0)" table:style-name="ce17">
            <text:p>6,00</text:p>
          </table:table-cell>
          <table:table-cell office:value-type="float" office:value="14" table:formula="of:=VLOOKUP([.C5];['file:///D:/Father/Work/2025_05/РАБОЧИЙ%20СТОЛ/16,01,26%20ПОКОМ%20ЗПФ%20Коныгин/(отмена)рассчет%20заказ%20СТВ%20ПГП%20и%20ЗПФ.ods'#Лист1.$C:.$Q];14;0)" table:style-name="ce15">
            <text:p>14</text:p>
          </table:table-cell>
          <table:table-cell office:value-type="float" office:value="140" table:formula="of:=VLOOKUP([.C5];['file:///D:/Father/Work/2025_05/РАБОЧИЙ%20СТОЛ/16,01,26%20ПОКОМ%20ЗПФ%20Коныгин/(отмена)рассчет%20заказ%20СТВ%20ПГП%20и%20ЗПФ.ods'#Лист1.$C:.$Q];15;0)" table:style-name="ce15">
            <text:p>140</text:p>
          </table:table-cell>
          <table:table-cell office:value-type="float" office:value="56" table:formula="of:=MROUND([.F5];[.O5]*[.P5])/[.O5]" table:style-name="ce18">
            <text:p>56</text:p>
          </table:table-cell>
          <table:table-cell office:value-type="float" office:value="336" table:formula="of:=[.R5]*[.O5]" table:style-name="ce18">
            <text:p>336</text:p>
          </table:table-cell>
          <table:table-cell table:number-columns-repeated="2" table:style-name="ce1"/>
          <table:table-cell office:value-type="float" office:value="84" table:formula="of:=[.S5]*[.N5]" table:style-name="ce19">
            <text:p>84,00</text:p>
          </table:table-cell>
          <table:table-cell office:value-type="float" office:value="0.4" table:formula="of:=[.R5]/[.Q5]" table:style-name="ce19">
            <text:p>0,4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Наггетсы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Наггетсы с индейкой ТМ Вязанка ТС Из печи Сливушки ф/п ф/в 0,25 кг тара2 ПГП2 МГ</text:p>
          </table:table-cell>
          <table:table-cell office:value-type="string" table:style-name="ce2">
            <text:p>144 шт</text:p>
          </table:table-cell>
          <table:table-cell office:value-type="float" office:value="36" table:style-name="ce2">
            <text:p>36</text:p>
          </table:table-cell>
          <table:table-cell office:value-type="float" office:value="144" table:formula="of:=VALUE(LEFT([.D6];LEN([.D6])-3))" table:style-name="ce13">
            <text:p>144</text:p>
          </table:table-cell>
          <table:table-cell office:value-type="float" office:value="36" table:formula="of:=[.F6]*[.N6]" table:style-name="ce13">
            <text:p>36</text:p>
          </table:table-cell>
          <table:table-cell office:value-type="float" office:value="0" table:formula="of:=[.G6]-[.E6]" table:style-name="ce14">
            <text:p>0<text:s/></text:p>
          </table:table-cell>
          <table:table-cell office:value-type="string" office:string-value="SU003800" table:formula="of:=VLOOKUP([.C6];['file:///D:/Father/Work/2025_05/РАБОЧИЙ%20СТОЛ/16,01,26%20ПОКОМ%20ЗПФ%20Коныгин/(отмена)рассчет%20заказ%20СТВ%20ПГП%20и%20ЗПФ.ods'#Лист1.$C:.$Q];7;0)" table:style-name="ce15">
            <text:p>SU003800</text:p>
          </table:table-cell>
          <table:table-cell office:value-type="string" office:string-value="P004496" table:formula="of:=VLOOKUP([.C6];['file:///D:/Father/Work/2025_05/РАБОЧИЙ%20СТОЛ/16,01,26%20ПОКОМ%20ЗПФ%20Коныгин/(отмена)рассчет%20заказ%20СТВ%20ПГП%20и%20ЗПФ.ods'#Лист1.$C:.$Q];8;0)" table:style-name="ce15">
            <text:p>P004496</text:p>
          </table:table-cell>
          <table:table-cell office:value-type="float" office:value="4301132182" table:formula="of:=VLOOKUP([.C6];['file:///D:/Father/Work/2025_05/РАБОЧИЙ%20СТОЛ/16,01,26%20ПОКОМ%20ЗПФ%20Коныгин/(отмена)рассчет%20заказ%20СТВ%20ПГП%20и%20ЗПФ.ods'#Лист1.$C:.$Q];9;0)" table:style-name="ce15">
            <text:p>4301132182</text:p>
          </table:table-cell>
          <table:table-cell office:value-type="float" office:value="4607111035721" table:formula="of:=VLOOKUP([.C6];['file:///D:/Father/Work/2025_05/РАБОЧИЙ%20СТОЛ/16,01,26%20ПОКОМ%20ЗПФ%20Коныгин/(отмена)рассчет%20заказ%20СТВ%20ПГП%20и%20ЗПФ.ods'#Лист1.$C:.$Q];10;0)" table:style-name="ce15">
            <text:p>4607111035721</text:p>
          </table:table-cell>
          <table:table-cell office:value-type="string" office:string-value="Наггетсы «с индейкой» Фикс.вес 0,25 ТМ «Вязанка»" table:formula="of:=VLOOKUP([.C6];['file:///D:/Father/Work/2025_05/РАБОЧИЙ%20СТОЛ/16,01,26%20ПОКОМ%20ЗПФ%20Коныгин/(отмена)рассчет%20заказ%20СТВ%20ПГП%20и%20ЗПФ.ods'#Лист1.$C:.$Q];11;0)" table:style-name="ce16">
            <text:p>Наггетсы «с индейкой» Фикс.вес 0,25 ТМ «Вязанка»</text:p>
          </table:table-cell>
          <table:table-cell office:value-type="float" office:value="0.25" table:formula="of:=VLOOKUP([.C6];['file:///D:/Father/Work/2025_05/РАБОЧИЙ%20СТОЛ/16,01,26%20ПОКОМ%20ЗПФ%20Коныгин/(отмена)рассчет%20заказ%20СТВ%20ПГП%20и%20ЗПФ.ods'#Лист1.$C:.$Q];12;0)" table:style-name="ce17">
            <text:p>0,25</text:p>
          </table:table-cell>
          <table:table-cell office:value-type="float" office:value="12" table:formula="of:=VLOOKUP([.C6];['file:///D:/Father/Work/2025_05/РАБОЧИЙ%20СТОЛ/16,01,26%20ПОКОМ%20ЗПФ%20Коныгин/(отмена)рассчет%20заказ%20СТВ%20ПГП%20и%20ЗПФ.ods'#Лист1.$C:.$Q];13;0)" table:style-name="ce17">
            <text:p>12,00</text:p>
          </table:table-cell>
          <table:table-cell office:value-type="float" office:value="14" table:formula="of:=VLOOKUP([.C6];['file:///D:/Father/Work/2025_05/РАБОЧИЙ%20СТОЛ/16,01,26%20ПОКОМ%20ЗПФ%20Коныгин/(отмена)рассчет%20заказ%20СТВ%20ПГП%20и%20ЗПФ.ods'#Лист1.$C:.$Q];14;0)" table:style-name="ce15">
            <text:p>14</text:p>
          </table:table-cell>
          <table:table-cell office:value-type="float" office:value="70" table:formula="of:=VLOOKUP([.C6];['file:///D:/Father/Work/2025_05/РАБОЧИЙ%20СТОЛ/16,01,26%20ПОКОМ%20ЗПФ%20Коныгин/(отмена)рассчет%20заказ%20СТВ%20ПГП%20и%20ЗПФ.ods'#Лист1.$C:.$Q];15;0)" table:style-name="ce15">
            <text:p>70</text:p>
          </table:table-cell>
          <table:table-cell office:value-type="float" office:value="14" table:formula="of:=MROUND([.F6];[.O6]*[.P6])/[.O6]" table:style-name="ce18">
            <text:p>14</text:p>
          </table:table-cell>
          <table:table-cell office:value-type="float" office:value="168" table:formula="of:=[.R6]*[.O6]" table:style-name="ce18">
            <text:p>168</text:p>
          </table:table-cell>
          <table:table-cell table:number-columns-repeated="2" table:style-name="ce1"/>
          <table:table-cell office:value-type="float" office:value="42" table:formula="of:=[.S6]*[.N6]" table:style-name="ce19">
            <text:p>42,00</text:p>
          </table:table-cell>
          <table:table-cell office:value-type="float" office:value="0.2" table:formula="of:=[.R6]/[.Q6]" table:style-name="ce19">
            <text:p>0,2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Наггетсы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Наггетсы с куриным филе и сыром ТМ Вязанка ТС Из печи Сливушки ф/п ф/в 0,25 кг тара2 НД1 ПГП2 МГ</text:p>
          </table:table-cell>
          <table:table-cell office:value-type="string" table:style-name="ce2">
            <text:p>240 шт</text:p>
          </table:table-cell>
          <table:table-cell office:value-type="float" office:value="60" table:style-name="ce2">
            <text:p>60</text:p>
          </table:table-cell>
          <table:table-cell office:value-type="float" office:value="240" table:formula="of:=VALUE(LEFT([.D7];LEN([.D7])-3))" table:style-name="ce13">
            <text:p>240</text:p>
          </table:table-cell>
          <table:table-cell office:value-type="float" office:value="60" table:formula="of:=[.F7]*[.N7]" table:style-name="ce13">
            <text:p>60</text:p>
          </table:table-cell>
          <table:table-cell office:value-type="float" office:value="0" table:formula="of:=[.G7]-[.E7]" table:style-name="ce14">
            <text:p>0<text:s/></text:p>
          </table:table-cell>
          <table:table-cell office:value-type="string" office:string-value="SU003795" table:formula="of:=VLOOKUP([.C7];['file:///D:/Father/Work/2025_05/РАБОЧИЙ%20СТОЛ/16,01,26%20ПОКОМ%20ЗПФ%20Коныгин/(отмена)рассчет%20заказ%20СТВ%20ПГП%20и%20ЗПФ.ods'#Лист1.$C:.$Q];7;0)" table:style-name="ce15">
            <text:p>SU003795</text:p>
          </table:table-cell>
          <table:table-cell office:value-type="string" office:string-value="P004535" table:formula="of:=VLOOKUP([.C7];['file:///D:/Father/Work/2025_05/РАБОЧИЙ%20СТОЛ/16,01,26%20ПОКОМ%20ЗПФ%20Коныгин/(отмена)рассчет%20заказ%20СТВ%20ПГП%20и%20ЗПФ.ods'#Лист1.$C:.$Q];8;0)" table:style-name="ce15">
            <text:p>P004535</text:p>
          </table:table-cell>
          <table:table-cell office:value-type="float" office:value="4301132170" table:formula="of:=VLOOKUP([.C7];['file:///D:/Father/Work/2025_05/РАБОЧИЙ%20СТОЛ/16,01,26%20ПОКОМ%20ЗПФ%20Коныгин/(отмена)рассчет%20заказ%20СТВ%20ПГП%20и%20ЗПФ.ods'#Лист1.$C:.$Q];9;0)" table:style-name="ce15">
            <text:p>4301132170</text:p>
          </table:table-cell>
          <table:table-cell office:value-type="float" office:value="4607111038487" table:formula="of:=VLOOKUP([.C7];['file:///D:/Father/Work/2025_05/РАБОЧИЙ%20СТОЛ/16,01,26%20ПОКОМ%20ЗПФ%20Коныгин/(отмена)рассчет%20заказ%20СТВ%20ПГП%20и%20ЗПФ.ods'#Лист1.$C:.$Q];10;0)" table:style-name="ce15">
            <text:p>4607111038487</text:p>
          </table:table-cell>
          <table:table-cell office:value-type="string" office:string-value="Наггетсы «с куриным филе и сыром» Фикс.вес 0,25 ТМ «Вязанка»" table:formula="of:=VLOOKUP([.C7];['file:///D:/Father/Work/2025_05/РАБОЧИЙ%20СТОЛ/16,01,26%20ПОКОМ%20ЗПФ%20Коныгин/(отмена)рассчет%20заказ%20СТВ%20ПГП%20и%20ЗПФ.ods'#Лист1.$C:.$Q];11;0)" table:style-name="ce16">
            <text:p>Наггетсы «с куриным филе и сыром» Фикс.вес 0,25 ТМ «Вязанка»</text:p>
          </table:table-cell>
          <table:table-cell office:value-type="float" office:value="0.25" table:formula="of:=VLOOKUP([.C7];['file:///D:/Father/Work/2025_05/РАБОЧИЙ%20СТОЛ/16,01,26%20ПОКОМ%20ЗПФ%20Коныгин/(отмена)рассчет%20заказ%20СТВ%20ПГП%20и%20ЗПФ.ods'#Лист1.$C:.$Q];12;0)" table:style-name="ce17">
            <text:p>0,25</text:p>
          </table:table-cell>
          <table:table-cell office:value-type="float" office:value="12" table:formula="of:=VLOOKUP([.C7];['file:///D:/Father/Work/2025_05/РАБОЧИЙ%20СТОЛ/16,01,26%20ПОКОМ%20ЗПФ%20Коныгин/(отмена)рассчет%20заказ%20СТВ%20ПГП%20и%20ЗПФ.ods'#Лист1.$C:.$Q];13;0)" table:style-name="ce17">
            <text:p>12,00</text:p>
          </table:table-cell>
          <table:table-cell office:value-type="float" office:value="14" table:formula="of:=VLOOKUP([.C7];['file:///D:/Father/Work/2025_05/РАБОЧИЙ%20СТОЛ/16,01,26%20ПОКОМ%20ЗПФ%20Коныгин/(отмена)рассчет%20заказ%20СТВ%20ПГП%20и%20ЗПФ.ods'#Лист1.$C:.$Q];14;0)" table:style-name="ce15">
            <text:p>14</text:p>
          </table:table-cell>
          <table:table-cell office:value-type="float" office:value="70" table:formula="of:=VLOOKUP([.C7];['file:///D:/Father/Work/2025_05/РАБОЧИЙ%20СТОЛ/16,01,26%20ПОКОМ%20ЗПФ%20Коныгин/(отмена)рассчет%20заказ%20СТВ%20ПГП%20и%20ЗПФ.ods'#Лист1.$C:.$Q];15;0)" table:style-name="ce15">
            <text:p>70</text:p>
          </table:table-cell>
          <table:table-cell office:value-type="float" office:value="14" table:formula="of:=MROUND([.F7];[.O7]*[.P7])/[.O7]" table:style-name="ce18">
            <text:p>14</text:p>
          </table:table-cell>
          <table:table-cell office:value-type="float" office:value="168" table:formula="of:=[.R7]*[.O7]" table:style-name="ce18">
            <text:p>168</text:p>
          </table:table-cell>
          <table:table-cell table:number-columns-repeated="2" table:style-name="ce1"/>
          <table:table-cell office:value-type="float" office:value="42" table:formula="of:=[.S7]*[.N7]" table:style-name="ce19">
            <text:p>42,00</text:p>
          </table:table-cell>
          <table:table-cell office:value-type="float" office:value="0.2" table:formula="of:=[.R7]/[.Q7]" table:style-name="ce19">
            <text:p>0,2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Наггетсы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Наггетсы Хрустящие ТМ Зареченские ТС Зареченские продукты вес 6 кг МГ</text:p>
          </table:table-cell>
          <table:table-cell office:value-type="string" table:style-name="ce2">
            <text:p>120 кг</text:p>
          </table:table-cell>
          <table:table-cell office:value-type="float" office:value="120" table:style-name="ce2">
            <text:p>120</text:p>
          </table:table-cell>
          <table:table-cell office:value-type="float" office:value="120" table:formula="of:=VALUE(LEFT([.D8];LEN([.D8])-3))" table:style-name="ce13">
            <text:p>120</text:p>
          </table:table-cell>
          <table:table-cell office:value-type="float" office:value="120" table:formula="of:=[.F8]*[.N8]" table:style-name="ce13">
            <text:p>120</text:p>
          </table:table-cell>
          <table:table-cell office:value-type="float" office:value="0" table:formula="of:=[.G8]-[.E8]" table:style-name="ce14">
            <text:p>0<text:s/></text:p>
          </table:table-cell>
          <table:table-cell office:value-type="string" office:string-value="SU003020" table:formula="of:=VLOOKUP([.C8];['file:///D:/Father/Work/2025_05/РАБОЧИЙ%20СТОЛ/16,01,26%20ПОКОМ%20ЗПФ%20Коныгин/(отмена)рассчет%20заказ%20СТВ%20ПГП%20и%20ЗПФ.ods'#Лист1.$C:.$Q];7;0)" table:style-name="ce15">
            <text:p>SU003020</text:p>
          </table:table-cell>
          <table:table-cell office:value-type="string" office:string-value="P003486" table:formula="of:=VLOOKUP([.C8];['file:///D:/Father/Work/2025_05/РАБОЧИЙ%20СТОЛ/16,01,26%20ПОКОМ%20ЗПФ%20Коныгин/(отмена)рассчет%20заказ%20СТВ%20ПГП%20и%20ЗПФ.ods'#Лист1.$C:.$Q];8;0)" table:style-name="ce15">
            <text:p>P003486</text:p>
          </table:table-cell>
          <table:table-cell office:value-type="float" office:value="4301132080" table:formula="of:=VLOOKUP([.C8];['file:///D:/Father/Work/2025_05/РАБОЧИЙ%20СТОЛ/16,01,26%20ПОКОМ%20ЗПФ%20Коныгин/(отмена)рассчет%20заказ%20СТВ%20ПГП%20и%20ЗПФ.ods'#Лист1.$C:.$Q];9;0)" table:style-name="ce15">
            <text:p>4301132080</text:p>
          </table:table-cell>
          <table:table-cell office:value-type="float" office:value="4640242180397" table:formula="of:=VLOOKUP([.C8];['file:///D:/Father/Work/2025_05/РАБОЧИЙ%20СТОЛ/16,01,26%20ПОКОМ%20ЗПФ%20Коныгин/(отмена)рассчет%20заказ%20СТВ%20ПГП%20и%20ЗПФ.ods'#Лист1.$C:.$Q];10;0)" table:style-name="ce15">
            <text:p>4640242180397</text:p>
          </table:table-cell>
          <table:table-cell office:value-type="string" office:string-value="Наггетсы «Хрустящие» Весовые ТМ «Зареченские» 6 кг" table:formula="of:=VLOOKUP([.C8];['file:///D:/Father/Work/2025_05/РАБОЧИЙ%20СТОЛ/16,01,26%20ПОКОМ%20ЗПФ%20Коныгин/(отмена)рассчет%20заказ%20СТВ%20ПГП%20и%20ЗПФ.ods'#Лист1.$C:.$Q];11;0)" table:style-name="ce16">
            <text:p>Наггетсы «Хрустящие» Весовые ТМ «Зареченские» 6 кг</text:p>
          </table:table-cell>
          <table:table-cell office:value-type="float" office:value="1" table:formula="of:=VLOOKUP([.C8];['file:///D:/Father/Work/2025_05/РАБОЧИЙ%20СТОЛ/16,01,26%20ПОКОМ%20ЗПФ%20Коныгин/(отмена)рассчет%20заказ%20СТВ%20ПГП%20и%20ЗПФ.ods'#Лист1.$C:.$Q];12;0)" table:style-name="ce17">
            <text:p>1,00</text:p>
          </table:table-cell>
          <table:table-cell office:value-type="float" office:value="6" table:formula="of:=VLOOKUP([.C8];['file:///D:/Father/Work/2025_05/РАБОЧИЙ%20СТОЛ/16,01,26%20ПОКОМ%20ЗПФ%20Коныгин/(отмена)рассчет%20заказ%20СТВ%20ПГП%20и%20ЗПФ.ods'#Лист1.$C:.$Q];13;0)" table:style-name="ce17">
            <text:p>6,00</text:p>
          </table:table-cell>
          <table:table-cell office:value-type="float" office:value="12" table:formula="of:=VLOOKUP([.C8];['file:///D:/Father/Work/2025_05/РАБОЧИЙ%20СТОЛ/16,01,26%20ПОКОМ%20ЗПФ%20Коныгин/(отмена)рассчет%20заказ%20СТВ%20ПГП%20и%20ЗПФ.ods'#Лист1.$C:.$Q];14;0)" table:style-name="ce15">
            <text:p>12</text:p>
          </table:table-cell>
          <table:table-cell office:value-type="float" office:value="84" table:formula="of:=VLOOKUP([.C8];['file:///D:/Father/Work/2025_05/РАБОЧИЙ%20СТОЛ/16,01,26%20ПОКОМ%20ЗПФ%20Коныгин/(отмена)рассчет%20заказ%20СТВ%20ПГП%20и%20ЗПФ.ods'#Лист1.$C:.$Q];15;0)" table:style-name="ce15">
            <text:p>84</text:p>
          </table:table-cell>
          <table:table-cell office:value-type="float" office:value="24" table:formula="of:=MROUND([.F8];[.O8]*[.P8])/[.O8]" table:style-name="ce18">
            <text:p>24</text:p>
          </table:table-cell>
          <table:table-cell office:value-type="float" office:value="144" table:formula="of:=[.R8]*[.O8]" table:style-name="ce18">
            <text:p>144</text:p>
          </table:table-cell>
          <table:table-cell table:number-columns-repeated="2" table:style-name="ce1"/>
          <table:table-cell office:value-type="float" office:value="144" table:formula="of:=[.S8]*[.N8]" table:style-name="ce19">
            <text:p>144,00</text:p>
          </table:table-cell>
          <table:table-cell office:value-type="float" office:value="0.2857142857142857" table:formula="of:=[.R8]/[.Q8]" table:style-name="ce19">
            <text:p>0,29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Наггетсы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Наггетсы Хрустящие ТМ Стародворье с сочной курочкой ф/в 0,23 кг Х5 МГ</text:p>
          </table:table-cell>
          <table:table-cell office:value-type="string" table:style-name="ce2">
            <text:p>144 шт</text:p>
          </table:table-cell>
          <table:table-cell office:value-type="float" office:value="33.119999999999997" table:style-name="ce2">
            <text:p>33,12</text:p>
          </table:table-cell>
          <table:table-cell office:value-type="float" office:value="144" table:formula="of:=VALUE(LEFT([.D9];LEN([.D9])-3))" table:style-name="ce13">
            <text:p>144</text:p>
          </table:table-cell>
          <table:table-cell office:value-type="float" office:value="33.120000000000005" table:formula="of:=[.F9]*[.N9]" table:style-name="ce13">
            <text:p>33,12</text:p>
          </table:table-cell>
          <table:table-cell office:value-type="float" office:value="0" table:formula="of:=[.G9]-[.E9]" table:style-name="ce14">
            <text:p>0<text:s/></text:p>
          </table:table-cell>
          <table:table-cell office:value-type="string" office:string-value="SU003930" table:formula="of:=VLOOKUP([.C9];['file:///D:/Father/Work/2025_05/РАБОЧИЙ%20СТОЛ/16,01,26%20ПОКОМ%20ЗПФ%20Коныгин/(отмена)рассчет%20заказ%20СТВ%20ПГП%20и%20ЗПФ.ods'#Лист1.$C:.$Q];7;0)" table:style-name="ce15">
            <text:p>SU003930</text:p>
          </table:table-cell>
          <table:table-cell office:value-type="string" office:string-value="P005043" table:formula="of:=VLOOKUP([.C9];['file:///D:/Father/Work/2025_05/РАБОЧИЙ%20СТОЛ/16,01,26%20ПОКОМ%20ЗПФ%20Коныгин/(отмена)рассчет%20заказ%20СТВ%20ПГП%20и%20ЗПФ.ods'#Лист1.$C:.$Q];8;0)" table:style-name="ce15">
            <text:p>P005043</text:p>
          </table:table-cell>
          <table:table-cell office:value-type="float" office:value="4301132227" table:formula="of:=VLOOKUP([.C9];['file:///D:/Father/Work/2025_05/РАБОЧИЙ%20СТОЛ/16,01,26%20ПОКОМ%20ЗПФ%20Коныгин/(отмена)рассчет%20заказ%20СТВ%20ПГП%20и%20ЗПФ.ods'#Лист1.$C:.$Q];9;0)" table:style-name="ce15">
            <text:p>4301132227</text:p>
          </table:table-cell>
          <table:table-cell office:value-type="float" office:value="4620207491133" table:formula="of:=VLOOKUP([.C9];['file:///D:/Father/Work/2025_05/РАБОЧИЙ%20СТОЛ/16,01,26%20ПОКОМ%20ЗПФ%20Коныгин/(отмена)рассчет%20заказ%20СТВ%20ПГП%20и%20ЗПФ.ods'#Лист1.$C:.$Q];10;0)" table:style-name="ce15">
            <text:p>4620207491133</text:p>
          </table:table-cell>
          <table:table-cell office:value-type="string" office:string-value="Наггетсы «Хрустящие с сочной курочкой» Фикс.вес 0,23 ТМ «Стародворье»" table:formula="of:=VLOOKUP([.C9];['file:///D:/Father/Work/2025_05/РАБОЧИЙ%20СТОЛ/16,01,26%20ПОКОМ%20ЗПФ%20Коныгин/(отмена)рассчет%20заказ%20СТВ%20ПГП%20и%20ЗПФ.ods'#Лист1.$C:.$Q];11;0)" table:style-name="ce16">
            <text:p>Наггетсы «Хрустящие с сочной курочкой» Фикс.вес 0,23 ТМ «Стародворье»</text:p>
          </table:table-cell>
          <table:table-cell office:value-type="float" office:value="0.23" table:formula="of:=VLOOKUP([.C9];['file:///D:/Father/Work/2025_05/РАБОЧИЙ%20СТОЛ/16,01,26%20ПОКОМ%20ЗПФ%20Коныгин/(отмена)рассчет%20заказ%20СТВ%20ПГП%20и%20ЗПФ.ods'#Лист1.$C:.$Q];12;0)" table:style-name="ce17">
            <text:p>0,23</text:p>
          </table:table-cell>
          <table:table-cell office:value-type="float" office:value="12" table:formula="of:=VLOOKUP([.C9];['file:///D:/Father/Work/2025_05/РАБОЧИЙ%20СТОЛ/16,01,26%20ПОКОМ%20ЗПФ%20Коныгин/(отмена)рассчет%20заказ%20СТВ%20ПГП%20и%20ЗПФ.ods'#Лист1.$C:.$Q];13;0)" table:style-name="ce17">
            <text:p>12,00</text:p>
          </table:table-cell>
          <table:table-cell office:value-type="float" office:value="14" table:formula="of:=VLOOKUP([.C9];['file:///D:/Father/Work/2025_05/РАБОЧИЙ%20СТОЛ/16,01,26%20ПОКОМ%20ЗПФ%20Коныгин/(отмена)рассчет%20заказ%20СТВ%20ПГП%20и%20ЗПФ.ods'#Лист1.$C:.$Q];14;0)" table:style-name="ce15">
            <text:p>14</text:p>
          </table:table-cell>
          <table:table-cell office:value-type="float" office:value="70" table:formula="of:=VLOOKUP([.C9];['file:///D:/Father/Work/2025_05/РАБОЧИЙ%20СТОЛ/16,01,26%20ПОКОМ%20ЗПФ%20Коныгин/(отмена)рассчет%20заказ%20СТВ%20ПГП%20и%20ЗПФ.ods'#Лист1.$C:.$Q];15;0)" table:style-name="ce15">
            <text:p>70</text:p>
          </table:table-cell>
          <table:table-cell office:value-type="float" office:value="14" table:formula="of:=MROUND([.F9];[.O9]*[.P9])/[.O9]" table:style-name="ce18">
            <text:p>14</text:p>
          </table:table-cell>
          <table:table-cell office:value-type="float" office:value="168" table:formula="of:=[.R9]*[.O9]" table:style-name="ce18">
            <text:p>168</text:p>
          </table:table-cell>
          <table:table-cell table:number-columns-repeated="2" table:style-name="ce1"/>
          <table:table-cell office:value-type="float" office:value="38.64" table:formula="of:=[.S9]*[.N9]" table:style-name="ce19">
            <text:p>38,64</text:p>
          </table:table-cell>
          <table:table-cell office:value-type="float" office:value="0.2" table:formula="of:=[.R9]/[.Q9]" table:style-name="ce19">
            <text:p>0,20</text:p>
          </table:table-cell>
          <table:table-cell table:number-columns-repeated="16361"/>
        </table:table-row>
        <table:table-row table:style-name="ro3">
          <table:table-cell office:value-type="string" table:style-name="ce2">
            <text:p>Пельмени</text:p>
          </table:table-cell>
          <table:table-cell office:value-type="string" table:style-name="ce3">
            <text:p>ЗПФ</text:p>
          </table:table-cell>
          <table:table-cell office:value-type="string" table:style-name="ce12">
            <text:p>Пельмени Бигбули #МЕГАВКУСИЩЕ с сочной грудинкой ТМ Горячая штучка ТС Бигбули ГШ сфера ф/п ф/в 0,7 кг МГ</text:p>
          </table:table-cell>
          <table:table-cell office:value-type="string" table:style-name="ce2">
            <text:p>30 шт</text:p>
          </table:table-cell>
          <table:table-cell office:value-type="float" office:value="21" table:style-name="ce2">
            <text:p>21</text:p>
          </table:table-cell>
          <table:table-cell office:value-type="float" office:value="30" table:formula="of:=VALUE(LEFT([.D10];LEN([.D10])-3))" table:style-name="ce13">
            <text:p>30</text:p>
          </table:table-cell>
          <table:table-cell office:value-type="float" office:value="21" table:formula="of:=[.F10]*[.N10]" table:style-name="ce13">
            <text:p>21</text:p>
          </table:table-cell>
          <table:table-cell office:value-type="float" office:value="0" table:formula="of:=[.G10]-[.E10]" table:style-name="ce14">
            <text:p>0<text:s/></text:p>
          </table:table-cell>
          <table:table-cell office:value-type="string" office:string-value="SU003532" table:formula="of:=VLOOKUP([.C10];['file:///D:/Father/Work/2025_05/РАБОЧИЙ%20СТОЛ/16,01,26%20ПОКОМ%20ЗПФ%20Коныгин/(отмена)рассчет%20заказ%20СТВ%20ПГП%20и%20ЗПФ.ods'#Лист1.$C:.$Q];7;0)" table:style-name="ce15">
            <text:p>SU003532</text:p>
          </table:table-cell>
          <table:table-cell office:value-type="string" office:string-value="P004440" table:formula="of:=VLOOKUP([.C10];['file:///D:/Father/Work/2025_05/РАБОЧИЙ%20СТОЛ/16,01,26%20ПОКОМ%20ЗПФ%20Коныгин/(отмена)рассчет%20заказ%20СТВ%20ПГП%20и%20ЗПФ.ods'#Лист1.$C:.$Q];8;0)" table:style-name="ce15">
            <text:p>P004440</text:p>
          </table:table-cell>
          <table:table-cell office:value-type="float" office:value="4301071044" table:formula="of:=VLOOKUP([.C10];['file:///D:/Father/Work/2025_05/РАБОЧИЙ%20СТОЛ/16,01,26%20ПОКОМ%20ЗПФ%20Коныгин/(отмена)рассчет%20заказ%20СТВ%20ПГП%20и%20ЗПФ.ods'#Лист1.$C:.$Q];9;0)" table:style-name="ce15">
            <text:p>4301071044</text:p>
          </table:table-cell>
          <table:table-cell office:value-type="float" office:value="4607111039385" table:formula="of:=VLOOKUP([.C10];['file:///D:/Father/Work/2025_05/РАБОЧИЙ%20СТОЛ/16,01,26%20ПОКОМ%20ЗПФ%20Коныгин/(отмена)рассчет%20заказ%20СТВ%20ПГП%20и%20ЗПФ.ods'#Лист1.$C:.$Q];10;0)" table:style-name="ce15">
            <text:p>4607111039385</text:p>
          </table:table-cell>
          <table:table-cell office:value-type="string" office:string-value="Пельмени «Бигбули #МЕГАВКУСИЩЕ с сочной грудинкой» 0,7 сфера ТМ «Горячая штучка»" table:formula="of:=VLOOKUP([.C10];['file:///D:/Father/Work/2025_05/РАБОЧИЙ%20СТОЛ/16,01,26%20ПОКОМ%20ЗПФ%20Коныгин/(отмена)рассчет%20заказ%20СТВ%20ПГП%20и%20ЗПФ.ods'#Лист1.$C:.$Q];11;0)" table:style-name="ce16">
            <text:p>Пельмени «Бигбули #МЕГАВКУСИЩЕ с сочной грудинкой» 0,7 сфера ТМ «Горячая штучка»</text:p>
          </table:table-cell>
          <table:table-cell office:value-type="float" office:value="0.7" table:formula="of:=VLOOKUP([.C10];['file:///D:/Father/Work/2025_05/РАБОЧИЙ%20СТОЛ/16,01,26%20ПОКОМ%20ЗПФ%20Коныгин/(отмена)рассчет%20заказ%20СТВ%20ПГП%20и%20ЗПФ.ods'#Лист1.$C:.$Q];12;0)" table:style-name="ce17">
            <text:p>0,70</text:p>
          </table:table-cell>
          <table:table-cell office:value-type="float" office:value="10" table:formula="of:=VLOOKUP([.C10];['file:///D:/Father/Work/2025_05/РАБОЧИЙ%20СТОЛ/16,01,26%20ПОКОМ%20ЗПФ%20Коныгин/(отмена)рассчет%20заказ%20СТВ%20ПГП%20и%20ЗПФ.ods'#Лист1.$C:.$Q];13;0)" table:style-name="ce17">
            <text:p>10,00</text:p>
          </table:table-cell>
          <table:table-cell office:value-type="float" office:value="12" table:formula="of:=VLOOKUP([.C10];['file:///D:/Father/Work/2025_05/РАБОЧИЙ%20СТОЛ/16,01,26%20ПОКОМ%20ЗПФ%20Коныгин/(отмена)рассчет%20заказ%20СТВ%20ПГП%20и%20ЗПФ.ods'#Лист1.$C:.$Q];14;0)" table:style-name="ce15">
            <text:p>12</text:p>
          </table:table-cell>
          <table:table-cell office:value-type="float" office:value="84" table:formula="of:=VLOOKUP([.C10];['file:///D:/Father/Work/2025_05/РАБОЧИЙ%20СТОЛ/16,01,26%20ПОКОМ%20ЗПФ%20Коныгин/(отмена)рассчет%20заказ%20СТВ%20ПГП%20и%20ЗПФ.ods'#Лист1.$C:.$Q];15;0)" table:style-name="ce15">
            <text:p>84</text:p>
          </table:table-cell>
          <table:table-cell office:value-type="float" office:value="0" table:formula="of:=MROUND([.F10];[.O10]*[.P10])/[.O10]" table:style-name="ce20">
            <text:p>0</text:p>
          </table:table-cell>
          <table:table-cell office:value-type="float" office:value="0" table:formula="of:=[.R10]*[.O10]" table:style-name="ce20">
            <text:p>0</text:p>
          </table:table-cell>
          <table:table-cell office:value-type="float" office:value="120" table:style-name="ce21">
            <text:p>120</text:p>
          </table:table-cell>
          <table:table-cell office:value-type="string" table:style-name="ce21">
            <text:p>кратность</text:p>
          </table:table-cell>
          <table:table-cell office:value-type="float" office:value="0" table:formula="of:=[.S10]*[.N10]" table:style-name="ce22">
            <text:p>0,00</text:p>
          </table:table-cell>
          <table:table-cell office:value-type="float" office:value="0" table:formula="of:=[.R10]/[.Q10]" table:style-name="ce22">
            <text:p>0,00</text:p>
          </table:table-cell>
          <table:table-cell table:number-columns-repeated="16361"/>
        </table:table-row>
        <table:table-row table:style-name="ro3">
          <table:table-cell office:value-type="string" table:style-name="ce2">
            <text:p>Пельмени</text:p>
          </table:table-cell>
          <table:table-cell office:value-type="string" table:style-name="ce3">
            <text:p>ЗПФ</text:p>
          </table:table-cell>
          <table:table-cell office:value-type="string" table:style-name="ce12">
            <text:p>Пельмени Бигбули с мясом ТМ Горячая штучка БУЛЬМЕНИ ТС Бигбули ГШ #МЕГАМЯСИЩЕ ф/п сфера ф/в 0,4 кг МГ</text:p>
          </table:table-cell>
          <table:table-cell office:value-type="string" table:style-name="ce2">
            <text:p>80 шт</text:p>
          </table:table-cell>
          <table:table-cell office:value-type="float" office:value="32" table:style-name="ce2">
            <text:p>32</text:p>
          </table:table-cell>
          <table:table-cell office:value-type="float" office:value="80" table:formula="of:=VALUE(LEFT([.D11];LEN([.D11])-3))" table:style-name="ce13">
            <text:p>80</text:p>
          </table:table-cell>
          <table:table-cell office:value-type="float" office:value="32" table:formula="of:=[.F11]*[.N11]" table:style-name="ce13">
            <text:p>32</text:p>
          </table:table-cell>
          <table:table-cell office:value-type="float" office:value="0" table:formula="of:=[.G11]-[.E11]" table:style-name="ce14">
            <text:p>0<text:s/></text:p>
          </table:table-cell>
          <table:table-cell office:value-type="string" office:string-value="SU003530" table:formula="of:=VLOOKUP([.C11];['file:///D:/Father/Work/2025_05/РАБОЧИЙ%20СТОЛ/16,01,26%20ПОКОМ%20ЗПФ%20Коныгин/(отмена)рассчет%20заказ%20СТВ%20ПГП%20и%20ЗПФ.ods'#Лист1.$C:.$Q];7;0)" table:style-name="ce15">
            <text:p>SU003530</text:p>
          </table:table-cell>
          <table:table-cell office:value-type="string" office:string-value="P004443" table:formula="of:=VLOOKUP([.C11];['file:///D:/Father/Work/2025_05/РАБОЧИЙ%20СТОЛ/16,01,26%20ПОКОМ%20ЗПФ%20Коныгин/(отмена)рассчет%20заказ%20СТВ%20ПГП%20и%20ЗПФ.ods'#Лист1.$C:.$Q];8;0)" table:style-name="ce15">
            <text:p>P004443</text:p>
          </table:table-cell>
          <table:table-cell office:value-type="float" office:value="4301071046" table:formula="of:=VLOOKUP([.C11];['file:///D:/Father/Work/2025_05/РАБОЧИЙ%20СТОЛ/16,01,26%20ПОКОМ%20ЗПФ%20Коныгин/(отмена)рассчет%20заказ%20СТВ%20ПГП%20и%20ЗПФ.ods'#Лист1.$C:.$Q];9;0)" table:style-name="ce15">
            <text:p>4301071046</text:p>
          </table:table-cell>
          <table:table-cell office:value-type="float" office:value="4607111039354" table:formula="of:=VLOOKUP([.C11];['file:///D:/Father/Work/2025_05/РАБОЧИЙ%20СТОЛ/16,01,26%20ПОКОМ%20ЗПФ%20Коныгин/(отмена)рассчет%20заказ%20СТВ%20ПГП%20и%20ЗПФ.ods'#Лист1.$C:.$Q];10;0)" table:style-name="ce15">
            <text:p>4607111039354</text:p>
          </table:table-cell>
          <table:table-cell office:value-type="string" office:string-value="Пельмени «Бигбули с мясом» 0,4 Сфера ТМ «Горячая штучка»" table:formula="of:=VLOOKUP([.C11];['file:///D:/Father/Work/2025_05/РАБОЧИЙ%20СТОЛ/16,01,26%20ПОКОМ%20ЗПФ%20Коныгин/(отмена)рассчет%20заказ%20СТВ%20ПГП%20и%20ЗПФ.ods'#Лист1.$C:.$Q];11;0)" table:style-name="ce16">
            <text:p>Пельмени «Бигбули с мясом» 0,4 Сфера ТМ «Горячая штучка»</text:p>
          </table:table-cell>
          <table:table-cell office:value-type="float" office:value="0.4" table:formula="of:=VLOOKUP([.C11];['file:///D:/Father/Work/2025_05/РАБОЧИЙ%20СТОЛ/16,01,26%20ПОКОМ%20ЗПФ%20Коныгин/(отмена)рассчет%20заказ%20СТВ%20ПГП%20и%20ЗПФ.ods'#Лист1.$C:.$Q];12;0)" table:style-name="ce17">
            <text:p>0,40</text:p>
          </table:table-cell>
          <table:table-cell office:value-type="float" office:value="16" table:formula="of:=VLOOKUP([.C11];['file:///D:/Father/Work/2025_05/РАБОЧИЙ%20СТОЛ/16,01,26%20ПОКОМ%20ЗПФ%20Коныгин/(отмена)рассчет%20заказ%20СТВ%20ПГП%20и%20ЗПФ.ods'#Лист1.$C:.$Q];13;0)" table:style-name="ce17">
            <text:p>16,00</text:p>
          </table:table-cell>
          <table:table-cell office:value-type="float" office:value="12" table:formula="of:=VLOOKUP([.C11];['file:///D:/Father/Work/2025_05/РАБОЧИЙ%20СТОЛ/16,01,26%20ПОКОМ%20ЗПФ%20Коныгин/(отмена)рассчет%20заказ%20СТВ%20ПГП%20и%20ЗПФ.ods'#Лист1.$C:.$Q];14;0)" table:style-name="ce15">
            <text:p>12</text:p>
          </table:table-cell>
          <table:table-cell office:value-type="float" office:value="84" table:formula="of:=VLOOKUP([.C11];['file:///D:/Father/Work/2025_05/РАБОЧИЙ%20СТОЛ/16,01,26%20ПОКОМ%20ЗПФ%20Коныгин/(отмена)рассчет%20заказ%20СТВ%20ПГП%20и%20ЗПФ.ods'#Лист1.$C:.$Q];15;0)" table:style-name="ce15">
            <text:p>84</text:p>
          </table:table-cell>
          <table:table-cell office:value-type="float" office:value="0" table:formula="of:=MROUND([.F11];[.O11]*[.P11])/[.O11]" table:style-name="ce20">
            <text:p>0</text:p>
          </table:table-cell>
          <table:table-cell office:value-type="float" office:value="0" table:formula="of:=[.R11]*[.O11]" table:style-name="ce20">
            <text:p>0</text:p>
          </table:table-cell>
          <table:table-cell office:value-type="float" office:value="192" table:style-name="ce21">
            <text:p>192</text:p>
          </table:table-cell>
          <table:table-cell office:value-type="string" table:style-name="ce21">
            <text:p>кратность</text:p>
          </table:table-cell>
          <table:table-cell office:value-type="float" office:value="0" table:formula="of:=[.S11]*[.N11]" table:style-name="ce22">
            <text:p>0,00</text:p>
          </table:table-cell>
          <table:table-cell office:value-type="float" office:value="0" table:formula="of:=[.R11]/[.Q11]" table:style-name="ce22">
            <text:p>0,00</text:p>
          </table:table-cell>
          <table:table-cell table:number-columns-repeated="16361"/>
        </table:table-row>
        <table:table-row table:style-name="ro3">
          <table:table-cell office:value-type="string" table:style-name="ce2">
            <text:p>Пельмени</text:p>
          </table:table-cell>
          <table:table-cell office:value-type="string" table:style-name="ce3">
            <text:p>ЗПФ</text:p>
          </table:table-cell>
          <table:table-cell office:value-type="string" table:style-name="ce12">
            <text:p>Пельмени Бигбули с мясом ТМ Горячая штучка БУЛЬМЕНИ ТС Бигбули ГШ #МЕГАМЯСИЩЕ ф/п сфера ф/в 0,7 кг МГ</text:p>
          </table:table-cell>
          <table:table-cell office:value-type="string" table:style-name="ce2">
            <text:p>130 шт</text:p>
          </table:table-cell>
          <table:table-cell office:value-type="float" office:value="91" table:style-name="ce2">
            <text:p>91</text:p>
          </table:table-cell>
          <table:table-cell office:value-type="float" office:value="130" table:formula="of:=VALUE(LEFT([.D12];LEN([.D12])-3))" table:style-name="ce13">
            <text:p>130</text:p>
          </table:table-cell>
          <table:table-cell office:value-type="float" office:value="91" table:formula="of:=[.F12]*[.N12]" table:style-name="ce13">
            <text:p>91</text:p>
          </table:table-cell>
          <table:table-cell office:value-type="float" office:value="0" table:formula="of:=[.G12]-[.E12]" table:style-name="ce14">
            <text:p>0<text:s/></text:p>
          </table:table-cell>
          <table:table-cell office:value-type="string" office:string-value="SU003529" table:formula="of:=VLOOKUP([.C12];['file:///D:/Father/Work/2025_05/РАБОЧИЙ%20СТОЛ/16,01,26%20ПОКОМ%20ЗПФ%20Коныгин/(отмена)рассчет%20заказ%20СТВ%20ПГП%20и%20ЗПФ.ods'#Лист1.$C:.$Q];7;0)" table:style-name="ce15">
            <text:p>SU003529</text:p>
          </table:table-cell>
          <table:table-cell office:value-type="string" office:string-value="P004442" table:formula="of:=VLOOKUP([.C12];['file:///D:/Father/Work/2025_05/РАБОЧИЙ%20СТОЛ/16,01,26%20ПОКОМ%20ЗПФ%20Коныгин/(отмена)рассчет%20заказ%20СТВ%20ПГП%20и%20ЗПФ.ods'#Лист1.$C:.$Q];8;0)" table:style-name="ce15">
            <text:p>P004442</text:p>
          </table:table-cell>
          <table:table-cell office:value-type="float" office:value="4301071047" table:formula="of:=VLOOKUP([.C12];['file:///D:/Father/Work/2025_05/РАБОЧИЙ%20СТОЛ/16,01,26%20ПОКОМ%20ЗПФ%20Коныгин/(отмена)рассчет%20заказ%20СТВ%20ПГП%20и%20ЗПФ.ods'#Лист1.$C:.$Q];9;0)" table:style-name="ce15">
            <text:p>4301071047</text:p>
          </table:table-cell>
          <table:table-cell office:value-type="float" office:value="4607111039330" table:formula="of:=VLOOKUP([.C12];['file:///D:/Father/Work/2025_05/РАБОЧИЙ%20СТОЛ/16,01,26%20ПОКОМ%20ЗПФ%20Коныгин/(отмена)рассчет%20заказ%20СТВ%20ПГП%20и%20ЗПФ.ods'#Лист1.$C:.$Q];10;0)" table:style-name="ce15">
            <text:p>4607111039330</text:p>
          </table:table-cell>
          <table:table-cell office:value-type="string" office:string-value="Пельмени «Бигбули с мясом» 0,7 Сфера ТМ «Горячая штучка»" table:formula="of:=VLOOKUP([.C12];['file:///D:/Father/Work/2025_05/РАБОЧИЙ%20СТОЛ/16,01,26%20ПОКОМ%20ЗПФ%20Коныгин/(отмена)рассчет%20заказ%20СТВ%20ПГП%20и%20ЗПФ.ods'#Лист1.$C:.$Q];11;0)" table:style-name="ce16">
            <text:p>Пельмени «Бигбули с мясом» 0,7 Сфера ТМ «Горячая штучка»</text:p>
          </table:table-cell>
          <table:table-cell office:value-type="float" office:value="0.7" table:formula="of:=VLOOKUP([.C12];['file:///D:/Father/Work/2025_05/РАБОЧИЙ%20СТОЛ/16,01,26%20ПОКОМ%20ЗПФ%20Коныгин/(отмена)рассчет%20заказ%20СТВ%20ПГП%20и%20ЗПФ.ods'#Лист1.$C:.$Q];12;0)" table:style-name="ce17">
            <text:p>0,70</text:p>
          </table:table-cell>
          <table:table-cell office:value-type="float" office:value="10" table:formula="of:=VLOOKUP([.C12];['file:///D:/Father/Work/2025_05/РАБОЧИЙ%20СТОЛ/16,01,26%20ПОКОМ%20ЗПФ%20Коныгин/(отмена)рассчет%20заказ%20СТВ%20ПГП%20и%20ЗПФ.ods'#Лист1.$C:.$Q];13;0)" table:style-name="ce17">
            <text:p>10,00</text:p>
          </table:table-cell>
          <table:table-cell office:value-type="float" office:value="12" table:formula="of:=VLOOKUP([.C12];['file:///D:/Father/Work/2025_05/РАБОЧИЙ%20СТОЛ/16,01,26%20ПОКОМ%20ЗПФ%20Коныгин/(отмена)рассчет%20заказ%20СТВ%20ПГП%20и%20ЗПФ.ods'#Лист1.$C:.$Q];14;0)" table:style-name="ce15">
            <text:p>12</text:p>
          </table:table-cell>
          <table:table-cell office:value-type="float" office:value="84" table:formula="of:=VLOOKUP([.C12];['file:///D:/Father/Work/2025_05/РАБОЧИЙ%20СТОЛ/16,01,26%20ПОКОМ%20ЗПФ%20Коныгин/(отмена)рассчет%20заказ%20СТВ%20ПГП%20и%20ЗПФ.ods'#Лист1.$C:.$Q];15;0)" table:style-name="ce15">
            <text:p>84</text:p>
          </table:table-cell>
          <table:table-cell office:value-type="float" office:value="12" table:formula="of:=MROUND([.F12];[.O12]*[.P12])/[.O12]" table:style-name="ce18">
            <text:p>12</text:p>
          </table:table-cell>
          <table:table-cell office:value-type="float" office:value="120" table:formula="of:=[.R12]*[.O12]" table:style-name="ce18">
            <text:p>120</text:p>
          </table:table-cell>
          <table:table-cell table:number-columns-repeated="2" table:style-name="ce1"/>
          <table:table-cell office:value-type="float" office:value="84" table:formula="of:=[.S12]*[.N12]" table:style-name="ce19">
            <text:p>84,00</text:p>
          </table:table-cell>
          <table:table-cell office:value-type="float" office:value="0.14285714285714285" table:formula="of:=[.R12]/[.Q12]" table:style-name="ce19">
            <text:p>0,14</text:p>
          </table:table-cell>
          <table:table-cell table:number-columns-repeated="16361"/>
        </table:table-row>
        <table:table-row table:style-name="ro3">
          <table:table-cell office:value-type="string" table:style-name="ce2">
            <text:p>Пельмени</text:p>
          </table:table-cell>
          <table:table-cell office:value-type="string" table:style-name="ce3">
            <text:p>ЗПФ</text:p>
          </table:table-cell>
          <table:table-cell office:value-type="string" table:style-name="ce12">
            <text:p>Пельмени Бигбули со сливочным маслом ТМ Горячая штучка БУЛЬМЕНИ ТС Бигбули ГШ #МЕГАМАСЛИЩЕ ф/п сфера ф/в 0,7 кг МГ</text:p>
          </table:table-cell>
          <table:table-cell office:value-type="string" table:style-name="ce2">
            <text:p>50 шт</text:p>
          </table:table-cell>
          <table:table-cell office:value-type="float" office:value="35" table:style-name="ce2">
            <text:p>35</text:p>
          </table:table-cell>
          <table:table-cell office:value-type="float" office:value="50" table:formula="of:=VALUE(LEFT([.D13];LEN([.D13])-3))" table:style-name="ce13">
            <text:p>50</text:p>
          </table:table-cell>
          <table:table-cell office:value-type="float" office:value="35" table:formula="of:=[.F13]*[.N13]" table:style-name="ce13">
            <text:p>35</text:p>
          </table:table-cell>
          <table:table-cell office:value-type="float" office:value="0" table:formula="of:=[.G13]-[.E13]" table:style-name="ce14">
            <text:p>0<text:s/></text:p>
          </table:table-cell>
          <table:table-cell office:value-type="string" office:string-value="SU003385" table:formula="of:=VLOOKUP([.C13];['file:///D:/Father/Work/2025_05/РАБОЧИЙ%20СТОЛ/16,01,26%20ПОКОМ%20ЗПФ%20Коныгин/(отмена)рассчет%20заказ%20СТВ%20ПГП%20и%20ЗПФ.ods'#Лист1.$C:.$Q];7;0)" table:style-name="ce15">
            <text:p>SU003385</text:p>
          </table:table-cell>
          <table:table-cell office:value-type="string" office:string-value="P004203" table:formula="of:=VLOOKUP([.C13];['file:///D:/Father/Work/2025_05/РАБОЧИЙ%20СТОЛ/16,01,26%20ПОКОМ%20ЗПФ%20Коныгин/(отмена)рассчет%20заказ%20СТВ%20ПГП%20и%20ЗПФ.ods'#Лист1.$C:.$Q];8;0)" table:style-name="ce15">
            <text:p>P004203</text:p>
          </table:table-cell>
          <table:table-cell office:value-type="float" office:value="4301071031" table:formula="of:=VLOOKUP([.C13];['file:///D:/Father/Work/2025_05/РАБОЧИЙ%20СТОЛ/16,01,26%20ПОКОМ%20ЗПФ%20Коныгин/(отмена)рассчет%20заказ%20СТВ%20ПГП%20и%20ЗПФ.ods'#Лист1.$C:.$Q];9;0)" table:style-name="ce15">
            <text:p>4301071031</text:p>
          </table:table-cell>
          <table:table-cell office:value-type="float" office:value="4607111038982" table:formula="of:=VLOOKUP([.C13];['file:///D:/Father/Work/2025_05/РАБОЧИЙ%20СТОЛ/16,01,26%20ПОКОМ%20ЗПФ%20Коныгин/(отмена)рассчет%20заказ%20СТВ%20ПГП%20и%20ЗПФ.ods'#Лист1.$C:.$Q];10;0)" table:style-name="ce15">
            <text:p>4607111038982</text:p>
          </table:table-cell>
          <table:table-cell office:value-type="string" office:string-value="Пельмени «Бигбули #МЕГАМАСЛИЩЕ со сливочным маслом» 0,7 сфера ТМ «Горячая штучка»" table:formula="of:=VLOOKUP([.C13];['file:///D:/Father/Work/2025_05/РАБОЧИЙ%20СТОЛ/16,01,26%20ПОКОМ%20ЗПФ%20Коныгин/(отмена)рассчет%20заказ%20СТВ%20ПГП%20и%20ЗПФ.ods'#Лист1.$C:.$Q];11;0)" table:style-name="ce16">
            <text:p>Пельмени «Бигбули #МЕГАМАСЛИЩЕ со сливочным маслом» 0,7 сфера ТМ «Горячая штучка»</text:p>
          </table:table-cell>
          <table:table-cell office:value-type="float" office:value="0.7" table:formula="of:=VLOOKUP([.C13];['file:///D:/Father/Work/2025_05/РАБОЧИЙ%20СТОЛ/16,01,26%20ПОКОМ%20ЗПФ%20Коныгин/(отмена)рассчет%20заказ%20СТВ%20ПГП%20и%20ЗПФ.ods'#Лист1.$C:.$Q];12;0)" table:style-name="ce17">
            <text:p>0,70</text:p>
          </table:table-cell>
          <table:table-cell office:value-type="float" office:value="10" table:formula="of:=VLOOKUP([.C13];['file:///D:/Father/Work/2025_05/РАБОЧИЙ%20СТОЛ/16,01,26%20ПОКОМ%20ЗПФ%20Коныгин/(отмена)рассчет%20заказ%20СТВ%20ПГП%20и%20ЗПФ.ods'#Лист1.$C:.$Q];13;0)" table:style-name="ce17">
            <text:p>10,00</text:p>
          </table:table-cell>
          <table:table-cell office:value-type="float" office:value="12" table:formula="of:=VLOOKUP([.C13];['file:///D:/Father/Work/2025_05/РАБОЧИЙ%20СТОЛ/16,01,26%20ПОКОМ%20ЗПФ%20Коныгин/(отмена)рассчет%20заказ%20СТВ%20ПГП%20и%20ЗПФ.ods'#Лист1.$C:.$Q];14;0)" table:style-name="ce15">
            <text:p>12</text:p>
          </table:table-cell>
          <table:table-cell office:value-type="float" office:value="84" table:formula="of:=VLOOKUP([.C13];['file:///D:/Father/Work/2025_05/РАБОЧИЙ%20СТОЛ/16,01,26%20ПОКОМ%20ЗПФ%20Коныгин/(отмена)рассчет%20заказ%20СТВ%20ПГП%20и%20ЗПФ.ods'#Лист1.$C:.$Q];15;0)" table:style-name="ce15">
            <text:p>84</text:p>
          </table:table-cell>
          <table:table-cell office:value-type="float" office:value="0" table:formula="of:=MROUND([.F13];[.O13]*[.P13])/[.O13]" table:style-name="ce18">
            <text:p>0</text:p>
          </table:table-cell>
          <table:table-cell office:value-type="float" office:value="0" table:formula="of:=[.R13]*[.O13]" table:style-name="ce18">
            <text:p>0</text:p>
          </table:table-cell>
          <table:table-cell table:number-columns-repeated="2" table:style-name="ce1"/>
          <table:table-cell office:value-type="float" office:value="0" table:formula="of:=[.S13]*[.N13]" table:style-name="ce19">
            <text:p>0,00</text:p>
          </table:table-cell>
          <table:table-cell office:value-type="float" office:value="0" table:formula="of:=[.R13]/[.Q13]" table:style-name="ce19">
            <text:p>0,00</text:p>
          </table:table-cell>
          <table:table-cell table:number-columns-repeated="16361"/>
        </table:table-row>
        <table:table-row table:style-name="ro3">
          <table:table-cell office:value-type="string" table:style-name="ce2">
            <text:p>Пельмени</text:p>
          </table:table-cell>
          <table:table-cell office:value-type="string" table:style-name="ce3">
            <text:p>ЗПФ</text:p>
          </table:table-cell>
          <table:table-cell office:value-type="string" table:style-name="ce12">
            <text:p>Пельмени Бульмени мини с мясом и оливковым маслом ТМ Горячая штучка ТС Бульмени ГШ ф/п сфера ф/в 0,7 кг МГ</text:p>
          </table:table-cell>
          <table:table-cell office:value-type="string" table:style-name="ce2">
            <text:p>250 шт</text:p>
          </table:table-cell>
          <table:table-cell office:value-type="float" office:value="175" table:style-name="ce2">
            <text:p>175</text:p>
          </table:table-cell>
          <table:table-cell office:value-type="float" office:value="250" table:formula="of:=VALUE(LEFT([.D14];LEN([.D14])-3))" table:style-name="ce13">
            <text:p>250</text:p>
          </table:table-cell>
          <table:table-cell office:value-type="float" office:value="175" table:formula="of:=[.F14]*[.N14]" table:style-name="ce13">
            <text:p>175</text:p>
          </table:table-cell>
          <table:table-cell office:value-type="float" office:value="0" table:formula="of:=[.G14]-[.E14]" table:style-name="ce14">
            <text:p>0<text:s/></text:p>
          </table:table-cell>
          <table:table-cell office:value-type="string" office:string-value="SU003717" table:formula="of:=VLOOKUP([.C14];['file:///D:/Father/Work/2025_05/РАБОЧИЙ%20СТОЛ/16,01,26%20ПОКОМ%20ЗПФ%20Коныгин/(отмена)рассчет%20заказ%20СТВ%20ПГП%20и%20ЗПФ.ods'#Лист1.$C:.$Q];7;0)" table:style-name="ce15">
            <text:p>SU003717</text:p>
          </table:table-cell>
          <table:table-cell office:value-type="string" office:string-value="P004819" table:formula="of:=VLOOKUP([.C14];['file:///D:/Father/Work/2025_05/РАБОЧИЙ%20СТОЛ/16,01,26%20ПОКОМ%20ЗПФ%20Коныгин/(отмена)рассчет%20заказ%20СТВ%20ПГП%20и%20ЗПФ.ods'#Лист1.$C:.$Q];8;0)" table:style-name="ce15">
            <text:p>P004819</text:p>
          </table:table-cell>
          <table:table-cell office:value-type="float" office:value="4301071074" table:formula="of:=VLOOKUP([.C14];['file:///D:/Father/Work/2025_05/РАБОЧИЙ%20СТОЛ/16,01,26%20ПОКОМ%20ЗПФ%20Коныгин/(отмена)рассчет%20заказ%20СТВ%20ПГП%20и%20ЗПФ.ods'#Лист1.$C:.$Q];9;0)" table:style-name="ce15">
            <text:p>4301071074</text:p>
          </table:table-cell>
          <table:table-cell office:value-type="float" office:value="4620207491157" table:formula="of:=VLOOKUP([.C14];['file:///D:/Father/Work/2025_05/РАБОЧИЙ%20СТОЛ/16,01,26%20ПОКОМ%20ЗПФ%20Коныгин/(отмена)рассчет%20заказ%20СТВ%20ПГП%20и%20ЗПФ.ods'#Лист1.$C:.$Q];10;0)" table:style-name="ce15">
            <text:p>4620207491157</text:p>
          </table:table-cell>
          <table:table-cell office:value-type="string" office:string-value="Пельмени «Бульмени мини с мясом и оливковым маслом» Фикс.вес 0,7 сфера ТМ «Горячая штучка»" table:formula="of:=VLOOKUP([.C14];['file:///D:/Father/Work/2025_05/РАБОЧИЙ%20СТОЛ/16,01,26%20ПОКОМ%20ЗПФ%20Коныгин/(отмена)рассчет%20заказ%20СТВ%20ПГП%20и%20ЗПФ.ods'#Лист1.$C:.$Q];11;0)" table:style-name="ce16">
            <text:p>Пельмени «Бульмени мини с мясом и оливковым маслом» Фикс.вес 0,7 сфера ТМ «Горячая штучка»</text:p>
          </table:table-cell>
          <table:table-cell office:value-type="float" office:value="0.7" table:formula="of:=VLOOKUP([.C14];['file:///D:/Father/Work/2025_05/РАБОЧИЙ%20СТОЛ/16,01,26%20ПОКОМ%20ЗПФ%20Коныгин/(отмена)рассчет%20заказ%20СТВ%20ПГП%20и%20ЗПФ.ods'#Лист1.$C:.$Q];12;0)" table:style-name="ce17">
            <text:p>0,70</text:p>
          </table:table-cell>
          <table:table-cell office:value-type="float" office:value="10" table:formula="of:=VLOOKUP([.C14];['file:///D:/Father/Work/2025_05/РАБОЧИЙ%20СТОЛ/16,01,26%20ПОКОМ%20ЗПФ%20Коныгин/(отмена)рассчет%20заказ%20СТВ%20ПГП%20и%20ЗПФ.ods'#Лист1.$C:.$Q];13;0)" table:style-name="ce17">
            <text:p>10,00</text:p>
          </table:table-cell>
          <table:table-cell office:value-type="float" office:value="12" table:formula="of:=VLOOKUP([.C14];['file:///D:/Father/Work/2025_05/РАБОЧИЙ%20СТОЛ/16,01,26%20ПОКОМ%20ЗПФ%20Коныгин/(отмена)рассчет%20заказ%20СТВ%20ПГП%20и%20ЗПФ.ods'#Лист1.$C:.$Q];14;0)" table:style-name="ce15">
            <text:p>12</text:p>
          </table:table-cell>
          <table:table-cell office:value-type="float" office:value="84" table:formula="of:=VLOOKUP([.C14];['file:///D:/Father/Work/2025_05/РАБОЧИЙ%20СТОЛ/16,01,26%20ПОКОМ%20ЗПФ%20Коныгин/(отмена)рассчет%20заказ%20СТВ%20ПГП%20и%20ЗПФ.ods'#Лист1.$C:.$Q];15;0)" table:style-name="ce15">
            <text:p>84</text:p>
          </table:table-cell>
          <table:table-cell office:value-type="float" office:value="24" table:formula="of:=MROUND([.F14];[.O14]*[.P14])/[.O14]" table:style-name="ce18">
            <text:p>24</text:p>
          </table:table-cell>
          <table:table-cell office:value-type="float" office:value="240" table:formula="of:=[.R14]*[.O14]" table:style-name="ce18">
            <text:p>240</text:p>
          </table:table-cell>
          <table:table-cell table:number-columns-repeated="2" table:style-name="ce1"/>
          <table:table-cell office:value-type="float" office:value="168" table:formula="of:=[.S14]*[.N14]" table:style-name="ce19">
            <text:p>168,00</text:p>
          </table:table-cell>
          <table:table-cell office:value-type="float" office:value="0.2857142857142857" table:formula="of:=[.R14]/[.Q14]" table:style-name="ce19">
            <text:p>0,29</text:p>
          </table:table-cell>
          <table:table-cell table:number-columns-repeated="16361"/>
        </table:table-row>
        <table:table-row table:style-name="ro3">
          <table:table-cell office:value-type="string" table:style-name="ce2">
            <text:p>Пельмени</text:p>
          </table:table-cell>
          <table:table-cell office:value-type="string" table:style-name="ce3">
            <text:p>ЗПФ</text:p>
          </table:table-cell>
          <table:table-cell office:value-type="string" table:style-name="ce12">
            <text:p>Пельмени Бульмени с говядиной и свининой Наваристые ТМ Горячая штучка ТС Бульмени ГШ сфера Вес 2,7 кг УМК УВС МГ</text:p>
          </table:table-cell>
          <table:table-cell office:value-type="string" table:style-name="ce2">
            <text:p>67,5 кг</text:p>
          </table:table-cell>
          <table:table-cell office:value-type="float" office:value="67.5" table:style-name="ce2">
            <text:p>67,5</text:p>
          </table:table-cell>
          <table:table-cell office:value-type="float" office:value="67.5" table:formula="of:=VALUE(LEFT([.D15];LEN([.D15])-3))" table:style-name="ce13">
            <text:p>67,5</text:p>
          </table:table-cell>
          <table:table-cell office:value-type="float" office:value="67.5" table:formula="of:=[.F15]*[.N15]" table:style-name="ce13">
            <text:p>67,5</text:p>
          </table:table-cell>
          <table:table-cell office:value-type="float" office:value="0" table:formula="of:=[.G15]-[.E15]" table:style-name="ce14">
            <text:p>0<text:s/></text:p>
          </table:table-cell>
          <table:table-cell office:value-type="string" office:string-value="SU002798" table:formula="of:=VLOOKUP([.C15];['file:///D:/Father/Work/2025_05/РАБОЧИЙ%20СТОЛ/16,01,26%20ПОКОМ%20ЗПФ%20Коныгин/(отмена)рассчет%20заказ%20СТВ%20ПГП%20и%20ЗПФ.ods'#Лист1.$C:.$Q];7;0)" table:style-name="ce15">
            <text:p>SU002798</text:p>
          </table:table-cell>
          <table:table-cell office:value-type="string" office:string-value="P003687" table:formula="of:=VLOOKUP([.C15];['file:///D:/Father/Work/2025_05/РАБОЧИЙ%20СТОЛ/16,01,26%20ПОКОМ%20ЗПФ%20Коныгин/(отмена)рассчет%20заказ%20СТВ%20ПГП%20и%20ЗПФ.ods'#Лист1.$C:.$Q];8;0)" table:style-name="ce15">
            <text:p>P003687</text:p>
          </table:table-cell>
          <table:table-cell office:value-type="float" office:value="4301070977" table:formula="of:=VLOOKUP([.C15];['file:///D:/Father/Work/2025_05/РАБОЧИЙ%20СТОЛ/16,01,26%20ПОКОМ%20ЗПФ%20Коныгин/(отмена)рассчет%20заказ%20СТВ%20ПГП%20и%20ЗПФ.ods'#Лист1.$C:.$Q];9;0)" table:style-name="ce15">
            <text:p>4301070977</text:p>
          </table:table-cell>
          <table:table-cell office:value-type="float" office:value="4607111037411" table:formula="of:=VLOOKUP([.C15];['file:///D:/Father/Work/2025_05/РАБОЧИЙ%20СТОЛ/16,01,26%20ПОКОМ%20ЗПФ%20Коныгин/(отмена)рассчет%20заказ%20СТВ%20ПГП%20и%20ЗПФ.ods'#Лист1.$C:.$Q];10;0)" table:style-name="ce15">
            <text:p>4607111037411</text:p>
          </table:table-cell>
          <table:table-cell office:value-type="string" office:string-value="Пельмени «Бульмени с говядиной и свининой Наваристые» Весовые Сфера ТМ «Горячая штучка» 2,7 кг" table:formula="of:=VLOOKUP([.C15];['file:///D:/Father/Work/2025_05/РАБОЧИЙ%20СТОЛ/16,01,26%20ПОКОМ%20ЗПФ%20Коныгин/(отмена)рассчет%20заказ%20СТВ%20ПГП%20и%20ЗПФ.ods'#Лист1.$C:.$Q];11;0)" table:style-name="ce16">
            <text:p>Пельмени «Бульмени с говядиной и свининой Наваристые» Весовые Сфера ТМ «Горячая штучка» 2,7 кг</text:p>
          </table:table-cell>
          <table:table-cell office:value-type="float" office:value="1" table:formula="of:=VLOOKUP([.C15];['file:///D:/Father/Work/2025_05/РАБОЧИЙ%20СТОЛ/16,01,26%20ПОКОМ%20ЗПФ%20Коныгин/(отмена)рассчет%20заказ%20СТВ%20ПГП%20и%20ЗПФ.ods'#Лист1.$C:.$Q];12;0)" table:style-name="ce17">
            <text:p>1,00</text:p>
          </table:table-cell>
          <table:table-cell office:value-type="float" office:value="2.7" table:formula="of:=VLOOKUP([.C15];['file:///D:/Father/Work/2025_05/РАБОЧИЙ%20СТОЛ/16,01,26%20ПОКОМ%20ЗПФ%20Коныгин/(отмена)рассчет%20заказ%20СТВ%20ПГП%20и%20ЗПФ.ods'#Лист1.$C:.$Q];13;0)" table:style-name="ce17">
            <text:p>2,70</text:p>
          </table:table-cell>
          <table:table-cell office:value-type="float" office:value="18" table:formula="of:=VLOOKUP([.C15];['file:///D:/Father/Work/2025_05/РАБОЧИЙ%20СТОЛ/16,01,26%20ПОКОМ%20ЗПФ%20Коныгин/(отмена)рассчет%20заказ%20СТВ%20ПГП%20и%20ЗПФ.ods'#Лист1.$C:.$Q];14;0)" table:style-name="ce15">
            <text:p>18</text:p>
          </table:table-cell>
          <table:table-cell office:value-type="float" office:value="234" table:formula="of:=VLOOKUP([.C15];['file:///D:/Father/Work/2025_05/РАБОЧИЙ%20СТОЛ/16,01,26%20ПОКОМ%20ЗПФ%20Коныгин/(отмена)рассчет%20заказ%20СТВ%20ПГП%20и%20ЗПФ.ods'#Лист1.$C:.$Q];15;0)" table:style-name="ce15">
            <text:p>234</text:p>
          </table:table-cell>
          <table:table-cell office:value-type="float" office:value="18" table:formula="of:=MROUND([.F15];[.O15]*[.P15])/[.O15]" table:style-name="ce18">
            <text:p>18</text:p>
          </table:table-cell>
          <table:table-cell office:value-type="float" office:value="48.6" table:formula="of:=[.R15]*[.O15]" table:style-name="ce18">
            <text:p>48,6</text:p>
          </table:table-cell>
          <table:table-cell table:number-columns-repeated="2" table:style-name="ce1"/>
          <table:table-cell office:value-type="float" office:value="48.6" table:formula="of:=[.S15]*[.N15]" table:style-name="ce19">
            <text:p>48,60</text:p>
          </table:table-cell>
          <table:table-cell office:value-type="float" office:value="7.6923076923076927E-2" table:formula="of:=[.R15]/[.Q15]" table:style-name="ce19">
            <text:p>0,08</text:p>
          </table:table-cell>
          <table:table-cell table:number-columns-repeated="16361"/>
        </table:table-row>
        <table:table-row table:style-name="ro3">
          <table:table-cell office:value-type="string" table:style-name="ce2">
            <text:p>Пельмени</text:p>
          </table:table-cell>
          <table:table-cell office:value-type="string" table:style-name="ce3">
            <text:p>ЗПФ</text:p>
          </table:table-cell>
          <table:table-cell office:value-type="string" table:style-name="ce12">
            <text:p>Пельмени Бульмени с говядиной и свининой Наваристые ТМ Горячая штучка ТС Бульмени ГШ сфера Вес 5 кг УВС МГ</text:p>
          </table:table-cell>
          <table:table-cell office:value-type="string" table:style-name="ce2">
            <text:p>150 кг</text:p>
          </table:table-cell>
          <table:table-cell office:value-type="float" office:value="150" table:style-name="ce2">
            <text:p>150</text:p>
          </table:table-cell>
          <table:table-cell office:value-type="float" office:value="150" table:formula="of:=VALUE(LEFT([.D16];LEN([.D16])-3))" table:style-name="ce13">
            <text:p>150</text:p>
          </table:table-cell>
          <table:table-cell office:value-type="float" office:value="150" table:formula="of:=[.F16]*[.N16]" table:style-name="ce13">
            <text:p>150</text:p>
          </table:table-cell>
          <table:table-cell office:value-type="float" office:value="0" table:formula="of:=[.G16]-[.E16]" table:style-name="ce14">
            <text:p>0<text:s/></text:p>
          </table:table-cell>
          <table:table-cell office:value-type="string" office:string-value="SU002595" table:formula="of:=VLOOKUP([.C16];['file:///D:/Father/Work/2025_05/РАБОЧИЙ%20СТОЛ/16,01,26%20ПОКОМ%20ЗПФ%20Коныгин/(отмена)рассчет%20заказ%20СТВ%20ПГП%20и%20ЗПФ.ods'#Лист1.$C:.$Q];7;0)" table:style-name="ce15">
            <text:p>SU002595</text:p>
          </table:table-cell>
          <table:table-cell office:value-type="string" office:string-value="P003697" table:formula="of:=VLOOKUP([.C16];['file:///D:/Father/Work/2025_05/РАБОЧИЙ%20СТОЛ/16,01,26%20ПОКОМ%20ЗПФ%20Коныгин/(отмена)рассчет%20заказ%20СТВ%20ПГП%20и%20ЗПФ.ods'#Лист1.$C:.$Q];8;0)" table:style-name="ce15">
            <text:p>P003697</text:p>
          </table:table-cell>
          <table:table-cell office:value-type="float" office:value="4301070981" table:formula="of:=VLOOKUP([.C16];['file:///D:/Father/Work/2025_05/РАБОЧИЙ%20СТОЛ/16,01,26%20ПОКОМ%20ЗПФ%20Коныгин/(отмена)рассчет%20заказ%20СТВ%20ПГП%20и%20ЗПФ.ods'#Лист1.$C:.$Q];9;0)" table:style-name="ce15">
            <text:p>4301070981</text:p>
          </table:table-cell>
          <table:table-cell office:value-type="float" office:value="4607111036728" table:formula="of:=VLOOKUP([.C16];['file:///D:/Father/Work/2025_05/РАБОЧИЙ%20СТОЛ/16,01,26%20ПОКОМ%20ЗПФ%20Коныгин/(отмена)рассчет%20заказ%20СТВ%20ПГП%20и%20ЗПФ.ods'#Лист1.$C:.$Q];10;0)" table:style-name="ce15">
            <text:p>4607111036728</text:p>
          </table:table-cell>
          <table:table-cell office:value-type="string" office:string-value="Пельмени «Бульмени с говядиной и свининой Наваристые» Весовые Сфера ТМ «Горячая штучка» 5 кг" table:formula="of:=VLOOKUP([.C16];['file:///D:/Father/Work/2025_05/РАБОЧИЙ%20СТОЛ/16,01,26%20ПОКОМ%20ЗПФ%20Коныгин/(отмена)рассчет%20заказ%20СТВ%20ПГП%20и%20ЗПФ.ods'#Лист1.$C:.$Q];11;0)" table:style-name="ce16">
            <text:p>Пельмени «Бульмени с говядиной и свининой Наваристые» Весовые Сфера ТМ «Горячая штучка» 5 кг</text:p>
          </table:table-cell>
          <table:table-cell office:value-type="float" office:value="1" table:formula="of:=VLOOKUP([.C16];['file:///D:/Father/Work/2025_05/РАБОЧИЙ%20СТОЛ/16,01,26%20ПОКОМ%20ЗПФ%20Коныгин/(отмена)рассчет%20заказ%20СТВ%20ПГП%20и%20ЗПФ.ods'#Лист1.$C:.$Q];12;0)" table:style-name="ce17">
            <text:p>1,00</text:p>
          </table:table-cell>
          <table:table-cell office:value-type="float" office:value="5" table:formula="of:=VLOOKUP([.C16];['file:///D:/Father/Work/2025_05/РАБОЧИЙ%20СТОЛ/16,01,26%20ПОКОМ%20ЗПФ%20Коныгин/(отмена)рассчет%20заказ%20СТВ%20ПГП%20и%20ЗПФ.ods'#Лист1.$C:.$Q];13;0)" table:style-name="ce17">
            <text:p>5,00</text:p>
          </table:table-cell>
          <table:table-cell office:value-type="float" office:value="12" table:formula="of:=VLOOKUP([.C16];['file:///D:/Father/Work/2025_05/РАБОЧИЙ%20СТОЛ/16,01,26%20ПОКОМ%20ЗПФ%20Коныгин/(отмена)рассчет%20заказ%20СТВ%20ПГП%20и%20ЗПФ.ods'#Лист1.$C:.$Q];14;0)" table:style-name="ce15">
            <text:p>12</text:p>
          </table:table-cell>
          <table:table-cell office:value-type="float" office:value="144" table:formula="of:=VLOOKUP([.C16];['file:///D:/Father/Work/2025_05/РАБОЧИЙ%20СТОЛ/16,01,26%20ПОКОМ%20ЗПФ%20Коныгин/(отмена)рассчет%20заказ%20СТВ%20ПГП%20и%20ЗПФ.ods'#Лист1.$C:.$Q];15;0)" table:style-name="ce15">
            <text:p>144</text:p>
          </table:table-cell>
          <table:table-cell office:value-type="float" office:value="36" table:formula="of:=MROUND([.F16];[.O16]*[.P16])/[.O16]" table:style-name="ce18">
            <text:p>36</text:p>
          </table:table-cell>
          <table:table-cell office:value-type="float" office:value="180" table:formula="of:=[.R16]*[.O16]" table:style-name="ce18">
            <text:p>180</text:p>
          </table:table-cell>
          <table:table-cell table:number-columns-repeated="2" table:style-name="ce1"/>
          <table:table-cell office:value-type="float" office:value="180" table:formula="of:=[.S16]*[.N16]" table:style-name="ce19">
            <text:p>180,00</text:p>
          </table:table-cell>
          <table:table-cell office:value-type="float" office:value="0.25" table:formula="of:=[.R16]/[.Q16]" table:style-name="ce19">
            <text:p>0,25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Пельмени</text:p>
          </table:table-cell>
          <table:table-cell office:value-type="string" table:style-name="ce3">
            <text:p>ЗПФ</text:p>
          </table:table-cell>
          <table:table-cell office:value-type="string" table:style-name="ce12">
            <text:p>Пельмени Бульмени с говядиной и свининой ТМ Горячая штучка ТС Бульмени ГШ ф/п сфера ф/в 0,4 кг тара2 МГ</text:p>
          </table:table-cell>
          <table:table-cell office:value-type="string" table:style-name="ce2">
            <text:p>560 шт</text:p>
          </table:table-cell>
          <table:table-cell office:value-type="float" office:value="224" table:style-name="ce2">
            <text:p>224</text:p>
          </table:table-cell>
          <table:table-cell office:value-type="float" office:value="560" table:formula="of:=VALUE(LEFT([.D17];LEN([.D17])-3))" table:style-name="ce13">
            <text:p>560</text:p>
          </table:table-cell>
          <table:table-cell office:value-type="float" office:value="224" table:formula="of:=[.F17]*[.N17]" table:style-name="ce13">
            <text:p>224</text:p>
          </table:table-cell>
          <table:table-cell office:value-type="float" office:value="0" table:formula="of:=[.G17]-[.E17]" table:style-name="ce14">
            <text:p>0<text:s/></text:p>
          </table:table-cell>
          <table:table-cell office:value-type="string" office:string-value="SU003527" table:formula="of:=VLOOKUP([.C17];['file:///D:/Father/Work/2025_05/РАБОЧИЙ%20СТОЛ/16,01,26%20ПОКОМ%20ЗПФ%20Коныгин/(отмена)рассчет%20заказ%20СТВ%20ПГП%20и%20ЗПФ.ods'#Лист1.$C:.$Q];7;0)" table:style-name="ce15">
            <text:p>SU003527</text:p>
          </table:table-cell>
          <table:table-cell office:value-type="string" office:string-value="P004474" table:formula="of:=VLOOKUP([.C17];['file:///D:/Father/Work/2025_05/РАБОЧИЙ%20СТОЛ/16,01,26%20ПОКОМ%20ЗПФ%20Коныгин/(отмена)рассчет%20заказ%20СТВ%20ПГП%20и%20ЗПФ.ods'#Лист1.$C:.$Q];8;0)" table:style-name="ce15">
            <text:p>P004474</text:p>
          </table:table-cell>
          <table:table-cell office:value-type="float" office:value="4301071051" table:formula="of:=VLOOKUP([.C17];['file:///D:/Father/Work/2025_05/РАБОЧИЙ%20СТОЛ/16,01,26%20ПОКОМ%20ЗПФ%20Коныгин/(отмена)рассчет%20заказ%20СТВ%20ПГП%20и%20ЗПФ.ods'#Лист1.$C:.$Q];9;0)" table:style-name="ce15">
            <text:p>4301071051</text:p>
          </table:table-cell>
          <table:table-cell office:value-type="float" office:value="4607111039262" table:formula="of:=VLOOKUP([.C17];['file:///D:/Father/Work/2025_05/РАБОЧИЙ%20СТОЛ/16,01,26%20ПОКОМ%20ЗПФ%20Коныгин/(отмена)рассчет%20заказ%20СТВ%20ПГП%20и%20ЗПФ.ods'#Лист1.$C:.$Q];10;0)" table:style-name="ce15">
            <text:p>4607111039262</text:p>
          </table:table-cell>
          <table:table-cell office:value-type="string" office:string-value="Пельмени «Бульмени с говядиной и свининой» 0,4 Сфера ТМ «Горячая штучка»" table:formula="of:=VLOOKUP([.C17];['file:///D:/Father/Work/2025_05/РАБОЧИЙ%20СТОЛ/16,01,26%20ПОКОМ%20ЗПФ%20Коныгин/(отмена)рассчет%20заказ%20СТВ%20ПГП%20и%20ЗПФ.ods'#Лист1.$C:.$Q];11;0)" table:style-name="ce16">
            <text:p>Пельмени «Бульмени с говядиной и свининой» 0,4 Сфера ТМ «Горячая штучка»</text:p>
          </table:table-cell>
          <table:table-cell office:value-type="float" office:value="0.4" table:formula="of:=VLOOKUP([.C17];['file:///D:/Father/Work/2025_05/РАБОЧИЙ%20СТОЛ/16,01,26%20ПОКОМ%20ЗПФ%20Коныгин/(отмена)рассчет%20заказ%20СТВ%20ПГП%20и%20ЗПФ.ods'#Лист1.$C:.$Q];12;0)" table:style-name="ce17">
            <text:p>0,40</text:p>
          </table:table-cell>
          <table:table-cell office:value-type="float" office:value="16" table:formula="of:=VLOOKUP([.C17];['file:///D:/Father/Work/2025_05/РАБОЧИЙ%20СТОЛ/16,01,26%20ПОКОМ%20ЗПФ%20Коныгин/(отмена)рассчет%20заказ%20СТВ%20ПГП%20и%20ЗПФ.ods'#Лист1.$C:.$Q];13;0)" table:style-name="ce17">
            <text:p>16,00</text:p>
          </table:table-cell>
          <table:table-cell office:value-type="float" office:value="12" table:formula="of:=VLOOKUP([.C17];['file:///D:/Father/Work/2025_05/РАБОЧИЙ%20СТОЛ/16,01,26%20ПОКОМ%20ЗПФ%20Коныгин/(отмена)рассчет%20заказ%20СТВ%20ПГП%20и%20ЗПФ.ods'#Лист1.$C:.$Q];14;0)" table:style-name="ce15">
            <text:p>12</text:p>
          </table:table-cell>
          <table:table-cell office:value-type="float" office:value="84" table:formula="of:=VLOOKUP([.C17];['file:///D:/Father/Work/2025_05/РАБОЧИЙ%20СТОЛ/16,01,26%20ПОКОМ%20ЗПФ%20Коныгин/(отмена)рассчет%20заказ%20СТВ%20ПГП%20и%20ЗПФ.ods'#Лист1.$C:.$Q];15;0)" table:style-name="ce15">
            <text:p>84</text:p>
          </table:table-cell>
          <table:table-cell office:value-type="float" office:value="36" table:formula="of:=MROUND([.F17];[.O17]*[.P17])/[.O17]" table:style-name="ce18">
            <text:p>36</text:p>
          </table:table-cell>
          <table:table-cell office:value-type="float" office:value="576" table:formula="of:=[.R17]*[.O17]" table:style-name="ce18">
            <text:p>576</text:p>
          </table:table-cell>
          <table:table-cell table:number-columns-repeated="2" table:style-name="ce1"/>
          <table:table-cell office:value-type="float" office:value="230.4" table:formula="of:=[.S17]*[.N17]" table:style-name="ce19">
            <text:p>230,40</text:p>
          </table:table-cell>
          <table:table-cell office:value-type="float" office:value="0.42857142857142855" table:formula="of:=[.R17]/[.Q17]" table:style-name="ce19">
            <text:p>0,43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Пельмени</text:p>
          </table:table-cell>
          <table:table-cell office:value-type="string" table:style-name="ce3">
            <text:p>ЗПФ</text:p>
          </table:table-cell>
          <table:table-cell office:value-type="string" table:style-name="ce12">
            <text:p>Пельмени Бульмени с говядиной и свининой ТМ Горячая штучка ТС Бульмени ГШ ф/п сфера ф/в 0,7 кг МГ</text:p>
          </table:table-cell>
          <table:table-cell office:value-type="string" table:style-name="ce2">
            <text:p>500 шт</text:p>
          </table:table-cell>
          <table:table-cell office:value-type="float" office:value="350" table:style-name="ce2">
            <text:p>350</text:p>
          </table:table-cell>
          <table:table-cell office:value-type="float" office:value="500" table:formula="of:=VALUE(LEFT([.D18];LEN([.D18])-3))" table:style-name="ce13">
            <text:p>500</text:p>
          </table:table-cell>
          <table:table-cell office:value-type="float" office:value="350" table:formula="of:=[.F18]*[.N18]" table:style-name="ce13">
            <text:p>350</text:p>
          </table:table-cell>
          <table:table-cell office:value-type="float" office:value="0" table:formula="of:=[.G18]-[.E18]" table:style-name="ce14">
            <text:p>0<text:s/></text:p>
          </table:table-cell>
          <table:table-cell office:value-type="string" office:string-value="SU003460" table:formula="of:=VLOOKUP([.C18];['file:///D:/Father/Work/2025_05/РАБОЧИЙ%20СТОЛ/16,01,26%20ПОКОМ%20ЗПФ%20Коныгин/(отмена)рассчет%20заказ%20СТВ%20ПГП%20и%20ЗПФ.ods'#Лист1.$C:.$Q];7;0)" table:style-name="ce15">
            <text:p>SU003460</text:p>
          </table:table-cell>
          <table:table-cell office:value-type="string" office:string-value="P004345" table:formula="of:=VLOOKUP([.C18];['file:///D:/Father/Work/2025_05/РАБОЧИЙ%20СТОЛ/16,01,26%20ПОКОМ%20ЗПФ%20Коныгин/(отмена)рассчет%20заказ%20СТВ%20ПГП%20и%20ЗПФ.ods'#Лист1.$C:.$Q];8;0)" table:style-name="ce15">
            <text:p>P004345</text:p>
          </table:table-cell>
          <table:table-cell office:value-type="float" office:value="4301071038" table:formula="of:=VLOOKUP([.C18];['file:///D:/Father/Work/2025_05/РАБОЧИЙ%20СТОЛ/16,01,26%20ПОКОМ%20ЗПФ%20Коныгин/(отмена)рассчет%20заказ%20СТВ%20ПГП%20и%20ЗПФ.ods'#Лист1.$C:.$Q];9;0)" table:style-name="ce15">
            <text:p>4301071038</text:p>
          </table:table-cell>
          <table:table-cell office:value-type="float" office:value="4607111039248" table:formula="of:=VLOOKUP([.C18];['file:///D:/Father/Work/2025_05/РАБОЧИЙ%20СТОЛ/16,01,26%20ПОКОМ%20ЗПФ%20Коныгин/(отмена)рассчет%20заказ%20СТВ%20ПГП%20и%20ЗПФ.ods'#Лист1.$C:.$Q];10;0)" table:style-name="ce15">
            <text:p>4607111039248</text:p>
          </table:table-cell>
          <table:table-cell office:value-type="string" office:string-value="Пельмени «Бульмени с говядиной и свининой» 0,7 Сфера ТМ «Горячая штучка»" table:formula="of:=VLOOKUP([.C18];['file:///D:/Father/Work/2025_05/РАБОЧИЙ%20СТОЛ/16,01,26%20ПОКОМ%20ЗПФ%20Коныгин/(отмена)рассчет%20заказ%20СТВ%20ПГП%20и%20ЗПФ.ods'#Лист1.$C:.$Q];11;0)" table:style-name="ce16">
            <text:p>Пельмени «Бульмени с говядиной и свининой» 0,7 Сфера ТМ «Горячая штучка»</text:p>
          </table:table-cell>
          <table:table-cell office:value-type="float" office:value="0.7" table:formula="of:=VLOOKUP([.C18];['file:///D:/Father/Work/2025_05/РАБОЧИЙ%20СТОЛ/16,01,26%20ПОКОМ%20ЗПФ%20Коныгин/(отмена)рассчет%20заказ%20СТВ%20ПГП%20и%20ЗПФ.ods'#Лист1.$C:.$Q];12;0)" table:style-name="ce17">
            <text:p>0,70</text:p>
          </table:table-cell>
          <table:table-cell office:value-type="float" office:value="10" table:formula="of:=VLOOKUP([.C18];['file:///D:/Father/Work/2025_05/РАБОЧИЙ%20СТОЛ/16,01,26%20ПОКОМ%20ЗПФ%20Коныгин/(отмена)рассчет%20заказ%20СТВ%20ПГП%20и%20ЗПФ.ods'#Лист1.$C:.$Q];13;0)" table:style-name="ce17">
            <text:p>10,00</text:p>
          </table:table-cell>
          <table:table-cell office:value-type="float" office:value="12" table:formula="of:=VLOOKUP([.C18];['file:///D:/Father/Work/2025_05/РАБОЧИЙ%20СТОЛ/16,01,26%20ПОКОМ%20ЗПФ%20Коныгин/(отмена)рассчет%20заказ%20СТВ%20ПГП%20и%20ЗПФ.ods'#Лист1.$C:.$Q];14;0)" table:style-name="ce15">
            <text:p>12</text:p>
          </table:table-cell>
          <table:table-cell office:value-type="float" office:value="84" table:formula="of:=VLOOKUP([.C18];['file:///D:/Father/Work/2025_05/РАБОЧИЙ%20СТОЛ/16,01,26%20ПОКОМ%20ЗПФ%20Коныгин/(отмена)рассчет%20заказ%20СТВ%20ПГП%20и%20ЗПФ.ods'#Лист1.$C:.$Q];15;0)" table:style-name="ce15">
            <text:p>84</text:p>
          </table:table-cell>
          <table:table-cell office:value-type="float" office:value="48" table:formula="of:=MROUND([.F18];[.O18]*[.P18])/[.O18]" table:style-name="ce18">
            <text:p>48</text:p>
          </table:table-cell>
          <table:table-cell office:value-type="float" office:value="480" table:formula="of:=[.R18]*[.O18]" table:style-name="ce18">
            <text:p>480</text:p>
          </table:table-cell>
          <table:table-cell table:number-columns-repeated="2" table:style-name="ce1"/>
          <table:table-cell office:value-type="float" office:value="336" table:formula="of:=[.S18]*[.N18]" table:style-name="ce19">
            <text:p>336,00</text:p>
          </table:table-cell>
          <table:table-cell office:value-type="float" office:value="0.5714285714285714" table:formula="of:=[.R18]/[.Q18]" table:style-name="ce19">
            <text:p>0,57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Пельмени</text:p>
          </table:table-cell>
          <table:table-cell office:value-type="string" table:style-name="ce3">
            <text:p>ЗПФ</text:p>
          </table:table-cell>
          <table:table-cell office:value-type="string" table:style-name="ce12">
            <text:p>Пельмени Бульмени со сливочным маслом ТМ Горячая штучка ТС Бульмени ГШ ф/п сфера ф/в 0,4 кг МГ</text:p>
          </table:table-cell>
          <table:table-cell office:value-type="string" table:style-name="ce2">
            <text:p>400 <text:s/>шт</text:p>
          </table:table-cell>
          <table:table-cell office:value-type="float" office:value="160" table:style-name="ce2">
            <text:p>160</text:p>
          </table:table-cell>
          <table:table-cell office:value-type="float" office:value="400" table:formula="of:=VALUE(LEFT([.D19];LEN([.D19])-3))" table:style-name="ce13">
            <text:p>400</text:p>
          </table:table-cell>
          <table:table-cell office:value-type="float" office:value="160" table:formula="of:=[.F19]*[.N19]" table:style-name="ce13">
            <text:p>160</text:p>
          </table:table-cell>
          <table:table-cell office:value-type="float" office:value="0" table:formula="of:=[.G19]-[.E19]" table:style-name="ce14">
            <text:p>0<text:s/></text:p>
          </table:table-cell>
          <table:table-cell office:value-type="string" office:string-value="SU003528" table:formula="of:=VLOOKUP([.C19];['file:///D:/Father/Work/2025_05/РАБОЧИЙ%20СТОЛ/16,01,26%20ПОКОМ%20ЗПФ%20Коныгин/(отмена)рассчет%20заказ%20СТВ%20ПГП%20и%20ЗПФ.ods'#Лист1.$C:.$Q];7;0)" table:style-name="ce15">
            <text:p>SU003528</text:p>
          </table:table-cell>
          <table:table-cell office:value-type="string" office:string-value="P004444" table:formula="of:=VLOOKUP([.C19];['file:///D:/Father/Work/2025_05/РАБОЧИЙ%20СТОЛ/16,01,26%20ПОКОМ%20ЗПФ%20Коныгин/(отмена)рассчет%20заказ%20СТВ%20ПГП%20и%20ЗПФ.ods'#Лист1.$C:.$Q];8;0)" table:style-name="ce15">
            <text:p>P004444</text:p>
          </table:table-cell>
          <table:table-cell office:value-type="float" office:value="4301071049" table:formula="of:=VLOOKUP([.C19];['file:///D:/Father/Work/2025_05/РАБОЧИЙ%20СТОЛ/16,01,26%20ПОКОМ%20ЗПФ%20Коныгин/(отмена)рассчет%20заказ%20СТВ%20ПГП%20и%20ЗПФ.ods'#Лист1.$C:.$Q];9;0)" table:style-name="ce15">
            <text:p>4301071049</text:p>
          </table:table-cell>
          <table:table-cell office:value-type="float" office:value="4607111039293" table:formula="of:=VLOOKUP([.C19];['file:///D:/Father/Work/2025_05/РАБОЧИЙ%20СТОЛ/16,01,26%20ПОКОМ%20ЗПФ%20Коныгин/(отмена)рассчет%20заказ%20СТВ%20ПГП%20и%20ЗПФ.ods'#Лист1.$C:.$Q];10;0)" table:style-name="ce15">
            <text:p>4607111039293</text:p>
          </table:table-cell>
          <table:table-cell office:value-type="string" office:string-value="Пельмени «Бульмени со сливочным маслом» Фикс.вес 0,4 ТМ «Горячая штучка»" table:formula="of:=VLOOKUP([.C19];['file:///D:/Father/Work/2025_05/РАБОЧИЙ%20СТОЛ/16,01,26%20ПОКОМ%20ЗПФ%20Коныгин/(отмена)рассчет%20заказ%20СТВ%20ПГП%20и%20ЗПФ.ods'#Лист1.$C:.$Q];11;0)" table:style-name="ce16">
            <text:p>Пельмени «Бульмени со сливочным маслом» Фикс.вес 0,4 ТМ «Горячая штучка»</text:p>
          </table:table-cell>
          <table:table-cell office:value-type="float" office:value="0.4" table:formula="of:=VLOOKUP([.C19];['file:///D:/Father/Work/2025_05/РАБОЧИЙ%20СТОЛ/16,01,26%20ПОКОМ%20ЗПФ%20Коныгин/(отмена)рассчет%20заказ%20СТВ%20ПГП%20и%20ЗПФ.ods'#Лист1.$C:.$Q];12;0)" table:style-name="ce17">
            <text:p>0,40</text:p>
          </table:table-cell>
          <table:table-cell office:value-type="float" office:value="16" table:formula="of:=VLOOKUP([.C19];['file:///D:/Father/Work/2025_05/РАБОЧИЙ%20СТОЛ/16,01,26%20ПОКОМ%20ЗПФ%20Коныгин/(отмена)рассчет%20заказ%20СТВ%20ПГП%20и%20ЗПФ.ods'#Лист1.$C:.$Q];13;0)" table:style-name="ce17">
            <text:p>16,00</text:p>
          </table:table-cell>
          <table:table-cell office:value-type="float" office:value="12" table:formula="of:=VLOOKUP([.C19];['file:///D:/Father/Work/2025_05/РАБОЧИЙ%20СТОЛ/16,01,26%20ПОКОМ%20ЗПФ%20Коныгин/(отмена)рассчет%20заказ%20СТВ%20ПГП%20и%20ЗПФ.ods'#Лист1.$C:.$Q];14;0)" table:style-name="ce15">
            <text:p>12</text:p>
          </table:table-cell>
          <table:table-cell office:value-type="float" office:value="84" table:formula="of:=VLOOKUP([.C19];['file:///D:/Father/Work/2025_05/РАБОЧИЙ%20СТОЛ/16,01,26%20ПОКОМ%20ЗПФ%20Коныгин/(отмена)рассчет%20заказ%20СТВ%20ПГП%20и%20ЗПФ.ods'#Лист1.$C:.$Q];15;0)" table:style-name="ce15">
            <text:p>84</text:p>
          </table:table-cell>
          <table:table-cell office:value-type="float" office:value="24" table:formula="of:=MROUND([.F19];[.O19]*[.P19])/[.O19]" table:style-name="ce18">
            <text:p>24</text:p>
          </table:table-cell>
          <table:table-cell office:value-type="float" office:value="384" table:formula="of:=[.R19]*[.O19]" table:style-name="ce18">
            <text:p>384</text:p>
          </table:table-cell>
          <table:table-cell table:number-columns-repeated="2" table:style-name="ce1"/>
          <table:table-cell office:value-type="float" office:value="153.60000000000002" table:formula="of:=[.S19]*[.N19]" table:style-name="ce19">
            <text:p>153,60</text:p>
          </table:table-cell>
          <table:table-cell office:value-type="float" office:value="0.2857142857142857" table:formula="of:=[.R19]/[.Q19]" table:style-name="ce19">
            <text:p>0,29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Пельмени</text:p>
          </table:table-cell>
          <table:table-cell office:value-type="string" table:style-name="ce3">
            <text:p>ЗПФ</text:p>
          </table:table-cell>
          <table:table-cell office:value-type="string" table:style-name="ce12">
            <text:p>Пельмени Бульмени со сливочным маслом ТМ Горячая штучка ТС Бульмени ГШ ф/п сфера ф/в 0,7 кг МГ</text:p>
          </table:table-cell>
          <table:table-cell office:value-type="string" table:style-name="ce2">
            <text:p>500 шт</text:p>
          </table:table-cell>
          <table:table-cell office:value-type="float" office:value="350" table:style-name="ce2">
            <text:p>350</text:p>
          </table:table-cell>
          <table:table-cell office:value-type="float" office:value="500" table:formula="of:=VALUE(LEFT([.D20];LEN([.D20])-3))" table:style-name="ce13">
            <text:p>500</text:p>
          </table:table-cell>
          <table:table-cell office:value-type="float" office:value="350" table:formula="of:=[.F20]*[.N20]" table:style-name="ce13">
            <text:p>350</text:p>
          </table:table-cell>
          <table:table-cell office:value-type="float" office:value="0" table:formula="of:=[.G20]-[.E20]" table:style-name="ce14">
            <text:p>0<text:s/></text:p>
          </table:table-cell>
          <table:table-cell office:value-type="string" office:string-value="SU003459" table:formula="of:=VLOOKUP([.C20];['file:///D:/Father/Work/2025_05/РАБОЧИЙ%20СТОЛ/16,01,26%20ПОКОМ%20ЗПФ%20Коныгин/(отмена)рассчет%20заказ%20СТВ%20ПГП%20и%20ЗПФ.ods'#Лист1.$C:.$Q];7;0)" table:style-name="ce15">
            <text:p>SU003459</text:p>
          </table:table-cell>
          <table:table-cell office:value-type="string" office:string-value="P004346" table:formula="of:=VLOOKUP([.C20];['file:///D:/Father/Work/2025_05/РАБОЧИЙ%20СТОЛ/16,01,26%20ПОКОМ%20ЗПФ%20Коныгин/(отмена)рассчет%20заказ%20СТВ%20ПГП%20и%20ЗПФ.ods'#Лист1.$C:.$Q];8;0)" table:style-name="ce15">
            <text:p>P004346</text:p>
          </table:table-cell>
          <table:table-cell office:value-type="float" office:value="4301071039" table:formula="of:=VLOOKUP([.C20];['file:///D:/Father/Work/2025_05/РАБОЧИЙ%20СТОЛ/16,01,26%20ПОКОМ%20ЗПФ%20Коныгин/(отмена)рассчет%20заказ%20СТВ%20ПГП%20и%20ЗПФ.ods'#Лист1.$C:.$Q];9;0)" table:style-name="ce15">
            <text:p>4301071039</text:p>
          </table:table-cell>
          <table:table-cell office:value-type="float" office:value="4607111039279" table:formula="of:=VLOOKUP([.C20];['file:///D:/Father/Work/2025_05/РАБОЧИЙ%20СТОЛ/16,01,26%20ПОКОМ%20ЗПФ%20Коныгин/(отмена)рассчет%20заказ%20СТВ%20ПГП%20и%20ЗПФ.ods'#Лист1.$C:.$Q];10;0)" table:style-name="ce15">
            <text:p>4607111039279</text:p>
          </table:table-cell>
          <table:table-cell office:value-type="string" office:string-value="Пельмени «Бульмени со сливочным маслом» 0,7 Сфера ТМ «Горячая штучка»" table:formula="of:=VLOOKUP([.C20];['file:///D:/Father/Work/2025_05/РАБОЧИЙ%20СТОЛ/16,01,26%20ПОКОМ%20ЗПФ%20Коныгин/(отмена)рассчет%20заказ%20СТВ%20ПГП%20и%20ЗПФ.ods'#Лист1.$C:.$Q];11;0)" table:style-name="ce16">
            <text:p>Пельмени «Бульмени со сливочным маслом» 0,7 Сфера ТМ «Горячая штучка»</text:p>
          </table:table-cell>
          <table:table-cell office:value-type="float" office:value="0.7" table:formula="of:=VLOOKUP([.C20];['file:///D:/Father/Work/2025_05/РАБОЧИЙ%20СТОЛ/16,01,26%20ПОКОМ%20ЗПФ%20Коныгин/(отмена)рассчет%20заказ%20СТВ%20ПГП%20и%20ЗПФ.ods'#Лист1.$C:.$Q];12;0)" table:style-name="ce17">
            <text:p>0,70</text:p>
          </table:table-cell>
          <table:table-cell office:value-type="float" office:value="10" table:formula="of:=VLOOKUP([.C20];['file:///D:/Father/Work/2025_05/РАБОЧИЙ%20СТОЛ/16,01,26%20ПОКОМ%20ЗПФ%20Коныгин/(отмена)рассчет%20заказ%20СТВ%20ПГП%20и%20ЗПФ.ods'#Лист1.$C:.$Q];13;0)" table:style-name="ce17">
            <text:p>10,00</text:p>
          </table:table-cell>
          <table:table-cell office:value-type="float" office:value="12" table:formula="of:=VLOOKUP([.C20];['file:///D:/Father/Work/2025_05/РАБОЧИЙ%20СТОЛ/16,01,26%20ПОКОМ%20ЗПФ%20Коныгин/(отмена)рассчет%20заказ%20СТВ%20ПГП%20и%20ЗПФ.ods'#Лист1.$C:.$Q];14;0)" table:style-name="ce15">
            <text:p>12</text:p>
          </table:table-cell>
          <table:table-cell office:value-type="float" office:value="84" table:formula="of:=VLOOKUP([.C20];['file:///D:/Father/Work/2025_05/РАБОЧИЙ%20СТОЛ/16,01,26%20ПОКОМ%20ЗПФ%20Коныгин/(отмена)рассчет%20заказ%20СТВ%20ПГП%20и%20ЗПФ.ods'#Лист1.$C:.$Q];15;0)" table:style-name="ce15">
            <text:p>84</text:p>
          </table:table-cell>
          <table:table-cell office:value-type="float" office:value="48" table:formula="of:=MROUND([.F20];[.O20]*[.P20])/[.O20]" table:style-name="ce18">
            <text:p>48</text:p>
          </table:table-cell>
          <table:table-cell office:value-type="float" office:value="480" table:formula="of:=[.R20]*[.O20]" table:style-name="ce18">
            <text:p>480</text:p>
          </table:table-cell>
          <table:table-cell table:number-columns-repeated="2" table:style-name="ce1"/>
          <table:table-cell office:value-type="float" office:value="336" table:formula="of:=[.S20]*[.N20]" table:style-name="ce19">
            <text:p>336,00</text:p>
          </table:table-cell>
          <table:table-cell office:value-type="float" office:value="0.5714285714285714" table:formula="of:=[.R20]/[.Q20]" table:style-name="ce19">
            <text:p>0,57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Пельмени</text:p>
          </table:table-cell>
          <table:table-cell office:value-type="string" table:style-name="ce3">
            <text:p>ЗПФ</text:p>
          </table:table-cell>
          <table:table-cell office:value-type="string" table:style-name="ce12">
            <text:p>Пельмени Мясные с говядиной ТМ Стародворье сфера ф/п ф/в 1 кг МГ</text:p>
          </table:table-cell>
          <table:table-cell office:value-type="string" table:style-name="ce2">
            <text:p>200 кг</text:p>
          </table:table-cell>
          <table:table-cell office:value-type="float" office:value="200" table:style-name="ce2">
            <text:p>200</text:p>
          </table:table-cell>
          <table:table-cell office:value-type="float" office:value="200" table:formula="of:=VALUE(LEFT([.D21];LEN([.D21])-3))" table:style-name="ce13">
            <text:p>200</text:p>
          </table:table-cell>
          <table:table-cell office:value-type="float" office:value="200" table:formula="of:=[.F21]*[.N21]" table:style-name="ce13">
            <text:p>200</text:p>
          </table:table-cell>
          <table:table-cell office:value-type="float" office:value="0" table:formula="of:=[.G21]-[.E21]" table:style-name="ce14">
            <text:p>0<text:s/></text:p>
          </table:table-cell>
          <table:table-cell office:value-type="string" office:string-value="SU003935" table:formula="of:=VLOOKUP([.C21];['file:///D:/Father/Work/2025_05/РАБОЧИЙ%20СТОЛ/16,01,26%20ПОКОМ%20ЗПФ%20Коныгин/(отмена)рассчет%20заказ%20СТВ%20ПГП%20и%20ЗПФ.ods'#Лист1.$C:.$Q];7;0)" table:style-name="ce15">
            <text:p>SU003935</text:p>
          </table:table-cell>
          <table:table-cell office:value-type="string" office:string-value="P005048" table:formula="of:=VLOOKUP([.C21];['file:///D:/Father/Work/2025_05/РАБОЧИЙ%20СТОЛ/16,01,26%20ПОКОМ%20ЗПФ%20Коныгин/(отмена)рассчет%20заказ%20СТВ%20ПГП%20и%20ЗПФ.ods'#Лист1.$C:.$Q];8;0)" table:style-name="ce15">
            <text:p>P005048</text:p>
          </table:table-cell>
          <table:table-cell office:value-type="float" office:value="4301071097" table:formula="of:=VLOOKUP([.C21];['file:///D:/Father/Work/2025_05/РАБОЧИЙ%20СТОЛ/16,01,26%20ПОКОМ%20ЗПФ%20Коныгин/(отмена)рассчет%20заказ%20СТВ%20ПГП%20и%20ЗПФ.ods'#Лист1.$C:.$Q];9;0)" table:style-name="ce15">
            <text:p>4301071097</text:p>
          </table:table-cell>
          <table:table-cell office:value-type="float" office:value="4620207491096" table:formula="of:=VLOOKUP([.C21];['file:///D:/Father/Work/2025_05/РАБОЧИЙ%20СТОЛ/16,01,26%20ПОКОМ%20ЗПФ%20Коныгин/(отмена)рассчет%20заказ%20СТВ%20ПГП%20и%20ЗПФ.ods'#Лист1.$C:.$Q];10;0)" table:style-name="ce15">
            <text:p>4620207491096</text:p>
          </table:table-cell>
          <table:table-cell office:value-type="string" office:string-value="Пельмени «Мясные с говядиной» Фикс.вес 1 сфера ТМ «Стародворье»" table:formula="of:=VLOOKUP([.C21];['file:///D:/Father/Work/2025_05/РАБОЧИЙ%20СТОЛ/16,01,26%20ПОКОМ%20ЗПФ%20Коныгин/(отмена)рассчет%20заказ%20СТВ%20ПГП%20и%20ЗПФ.ods'#Лист1.$C:.$Q];11;0)" table:style-name="ce16">
            <text:p>Пельмени «Мясные с говядиной» Фикс.вес 1 сфера ТМ «Стародворье»</text:p>
          </table:table-cell>
          <table:table-cell office:value-type="float" office:value="1" table:formula="of:=VLOOKUP([.C21];['file:///D:/Father/Work/2025_05/РАБОЧИЙ%20СТОЛ/16,01,26%20ПОКОМ%20ЗПФ%20Коныгин/(отмена)рассчет%20заказ%20СТВ%20ПГП%20и%20ЗПФ.ods'#Лист1.$C:.$Q];12;0)" table:style-name="ce17">
            <text:p>1,00</text:p>
          </table:table-cell>
          <table:table-cell office:value-type="float" office:value="5" table:formula="of:=VLOOKUP([.C21];['file:///D:/Father/Work/2025_05/РАБОЧИЙ%20СТОЛ/16,01,26%20ПОКОМ%20ЗПФ%20Коныгин/(отмена)рассчет%20заказ%20СТВ%20ПГП%20и%20ЗПФ.ods'#Лист1.$C:.$Q];13;0)" table:style-name="ce17">
            <text:p>5,00</text:p>
          </table:table-cell>
          <table:table-cell office:value-type="float" office:value="12" table:formula="of:=VLOOKUP([.C21];['file:///D:/Father/Work/2025_05/РАБОЧИЙ%20СТОЛ/16,01,26%20ПОКОМ%20ЗПФ%20Коныгин/(отмена)рассчет%20заказ%20СТВ%20ПГП%20и%20ЗПФ.ods'#Лист1.$C:.$Q];14;0)" table:style-name="ce15">
            <text:p>12</text:p>
          </table:table-cell>
          <table:table-cell office:value-type="float" office:value="84" table:formula="of:=VLOOKUP([.C21];['file:///D:/Father/Work/2025_05/РАБОЧИЙ%20СТОЛ/16,01,26%20ПОКОМ%20ЗПФ%20Коныгин/(отмена)рассчет%20заказ%20СТВ%20ПГП%20и%20ЗПФ.ods'#Лист1.$C:.$Q];15;0)" table:style-name="ce15">
            <text:p>84</text:p>
          </table:table-cell>
          <table:table-cell office:value-type="float" office:value="36" table:formula="of:=MROUND([.F21];[.O21]*[.P21])/[.O21]" table:style-name="ce18">
            <text:p>36</text:p>
          </table:table-cell>
          <table:table-cell office:value-type="float" office:value="180" table:formula="of:=[.R21]*[.O21]" table:style-name="ce18">
            <text:p>180</text:p>
          </table:table-cell>
          <table:table-cell table:number-columns-repeated="2" table:style-name="ce1"/>
          <table:table-cell office:value-type="float" office:value="180" table:formula="of:=[.S21]*[.N21]" table:style-name="ce19">
            <text:p>180,00</text:p>
          </table:table-cell>
          <table:table-cell office:value-type="float" office:value="0.42857142857142855" table:formula="of:=[.R21]/[.Q21]" table:style-name="ce19">
            <text:p>0,43</text:p>
          </table:table-cell>
          <table:table-cell table:number-columns-repeated="16361"/>
        </table:table-row>
        <table:table-row table:style-name="ro3">
          <table:table-cell office:value-type="string" table:style-name="ce2">
            <text:p>Пельмени</text:p>
          </table:table-cell>
          <table:table-cell office:value-type="string" table:style-name="ce3">
            <text:p>ЗПФ</text:p>
          </table:table-cell>
          <table:table-cell office:value-type="string" table:style-name="ce12">
            <text:p>Пельмени Отборные с говядиной и свининой ТМ Медвежье ушко ТС Медвежье ушко псевдозащип ф/п ф/в 0,43 кг Топ-ЛКК, Дистр МГ</text:p>
          </table:table-cell>
          <table:table-cell office:value-type="string" table:style-name="ce2">
            <text:p>160 шт</text:p>
          </table:table-cell>
          <table:table-cell office:value-type="float" office:value="68.8" table:style-name="ce2">
            <text:p>68,8</text:p>
          </table:table-cell>
          <table:table-cell office:value-type="float" office:value="160" table:formula="of:=VALUE(LEFT([.D22];LEN([.D22])-3))" table:style-name="ce13">
            <text:p>160</text:p>
          </table:table-cell>
          <table:table-cell office:value-type="float" office:value="68.8" table:formula="of:=[.F22]*[.N22]" table:style-name="ce13">
            <text:p>68,8</text:p>
          </table:table-cell>
          <table:table-cell office:value-type="float" office:value="0" table:formula="of:=[.G22]-[.E22]" table:style-name="ce14">
            <text:p>0<text:s/></text:p>
          </table:table-cell>
          <table:table-cell office:value-type="string" office:string-value="SU003974" table:formula="of:=VLOOKUP([.C22];['file:///D:/Father/Work/2025_05/РАБОЧИЙ%20СТОЛ/16,01,26%20ПОКОМ%20ЗПФ%20Коныгин/(отмена)рассчет%20заказ%20СТВ%20ПГП%20и%20ЗПФ.ods'#Лист1.$C:.$Q];7;0)" table:style-name="ce15">
            <text:p>SU003974</text:p>
          </table:table-cell>
          <table:table-cell office:value-type="string" office:string-value="P005106" table:formula="of:=VLOOKUP([.C22];['file:///D:/Father/Work/2025_05/РАБОЧИЙ%20СТОЛ/16,01,26%20ПОКОМ%20ЗПФ%20Коныгин/(отмена)рассчет%20заказ%20СТВ%20ПГП%20и%20ЗПФ.ods'#Лист1.$C:.$Q];8;0)" table:style-name="ce15">
            <text:p>P005106</text:p>
          </table:table-cell>
          <table:table-cell office:value-type="float" office:value="4301071108" table:formula="of:=VLOOKUP([.C22];['file:///D:/Father/Work/2025_05/РАБОЧИЙ%20СТОЛ/16,01,26%20ПОКОМ%20ЗПФ%20Коныгин/(отмена)рассчет%20заказ%20СТВ%20ПГП%20и%20ЗПФ.ods'#Лист1.$C:.$Q];9;0)" table:style-name="ce15">
            <text:p>4301071108</text:p>
          </table:table-cell>
          <table:table-cell office:value-type="float" office:value="4607111035912" table:formula="of:=VLOOKUP([.C22];['file:///D:/Father/Work/2025_05/РАБОЧИЙ%20СТОЛ/16,01,26%20ПОКОМ%20ЗПФ%20Коныгин/(отмена)рассчет%20заказ%20СТВ%20ПГП%20и%20ЗПФ.ods'#Лист1.$C:.$Q];10;0)" table:style-name="ce15">
            <text:p>4607111035912</text:p>
          </table:table-cell>
          <table:table-cell office:value-type="string" office:string-value="Пельмени «Отборные с говядиной и свининой» 0,43 псевдозащип ТМ «Медвежье ушко»" table:formula="of:=VLOOKUP([.C22];['file:///D:/Father/Work/2025_05/РАБОЧИЙ%20СТОЛ/16,01,26%20ПОКОМ%20ЗПФ%20Коныгин/(отмена)рассчет%20заказ%20СТВ%20ПГП%20и%20ЗПФ.ods'#Лист1.$C:.$Q];11;0)" table:style-name="ce16">
            <text:p>Пельмени «Отборные с говядиной и свининой» 0,43 псевдозащип ТМ «Медвежье ушко»</text:p>
          </table:table-cell>
          <table:table-cell office:value-type="float" office:value="0.43" table:formula="of:=VLOOKUP([.C22];['file:///D:/Father/Work/2025_05/РАБОЧИЙ%20СТОЛ/16,01,26%20ПОКОМ%20ЗПФ%20Коныгин/(отмена)рассчет%20заказ%20СТВ%20ПГП%20и%20ЗПФ.ods'#Лист1.$C:.$Q];12;0)" table:style-name="ce17">
            <text:p>0,43</text:p>
          </table:table-cell>
          <table:table-cell office:value-type="float" office:value="16" table:formula="of:=VLOOKUP([.C22];['file:///D:/Father/Work/2025_05/РАБОЧИЙ%20СТОЛ/16,01,26%20ПОКОМ%20ЗПФ%20Коныгин/(отмена)рассчет%20заказ%20СТВ%20ПГП%20и%20ЗПФ.ods'#Лист1.$C:.$Q];13;0)" table:style-name="ce17">
            <text:p>16,00</text:p>
          </table:table-cell>
          <table:table-cell office:value-type="float" office:value="12" table:formula="of:=VLOOKUP([.C22];['file:///D:/Father/Work/2025_05/РАБОЧИЙ%20СТОЛ/16,01,26%20ПОКОМ%20ЗПФ%20Коныгин/(отмена)рассчет%20заказ%20СТВ%20ПГП%20и%20ЗПФ.ods'#Лист1.$C:.$Q];14;0)" table:style-name="ce15">
            <text:p>12</text:p>
          </table:table-cell>
          <table:table-cell office:value-type="float" office:value="84" table:formula="of:=VLOOKUP([.C22];['file:///D:/Father/Work/2025_05/РАБОЧИЙ%20СТОЛ/16,01,26%20ПОКОМ%20ЗПФ%20Коныгин/(отмена)рассчет%20заказ%20СТВ%20ПГП%20и%20ЗПФ.ods'#Лист1.$C:.$Q];15;0)" table:style-name="ce15">
            <text:p>84</text:p>
          </table:table-cell>
          <table:table-cell office:value-type="float" office:value="12" table:formula="of:=MROUND([.F22];[.O22]*[.P22])/[.O22]" table:style-name="ce18">
            <text:p>12</text:p>
          </table:table-cell>
          <table:table-cell office:value-type="float" office:value="192" table:formula="of:=[.R22]*[.O22]" table:style-name="ce18">
            <text:p>192</text:p>
          </table:table-cell>
          <table:table-cell table:number-columns-repeated="2" table:style-name="ce1"/>
          <table:table-cell office:value-type="float" office:value="82.56" table:formula="of:=[.S22]*[.N22]" table:style-name="ce19">
            <text:p>82,56</text:p>
          </table:table-cell>
          <table:table-cell office:value-type="float" office:value="0.14285714285714285" table:formula="of:=[.R22]/[.Q22]" table:style-name="ce19">
            <text:p>0,14</text:p>
          </table:table-cell>
          <table:table-cell table:number-columns-repeated="16361"/>
        </table:table-row>
        <table:table-row table:style-name="ro3">
          <table:table-cell office:value-type="string" table:style-name="ce2">
            <text:p>Пельмени</text:p>
          </table:table-cell>
          <table:table-cell office:value-type="string" table:style-name="ce3">
            <text:p>ЗПФ</text:p>
          </table:table-cell>
          <table:table-cell office:value-type="string" table:style-name="ce12">
            <text:p>Пельмени Отборные с говядиной и свининой ТМ Медвежье ушко ТС Медвежье ушко псевдозащип ф/п ф/в 0,9 кг Топ-ЛКК, Дистр МГ</text:p>
          </table:table-cell>
          <table:table-cell office:value-type="string" table:style-name="ce2">
            <text:p>200 шт</text:p>
          </table:table-cell>
          <table:table-cell office:value-type="float" office:value="180" table:style-name="ce2">
            <text:p>180</text:p>
          </table:table-cell>
          <table:table-cell office:value-type="float" office:value="200" table:formula="of:=VALUE(LEFT([.D23];LEN([.D23])-3))" table:style-name="ce13">
            <text:p>200</text:p>
          </table:table-cell>
          <table:table-cell office:value-type="float" office:value="180" table:formula="of:=[.F23]*[.N23]" table:style-name="ce13">
            <text:p>180</text:p>
          </table:table-cell>
          <table:table-cell office:value-type="float" office:value="0" table:formula="of:=[.G23]-[.E23]" table:style-name="ce14">
            <text:p>0<text:s/></text:p>
          </table:table-cell>
          <table:table-cell office:value-type="string" office:string-value="SU003975" table:formula="of:=VLOOKUP([.C23];['file:///D:/Father/Work/2025_05/РАБОЧИЙ%20СТОЛ/16,01,26%20ПОКОМ%20ЗПФ%20Коныгин/(отмена)рассчет%20заказ%20СТВ%20ПГП%20и%20ЗПФ.ods'#Лист1.$C:.$Q];7;0)" table:style-name="ce15">
            <text:p>SU003975</text:p>
          </table:table-cell>
          <table:table-cell office:value-type="string" office:string-value="P005107" table:formula="of:=VLOOKUP([.C23];['file:///D:/Father/Work/2025_05/РАБОЧИЙ%20СТОЛ/16,01,26%20ПОКОМ%20ЗПФ%20Коныгин/(отмена)рассчет%20заказ%20СТВ%20ПГП%20и%20ЗПФ.ods'#Лист1.$C:.$Q];8;0)" table:style-name="ce15">
            <text:p>P005107</text:p>
          </table:table-cell>
          <table:table-cell office:value-type="float" office:value="4301071109" table:formula="of:=VLOOKUP([.C23];['file:///D:/Father/Work/2025_05/РАБОЧИЙ%20СТОЛ/16,01,26%20ПОКОМ%20ЗПФ%20Коныгин/(отмена)рассчет%20заказ%20СТВ%20ПГП%20и%20ЗПФ.ods'#Лист1.$C:.$Q];9;0)" table:style-name="ce15">
            <text:p>4301071109</text:p>
          </table:table-cell>
          <table:table-cell office:value-type="float" office:value="4607111035929" table:formula="of:=VLOOKUP([.C23];['file:///D:/Father/Work/2025_05/РАБОЧИЙ%20СТОЛ/16,01,26%20ПОКОМ%20ЗПФ%20Коныгин/(отмена)рассчет%20заказ%20СТВ%20ПГП%20и%20ЗПФ.ods'#Лист1.$C:.$Q];10;0)" table:style-name="ce15">
            <text:p>4607111035929</text:p>
          </table:table-cell>
          <table:table-cell office:value-type="string" office:string-value="Пельмени «Отборные с говядиной и свининой» 0,9 псевдозащип ТМ «Медвежье ушко»" table:formula="of:=VLOOKUP([.C23];['file:///D:/Father/Work/2025_05/РАБОЧИЙ%20СТОЛ/16,01,26%20ПОКОМ%20ЗПФ%20Коныгин/(отмена)рассчет%20заказ%20СТВ%20ПГП%20и%20ЗПФ.ods'#Лист1.$C:.$Q];11;0)" table:style-name="ce16">
            <text:p>Пельмени «Отборные с говядиной и свининой» 0,9 псевдозащип ТМ «Медвежье ушко»</text:p>
          </table:table-cell>
          <table:table-cell office:value-type="float" office:value="0.9" table:formula="of:=VLOOKUP([.C23];['file:///D:/Father/Work/2025_05/РАБОЧИЙ%20СТОЛ/16,01,26%20ПОКОМ%20ЗПФ%20Коныгин/(отмена)рассчет%20заказ%20СТВ%20ПГП%20и%20ЗПФ.ods'#Лист1.$C:.$Q];12;0)" table:style-name="ce17">
            <text:p>0,90</text:p>
          </table:table-cell>
          <table:table-cell office:value-type="float" office:value="8" table:formula="of:=VLOOKUP([.C23];['file:///D:/Father/Work/2025_05/РАБОЧИЙ%20СТОЛ/16,01,26%20ПОКОМ%20ЗПФ%20Коныгин/(отмена)рассчет%20заказ%20СТВ%20ПГП%20и%20ЗПФ.ods'#Лист1.$C:.$Q];13;0)" table:style-name="ce17">
            <text:p>8,00</text:p>
          </table:table-cell>
          <table:table-cell office:value-type="float" office:value="12" table:formula="of:=VLOOKUP([.C23];['file:///D:/Father/Work/2025_05/РАБОЧИЙ%20СТОЛ/16,01,26%20ПОКОМ%20ЗПФ%20Коныгин/(отмена)рассчет%20заказ%20СТВ%20ПГП%20и%20ЗПФ.ods'#Лист1.$C:.$Q];14;0)" table:style-name="ce15">
            <text:p>12</text:p>
          </table:table-cell>
          <table:table-cell office:value-type="float" office:value="84" table:formula="of:=VLOOKUP([.C23];['file:///D:/Father/Work/2025_05/РАБОЧИЙ%20СТОЛ/16,01,26%20ПОКОМ%20ЗПФ%20Коныгин/(отмена)рассчет%20заказ%20СТВ%20ПГП%20и%20ЗПФ.ods'#Лист1.$C:.$Q];15;0)" table:style-name="ce15">
            <text:p>84</text:p>
          </table:table-cell>
          <table:table-cell office:value-type="float" office:value="24" table:formula="of:=MROUND([.F23];[.O23]*[.P23])/[.O23]" table:style-name="ce18">
            <text:p>24</text:p>
          </table:table-cell>
          <table:table-cell office:value-type="float" office:value="192" table:formula="of:=[.R23]*[.O23]" table:style-name="ce18">
            <text:p>192</text:p>
          </table:table-cell>
          <table:table-cell table:number-columns-repeated="2" table:style-name="ce1"/>
          <table:table-cell office:value-type="float" office:value="172.8" table:formula="of:=[.S23]*[.N23]" table:style-name="ce19">
            <text:p>172,80</text:p>
          </table:table-cell>
          <table:table-cell office:value-type="float" office:value="0.2857142857142857" table:formula="of:=[.R23]/[.Q23]" table:style-name="ce19">
            <text:p>0,29</text:p>
          </table:table-cell>
          <table:table-cell table:number-columns-repeated="16361"/>
        </table:table-row>
        <table:table-row table:style-name="ro3">
          <table:table-cell office:value-type="string" table:style-name="ce2">
            <text:p>Пельмени</text:p>
          </table:table-cell>
          <table:table-cell office:value-type="string" table:style-name="ce3">
            <text:p>ЗПФ</text:p>
          </table:table-cell>
          <table:table-cell office:value-type="string" table:style-name="ce12">
            <text:p>Пельмени Отборные с говядиной ТМ Медвежье ушко ТС Медвежье ушко псевдозащип ф/п ф/в 0,43 кг Топ-ЛКК, Дистр МГ</text:p>
          </table:table-cell>
          <table:table-cell office:value-type="string" table:style-name="ce2">
            <text:p>80 шт</text:p>
          </table:table-cell>
          <table:table-cell office:value-type="float" office:value="34.4" table:style-name="ce2">
            <text:p>34,4</text:p>
          </table:table-cell>
          <table:table-cell office:value-type="float" office:value="80" table:formula="of:=VALUE(LEFT([.D24];LEN([.D24])-3))" table:style-name="ce13">
            <text:p>80</text:p>
          </table:table-cell>
          <table:table-cell office:value-type="float" office:value="34.4" table:formula="of:=[.F24]*[.N24]" table:style-name="ce13">
            <text:p>34,4</text:p>
          </table:table-cell>
          <table:table-cell office:value-type="float" office:value="0" table:formula="of:=[.G24]-[.E24]" table:style-name="ce14">
            <text:p>0<text:s/></text:p>
          </table:table-cell>
          <table:table-cell office:value-type="string" office:string-value="SU003972" table:formula="of:=VLOOKUP([.C24];['file:///D:/Father/Work/2025_05/РАБОЧИЙ%20СТОЛ/16,01,26%20ПОКОМ%20ЗПФ%20Коныгин/(отмена)рассчет%20заказ%20СТВ%20ПГП%20и%20ЗПФ.ods'#Лист1.$C:.$Q];7;0)" table:style-name="ce15">
            <text:p>SU003972</text:p>
          </table:table-cell>
          <table:table-cell office:value-type="string" office:string-value="P005104" table:formula="of:=VLOOKUP([.C24];['file:///D:/Father/Work/2025_05/РАБОЧИЙ%20СТОЛ/16,01,26%20ПОКОМ%20ЗПФ%20Коныгин/(отмена)рассчет%20заказ%20СТВ%20ПГП%20и%20ЗПФ.ods'#Лист1.$C:.$Q];8;0)" table:style-name="ce15">
            <text:p>P005104</text:p>
          </table:table-cell>
          <table:table-cell office:value-type="float" office:value="4301071106" table:formula="of:=VLOOKUP([.C24];['file:///D:/Father/Work/2025_05/РАБОЧИЙ%20СТОЛ/16,01,26%20ПОКОМ%20ЗПФ%20Коныгин/(отмена)рассчет%20заказ%20СТВ%20ПГП%20и%20ЗПФ.ods'#Лист1.$C:.$Q];9;0)" table:style-name="ce15">
            <text:p>4301071106</text:p>
          </table:table-cell>
          <table:table-cell office:value-type="float" office:value="4607111035882" table:formula="of:=VLOOKUP([.C24];['file:///D:/Father/Work/2025_05/РАБОЧИЙ%20СТОЛ/16,01,26%20ПОКОМ%20ЗПФ%20Коныгин/(отмена)рассчет%20заказ%20СТВ%20ПГП%20и%20ЗПФ.ods'#Лист1.$C:.$Q];10;0)" table:style-name="ce15">
            <text:p>4607111035882</text:p>
          </table:table-cell>
          <table:table-cell office:value-type="string" office:string-value="Пельмени «Отборные с говядиной» 0,43 псевдозащип ТМ «Медвежье ушко»" table:formula="of:=VLOOKUP([.C24];['file:///D:/Father/Work/2025_05/РАБОЧИЙ%20СТОЛ/16,01,26%20ПОКОМ%20ЗПФ%20Коныгин/(отмена)рассчет%20заказ%20СТВ%20ПГП%20и%20ЗПФ.ods'#Лист1.$C:.$Q];11;0)" table:style-name="ce16">
            <text:p>Пельмени «Отборные с говядиной» 0,43 псевдозащип ТМ «Медвежье ушко»</text:p>
          </table:table-cell>
          <table:table-cell office:value-type="float" office:value="0.43" table:formula="of:=VLOOKUP([.C24];['file:///D:/Father/Work/2025_05/РАБОЧИЙ%20СТОЛ/16,01,26%20ПОКОМ%20ЗПФ%20Коныгин/(отмена)рассчет%20заказ%20СТВ%20ПГП%20и%20ЗПФ.ods'#Лист1.$C:.$Q];12;0)" table:style-name="ce17">
            <text:p>0,43</text:p>
          </table:table-cell>
          <table:table-cell office:value-type="float" office:value="16" table:formula="of:=VLOOKUP([.C24];['file:///D:/Father/Work/2025_05/РАБОЧИЙ%20СТОЛ/16,01,26%20ПОКОМ%20ЗПФ%20Коныгин/(отмена)рассчет%20заказ%20СТВ%20ПГП%20и%20ЗПФ.ods'#Лист1.$C:.$Q];13;0)" table:style-name="ce17">
            <text:p>16,00</text:p>
          </table:table-cell>
          <table:table-cell office:value-type="float" office:value="12" table:formula="of:=VLOOKUP([.C24];['file:///D:/Father/Work/2025_05/РАБОЧИЙ%20СТОЛ/16,01,26%20ПОКОМ%20ЗПФ%20Коныгин/(отмена)рассчет%20заказ%20СТВ%20ПГП%20и%20ЗПФ.ods'#Лист1.$C:.$Q];14;0)" table:style-name="ce15">
            <text:p>12</text:p>
          </table:table-cell>
          <table:table-cell office:value-type="float" office:value="84" table:formula="of:=VLOOKUP([.C24];['file:///D:/Father/Work/2025_05/РАБОЧИЙ%20СТОЛ/16,01,26%20ПОКОМ%20ЗПФ%20Коныгин/(отмена)рассчет%20заказ%20СТВ%20ПГП%20и%20ЗПФ.ods'#Лист1.$C:.$Q];15;0)" table:style-name="ce15">
            <text:p>84</text:p>
          </table:table-cell>
          <table:table-cell office:value-type="float" office:value="0" table:formula="of:=MROUND([.F24];[.O24]*[.P24])/[.O24]" table:style-name="ce20">
            <text:p>0</text:p>
          </table:table-cell>
          <table:table-cell office:value-type="float" office:value="0" table:formula="of:=[.R24]*[.O24]" table:style-name="ce20">
            <text:p>0</text:p>
          </table:table-cell>
          <table:table-cell office:value-type="float" office:value="192" table:formula="of:=[.O24]*[.P24]" table:style-name="ce21">
            <text:p>192</text:p>
          </table:table-cell>
          <table:table-cell office:value-type="string" table:style-name="ce21">
            <text:p>кратность</text:p>
          </table:table-cell>
          <table:table-cell office:value-type="float" office:value="0" table:formula="of:=[.S24]*[.N24]" table:style-name="ce22">
            <text:p>0,00</text:p>
          </table:table-cell>
          <table:table-cell office:value-type="float" office:value="0" table:formula="of:=[.R24]/[.Q24]" table:style-name="ce22">
            <text:p>0,0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Пельмени</text:p>
          </table:table-cell>
          <table:table-cell office:value-type="string" table:style-name="ce3">
            <text:p>ЗПФ</text:p>
          </table:table-cell>
          <table:table-cell office:value-type="string" table:style-name="ce12">
            <text:p>Пельмени Отборные с говядиной ТМ Стародворье ТС Медвежье ушко ф/п псевдозащип ф/в 0,9 кг УВС1 РТТ МГ</text:p>
          </table:table-cell>
          <table:table-cell office:value-type="string" table:style-name="ce2">
            <text:p>120 шт</text:p>
          </table:table-cell>
          <table:table-cell office:value-type="float" office:value="108" table:style-name="ce2">
            <text:p>108</text:p>
          </table:table-cell>
          <table:table-cell office:value-type="float" office:value="120" table:formula="of:=VALUE(LEFT([.D25];LEN([.D25])-3))" table:style-name="ce13">
            <text:p>120</text:p>
          </table:table-cell>
          <table:table-cell office:value-type="float" office:value="108" table:formula="of:=[.F25]*[.N25]" table:style-name="ce13">
            <text:p>108</text:p>
          </table:table-cell>
          <table:table-cell office:value-type="float" office:value="0" table:formula="of:=[.G25]-[.E25]" table:style-name="ce14">
            <text:p>0<text:s/></text:p>
          </table:table-cell>
          <table:table-cell office:value-type="string" office:string-value="SU003973" table:formula="of:=VLOOKUP([.C25];['file:///D:/Father/Work/2025_05/РАБОЧИЙ%20СТОЛ/16,01,26%20ПОКОМ%20ЗПФ%20Коныгин/(отмена)рассчет%20заказ%20СТВ%20ПГП%20и%20ЗПФ.ods'#Лист1.$C:.$Q];7;0)" table:style-name="ce15">
            <text:p>SU003973</text:p>
          </table:table-cell>
          <table:table-cell office:value-type="string" office:string-value="P005105" table:formula="of:=VLOOKUP([.C25];['file:///D:/Father/Work/2025_05/РАБОЧИЙ%20СТОЛ/16,01,26%20ПОКОМ%20ЗПФ%20Коныгин/(отмена)рассчет%20заказ%20СТВ%20ПГП%20и%20ЗПФ.ods'#Лист1.$C:.$Q];8;0)" table:style-name="ce15">
            <text:p>P005105</text:p>
          </table:table-cell>
          <table:table-cell office:value-type="float" office:value="4301071107" table:formula="of:=VLOOKUP([.C25];['file:///D:/Father/Work/2025_05/РАБОЧИЙ%20СТОЛ/16,01,26%20ПОКОМ%20ЗПФ%20Коныгин/(отмена)рассчет%20заказ%20СТВ%20ПГП%20и%20ЗПФ.ods'#Лист1.$C:.$Q];9;0)" table:style-name="ce15">
            <text:p>4301071107</text:p>
          </table:table-cell>
          <table:table-cell office:value-type="float" office:value="4607111035905" table:formula="of:=VLOOKUP([.C25];['file:///D:/Father/Work/2025_05/РАБОЧИЙ%20СТОЛ/16,01,26%20ПОКОМ%20ЗПФ%20Коныгин/(отмена)рассчет%20заказ%20СТВ%20ПГП%20и%20ЗПФ.ods'#Лист1.$C:.$Q];10;0)" table:style-name="ce15">
            <text:p>4607111035905</text:p>
          </table:table-cell>
          <table:table-cell office:value-type="string" office:string-value="Пельмени «Отборные с говядиной» 0,9 псевдозащип ТМ «Медвежье ушко»" table:formula="of:=VLOOKUP([.C25];['file:///D:/Father/Work/2025_05/РАБОЧИЙ%20СТОЛ/16,01,26%20ПОКОМ%20ЗПФ%20Коныгин/(отмена)рассчет%20заказ%20СТВ%20ПГП%20и%20ЗПФ.ods'#Лист1.$C:.$Q];11;0)" table:style-name="ce16">
            <text:p>Пельмени «Отборные с говядиной» 0,9 псевдозащип ТМ «Медвежье ушко»</text:p>
          </table:table-cell>
          <table:table-cell office:value-type="float" office:value="0.9" table:formula="of:=VLOOKUP([.C25];['file:///D:/Father/Work/2025_05/РАБОЧИЙ%20СТОЛ/16,01,26%20ПОКОМ%20ЗПФ%20Коныгин/(отмена)рассчет%20заказ%20СТВ%20ПГП%20и%20ЗПФ.ods'#Лист1.$C:.$Q];12;0)" table:style-name="ce17">
            <text:p>0,90</text:p>
          </table:table-cell>
          <table:table-cell office:value-type="float" office:value="8" table:formula="of:=VLOOKUP([.C25];['file:///D:/Father/Work/2025_05/РАБОЧИЙ%20СТОЛ/16,01,26%20ПОКОМ%20ЗПФ%20Коныгин/(отмена)рассчет%20заказ%20СТВ%20ПГП%20и%20ЗПФ.ods'#Лист1.$C:.$Q];13;0)" table:style-name="ce17">
            <text:p>8,00</text:p>
          </table:table-cell>
          <table:table-cell office:value-type="float" office:value="12" table:formula="of:=VLOOKUP([.C25];['file:///D:/Father/Work/2025_05/РАБОЧИЙ%20СТОЛ/16,01,26%20ПОКОМ%20ЗПФ%20Коныгин/(отмена)рассчет%20заказ%20СТВ%20ПГП%20и%20ЗПФ.ods'#Лист1.$C:.$Q];14;0)" table:style-name="ce15">
            <text:p>12</text:p>
          </table:table-cell>
          <table:table-cell office:value-type="float" office:value="84" table:formula="of:=VLOOKUP([.C25];['file:///D:/Father/Work/2025_05/РАБОЧИЙ%20СТОЛ/16,01,26%20ПОКОМ%20ЗПФ%20Коныгин/(отмена)рассчет%20заказ%20СТВ%20ПГП%20и%20ЗПФ.ods'#Лист1.$C:.$Q];15;0)" table:style-name="ce15">
            <text:p>84</text:p>
          </table:table-cell>
          <table:table-cell office:value-type="float" office:value="12" table:formula="of:=MROUND([.F25];[.O25]*[.P25])/[.O25]" table:style-name="ce18">
            <text:p>12</text:p>
          </table:table-cell>
          <table:table-cell office:value-type="float" office:value="96" table:formula="of:=[.R25]*[.O25]" table:style-name="ce18">
            <text:p>96</text:p>
          </table:table-cell>
          <table:table-cell table:number-columns-repeated="2" table:style-name="ce1"/>
          <table:table-cell office:value-type="float" office:value="86.4" table:formula="of:=[.S25]*[.N25]" table:style-name="ce19">
            <text:p>86,40</text:p>
          </table:table-cell>
          <table:table-cell office:value-type="float" office:value="0.14285714285714285" table:formula="of:=[.R25]/[.Q25]" table:style-name="ce19">
            <text:p>0,14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Пельмени</text:p>
          </table:table-cell>
          <table:table-cell office:value-type="string" table:style-name="ce3">
            <text:p>ЗПФ</text:p>
          </table:table-cell>
          <table:table-cell office:value-type="string" table:style-name="ce12">
            <text:p>Пельмени С говядиной и свининой сфера пуговки вес 5 кг УВС НД1 МГ</text:p>
          </table:table-cell>
          <table:table-cell office:value-type="string" table:style-name="ce2">
            <text:p>150 кг</text:p>
          </table:table-cell>
          <table:table-cell office:value-type="float" office:value="150" table:style-name="ce2">
            <text:p>150</text:p>
          </table:table-cell>
          <table:table-cell office:value-type="float" office:value="150" table:formula="of:=VALUE(LEFT([.D26];LEN([.D26])-3))" table:style-name="ce13">
            <text:p>150</text:p>
          </table:table-cell>
          <table:table-cell office:value-type="float" office:value="150" table:formula="of:=[.F26]*[.N26]" table:style-name="ce13">
            <text:p>150</text:p>
          </table:table-cell>
          <table:table-cell office:value-type="float" office:value="0" table:formula="of:=[.G26]-[.E26]" table:style-name="ce14">
            <text:p>0<text:s/></text:p>
          </table:table-cell>
          <table:table-cell office:value-type="string" office:string-value="SU000197" table:formula="of:=VLOOKUP([.C26];['file:///D:/Father/Work/2025_05/РАБОЧИЙ%20СТОЛ/16,01,26%20ПОКОМ%20ЗПФ%20Коныгин/(отмена)рассчет%20заказ%20СТВ%20ПГП%20и%20ЗПФ.ods'#Лист1.$C:.$Q];7;0)" table:style-name="ce15">
            <text:p>SU000197</text:p>
          </table:table-cell>
          <table:table-cell office:value-type="string" office:string-value="P004472" table:formula="of:=VLOOKUP([.C26];['file:///D:/Father/Work/2025_05/РАБОЧИЙ%20СТОЛ/16,01,26%20ПОКОМ%20ЗПФ%20Коныгин/(отмена)рассчет%20заказ%20СТВ%20ПГП%20и%20ЗПФ.ods'#Лист1.$C:.$Q];8;0)" table:style-name="ce15">
            <text:p>P004472</text:p>
          </table:table-cell>
          <table:table-cell office:value-type="float" office:value="4301071050" table:formula="of:=VLOOKUP([.C26];['file:///D:/Father/Work/2025_05/РАБОЧИЙ%20СТОЛ/16,01,26%20ПОКОМ%20ЗПФ%20Коныгин/(отмена)рассчет%20заказ%20СТВ%20ПГП%20и%20ЗПФ.ods'#Лист1.$C:.$Q];9;0)" table:style-name="ce15">
            <text:p>4301071050</text:p>
          </table:table-cell>
          <table:table-cell office:value-type="float" office:value="4607111036216" table:formula="of:=VLOOKUP([.C26];['file:///D:/Father/Work/2025_05/РАБОЧИЙ%20СТОЛ/16,01,26%20ПОКОМ%20ЗПФ%20Коныгин/(отмена)рассчет%20заказ%20СТВ%20ПГП%20и%20ЗПФ.ods'#Лист1.$C:.$Q];10;0)" table:style-name="ce15">
            <text:p>4607111036216</text:p>
          </table:table-cell>
          <table:table-cell office:value-type="string" office:string-value="Пельмени «Пуговки с говядиной и свининой» Весовые Сфера ТМ «No Name» 5 кг" table:formula="of:=VLOOKUP([.C26];['file:///D:/Father/Work/2025_05/РАБОЧИЙ%20СТОЛ/16,01,26%20ПОКОМ%20ЗПФ%20Коныгин/(отмена)рассчет%20заказ%20СТВ%20ПГП%20и%20ЗПФ.ods'#Лист1.$C:.$Q];11;0)" table:style-name="ce16">
            <text:p>Пельмени «Пуговки с говядиной и свининой» Весовые Сфера ТМ «No Name» 5 кг</text:p>
          </table:table-cell>
          <table:table-cell office:value-type="float" office:value="1" table:formula="of:=VLOOKUP([.C26];['file:///D:/Father/Work/2025_05/РАБОЧИЙ%20СТОЛ/16,01,26%20ПОКОМ%20ЗПФ%20Коныгин/(отмена)рассчет%20заказ%20СТВ%20ПГП%20и%20ЗПФ.ods'#Лист1.$C:.$Q];12;0)" table:style-name="ce17">
            <text:p>1,00</text:p>
          </table:table-cell>
          <table:table-cell office:value-type="float" office:value="5" table:formula="of:=VLOOKUP([.C26];['file:///D:/Father/Work/2025_05/РАБОЧИЙ%20СТОЛ/16,01,26%20ПОКОМ%20ЗПФ%20Коныгин/(отмена)рассчет%20заказ%20СТВ%20ПГП%20и%20ЗПФ.ods'#Лист1.$C:.$Q];13;0)" table:style-name="ce17">
            <text:p>5,00</text:p>
          </table:table-cell>
          <table:table-cell office:value-type="float" office:value="12" table:formula="of:=VLOOKUP([.C26];['file:///D:/Father/Work/2025_05/РАБОЧИЙ%20СТОЛ/16,01,26%20ПОКОМ%20ЗПФ%20Коныгин/(отмена)рассчет%20заказ%20СТВ%20ПГП%20и%20ЗПФ.ods'#Лист1.$C:.$Q];14;0)" table:style-name="ce15">
            <text:p>12</text:p>
          </table:table-cell>
          <table:table-cell office:value-type="float" office:value="144" table:formula="of:=VLOOKUP([.C26];['file:///D:/Father/Work/2025_05/РАБОЧИЙ%20СТОЛ/16,01,26%20ПОКОМ%20ЗПФ%20Коныгин/(отмена)рассчет%20заказ%20СТВ%20ПГП%20и%20ЗПФ.ods'#Лист1.$C:.$Q];15;0)" table:style-name="ce15">
            <text:p>144</text:p>
          </table:table-cell>
          <table:table-cell office:value-type="float" office:value="36" table:formula="of:=MROUND([.F26];[.O26]*[.P26])/[.O26]" table:style-name="ce18">
            <text:p>36</text:p>
          </table:table-cell>
          <table:table-cell office:value-type="float" office:value="180" table:formula="of:=[.R26]*[.O26]" table:style-name="ce18">
            <text:p>180</text:p>
          </table:table-cell>
          <table:table-cell table:number-columns-repeated="2" table:style-name="ce1"/>
          <table:table-cell office:value-type="float" office:value="180" table:formula="of:=[.S26]*[.N26]" table:style-name="ce19">
            <text:p>180,00</text:p>
          </table:table-cell>
          <table:table-cell office:value-type="float" office:value="0.25" table:formula="of:=[.R26]/[.Q26]" table:style-name="ce19">
            <text:p>0,25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Пельмени</text:p>
          </table:table-cell>
          <table:table-cell office:value-type="string" table:style-name="ce3">
            <text:p>ЗПФ</text:p>
          </table:table-cell>
          <table:table-cell office:value-type="string" table:style-name="ce12">
            <text:p>Пельмени Со свининой и говядиной ТМ Особый рецепт ТС Любимая ложка ф/п равиоли ф/в 1,0 кг УВС НД МГ</text:p>
          </table:table-cell>
          <table:table-cell office:value-type="string" table:style-name="ce2">
            <text:p>420 кг</text:p>
          </table:table-cell>
          <table:table-cell office:value-type="float" office:value="420" table:style-name="ce2">
            <text:p>420</text:p>
          </table:table-cell>
          <table:table-cell office:value-type="float" office:value="420" table:formula="of:=VALUE(LEFT([.D27];LEN([.D27])-3))" table:style-name="ce13">
            <text:p>420</text:p>
          </table:table-cell>
          <table:table-cell office:value-type="float" office:value="420" table:formula="of:=[.F27]*[.N27]" table:style-name="ce13">
            <text:p>420</text:p>
          </table:table-cell>
          <table:table-cell office:value-type="float" office:value="0" table:formula="of:=[.G27]-[.E27]" table:style-name="ce14">
            <text:p>0<text:s/></text:p>
          </table:table-cell>
          <table:table-cell office:value-type="string" office:string-value="SU002268" table:formula="of:=VLOOKUP([.C27];['file:///D:/Father/Work/2025_05/РАБОЧИЙ%20СТОЛ/16,01,26%20ПОКОМ%20ЗПФ%20Коныгин/(отмена)рассчет%20заказ%20СТВ%20ПГП%20и%20ЗПФ.ods'#Лист1.$C:.$Q];7;0)" table:style-name="ce15">
            <text:p>SU002268</text:p>
          </table:table-cell>
          <table:table-cell office:value-type="string" office:string-value="P004081" table:formula="of:=VLOOKUP([.C27];['file:///D:/Father/Work/2025_05/РАБОЧИЙ%20СТОЛ/16,01,26%20ПОКОМ%20ЗПФ%20Коныгин/(отмена)рассчет%20заказ%20СТВ%20ПГП%20и%20ЗПФ.ods'#Лист1.$C:.$Q];8;0)" table:style-name="ce15">
            <text:p>P004081</text:p>
          </table:table-cell>
          <table:table-cell office:value-type="float" office:value="4301071029" table:formula="of:=VLOOKUP([.C27];['file:///D:/Father/Work/2025_05/РАБОЧИЙ%20СТОЛ/16,01,26%20ПОКОМ%20ЗПФ%20Коныгин/(отмена)рассчет%20заказ%20СТВ%20ПГП%20и%20ЗПФ.ods'#Лист1.$C:.$Q];9;0)" table:style-name="ce15">
            <text:p>4301071029</text:p>
          </table:table-cell>
          <table:table-cell office:value-type="float" office:value="4607111035899" table:formula="of:=VLOOKUP([.C27];['file:///D:/Father/Work/2025_05/РАБОЧИЙ%20СТОЛ/16,01,26%20ПОКОМ%20ЗПФ%20Коныгин/(отмена)рассчет%20заказ%20СТВ%20ПГП%20и%20ЗПФ.ods'#Лист1.$C:.$Q];10;0)" table:style-name="ce15">
            <text:p>4607111035899</text:p>
          </table:table-cell>
          <table:table-cell office:value-type="string" office:string-value="Пельмени Со свининой и говядиной Любимая ложка 1,0 Равиоли Особый рецепт" table:formula="of:=VLOOKUP([.C27];['file:///D:/Father/Work/2025_05/РАБОЧИЙ%20СТОЛ/16,01,26%20ПОКОМ%20ЗПФ%20Коныгин/(отмена)рассчет%20заказ%20СТВ%20ПГП%20и%20ЗПФ.ods'#Лист1.$C:.$Q];11;0)" table:style-name="ce16">
            <text:p>Пельмени Со свининой и говядиной Любимая ложка 1,0 Равиоли Особый рецепт</text:p>
          </table:table-cell>
          <table:table-cell office:value-type="float" office:value="1" table:formula="of:=VLOOKUP([.C27];['file:///D:/Father/Work/2025_05/РАБОЧИЙ%20СТОЛ/16,01,26%20ПОКОМ%20ЗПФ%20Коныгин/(отмена)рассчет%20заказ%20СТВ%20ПГП%20и%20ЗПФ.ods'#Лист1.$C:.$Q];12;0)" table:style-name="ce17">
            <text:p>1,00</text:p>
          </table:table-cell>
          <table:table-cell office:value-type="float" office:value="5" table:formula="of:=VLOOKUP([.C27];['file:///D:/Father/Work/2025_05/РАБОЧИЙ%20СТОЛ/16,01,26%20ПОКОМ%20ЗПФ%20Коныгин/(отмена)рассчет%20заказ%20СТВ%20ПГП%20и%20ЗПФ.ods'#Лист1.$C:.$Q];13;0)" table:style-name="ce17">
            <text:p>5,00</text:p>
          </table:table-cell>
          <table:table-cell office:value-type="float" office:value="12" table:formula="of:=VLOOKUP([.C27];['file:///D:/Father/Work/2025_05/РАБОЧИЙ%20СТОЛ/16,01,26%20ПОКОМ%20ЗПФ%20Коныгин/(отмена)рассчет%20заказ%20СТВ%20ПГП%20и%20ЗПФ.ods'#Лист1.$C:.$Q];14;0)" table:style-name="ce15">
            <text:p>12</text:p>
          </table:table-cell>
          <table:table-cell office:value-type="float" office:value="84" table:formula="of:=VLOOKUP([.C27];['file:///D:/Father/Work/2025_05/РАБОЧИЙ%20СТОЛ/16,01,26%20ПОКОМ%20ЗПФ%20Коныгин/(отмена)рассчет%20заказ%20СТВ%20ПГП%20и%20ЗПФ.ods'#Лист1.$C:.$Q];15;0)" table:style-name="ce15">
            <text:p>84</text:p>
          </table:table-cell>
          <table:table-cell office:value-type="float" office:value="84" table:formula="of:=MROUND([.F27];[.O27]*[.P27])/[.O27]" table:style-name="ce18">
            <text:p>84</text:p>
          </table:table-cell>
          <table:table-cell office:value-type="float" office:value="420" table:formula="of:=[.R27]*[.O27]" table:style-name="ce18">
            <text:p>420</text:p>
          </table:table-cell>
          <table:table-cell table:number-columns-repeated="2" table:style-name="ce1"/>
          <table:table-cell office:value-type="float" office:value="420" table:formula="of:=[.S27]*[.N27]" table:style-name="ce19">
            <text:p>420,00</text:p>
          </table:table-cell>
          <table:table-cell office:value-type="float" office:value="1" table:formula="of:=[.R27]/[.Q27]" table:style-name="ce19">
            <text:p>1,0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Пельмени ПГП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Пельмени Бульмени Нейробуст с мясом ТМ Горячая штучка ТС Бульмени ГШ сфера ф/п ф/в 0,6 кг МГ</text:p>
          </table:table-cell>
          <table:table-cell office:value-type="string" table:style-name="ce2">
            <text:p>70 шт</text:p>
          </table:table-cell>
          <table:table-cell office:value-type="float" office:value="42" table:style-name="ce2">
            <text:p>42</text:p>
          </table:table-cell>
          <table:table-cell office:value-type="float" office:value="70" table:formula="of:=VALUE(LEFT([.D28];LEN([.D28])-3))" table:style-name="ce13">
            <text:p>70</text:p>
          </table:table-cell>
          <table:table-cell office:value-type="float" office:value="42" table:formula="of:=[.F28]*[.N28]" table:style-name="ce13">
            <text:p>42</text:p>
          </table:table-cell>
          <table:table-cell office:value-type="float" office:value="0" table:formula="of:=[.G28]-[.E28]" table:style-name="ce14">
            <text:p>0<text:s/></text:p>
          </table:table-cell>
          <table:table-cell office:value-type="string" office:string-value="SU003845" table:formula="of:=VLOOKUP([.C28];['file:///D:/Father/Work/2025_05/РАБОЧИЙ%20СТОЛ/16,01,26%20ПОКОМ%20ЗПФ%20Коныгин/(отмена)рассчет%20заказ%20СТВ%20ПГП%20и%20ЗПФ.ods'#Лист1.$C:.$Q];7;0)" table:style-name="ce15">
            <text:p>SU003845</text:p>
          </table:table-cell>
          <table:table-cell office:value-type="string" office:string-value="P004909" table:formula="of:=VLOOKUP([.C28];['file:///D:/Father/Work/2025_05/РАБОЧИЙ%20СТОЛ/16,01,26%20ПОКОМ%20ЗПФ%20Коныгин/(отмена)рассчет%20заказ%20СТВ%20ПГП%20и%20ЗПФ.ods'#Лист1.$C:.$Q];8;0)" table:style-name="ce15">
            <text:p>P004909</text:p>
          </table:table-cell>
          <table:table-cell office:value-type="float" office:value="4301071094" table:formula="of:=VLOOKUP([.C28];['file:///D:/Father/Work/2025_05/РАБОЧИЙ%20СТОЛ/16,01,26%20ПОКОМ%20ЗПФ%20Коныгин/(отмена)рассчет%20заказ%20СТВ%20ПГП%20и%20ЗПФ.ods'#Лист1.$C:.$Q];9;0)" table:style-name="ce15">
            <text:p>4301071094</text:p>
          </table:table-cell>
          <table:table-cell office:value-type="float" office:value="4620207491140" table:formula="of:=VLOOKUP([.C28];['file:///D:/Father/Work/2025_05/РАБОЧИЙ%20СТОЛ/16,01,26%20ПОКОМ%20ЗПФ%20Коныгин/(отмена)рассчет%20заказ%20СТВ%20ПГП%20и%20ЗПФ.ods'#Лист1.$C:.$Q];10;0)" table:style-name="ce15">
            <text:p>4620207491140</text:p>
          </table:table-cell>
          <table:table-cell office:value-type="string" office:string-value="Пельмени ПГП «Пельмени Бульмени Нейробуст с мясом» Фикс.вес 0,6 сфера ТМ «Горячая штучка»" table:formula="of:=VLOOKUP([.C28];['file:///D:/Father/Work/2025_05/РАБОЧИЙ%20СТОЛ/16,01,26%20ПОКОМ%20ЗПФ%20Коныгин/(отмена)рассчет%20заказ%20СТВ%20ПГП%20и%20ЗПФ.ods'#Лист1.$C:.$Q];11;0)" table:style-name="ce16">
            <text:p>Пельмени ПГП «Пельмени Бульмени Нейробуст с мясом» Фикс.вес 0,6 сфера ТМ «Горячая штучка»</text:p>
          </table:table-cell>
          <table:table-cell office:value-type="float" office:value="0.6" table:formula="of:=VLOOKUP([.C28];['file:///D:/Father/Work/2025_05/РАБОЧИЙ%20СТОЛ/16,01,26%20ПОКОМ%20ЗПФ%20Коныгин/(отмена)рассчет%20заказ%20СТВ%20ПГП%20и%20ЗПФ.ods'#Лист1.$C:.$Q];12;0)" table:style-name="ce17">
            <text:p>0,60</text:p>
          </table:table-cell>
          <table:table-cell office:value-type="float" office:value="10" table:formula="of:=VLOOKUP([.C28];['file:///D:/Father/Work/2025_05/РАБОЧИЙ%20СТОЛ/16,01,26%20ПОКОМ%20ЗПФ%20Коныгин/(отмена)рассчет%20заказ%20СТВ%20ПГП%20и%20ЗПФ.ods'#Лист1.$C:.$Q];13;0)" table:style-name="ce17">
            <text:p>10,00</text:p>
          </table:table-cell>
          <table:table-cell office:value-type="float" office:value="12" table:formula="of:=VLOOKUP([.C28];['file:///D:/Father/Work/2025_05/РАБОЧИЙ%20СТОЛ/16,01,26%20ПОКОМ%20ЗПФ%20Коныгин/(отмена)рассчет%20заказ%20СТВ%20ПГП%20и%20ЗПФ.ods'#Лист1.$C:.$Q];14;0)" table:style-name="ce15">
            <text:p>12</text:p>
          </table:table-cell>
          <table:table-cell office:value-type="float" office:value="84" table:formula="of:=VLOOKUP([.C28];['file:///D:/Father/Work/2025_05/РАБОЧИЙ%20СТОЛ/16,01,26%20ПОКОМ%20ЗПФ%20Коныгин/(отмена)рассчет%20заказ%20СТВ%20ПГП%20и%20ЗПФ.ods'#Лист1.$C:.$Q];15;0)" table:style-name="ce15">
            <text:p>84</text:p>
          </table:table-cell>
          <table:table-cell office:value-type="float" office:value="12" table:formula="of:=MROUND([.F28];[.O28]*[.P28])/[.O28]" table:style-name="ce18">
            <text:p>12</text:p>
          </table:table-cell>
          <table:table-cell office:value-type="float" office:value="120" table:formula="of:=[.R28]*[.O28]" table:style-name="ce18">
            <text:p>120</text:p>
          </table:table-cell>
          <table:table-cell table:number-columns-repeated="2" table:style-name="ce1"/>
          <table:table-cell office:value-type="float" office:value="72" table:formula="of:=[.S28]*[.N28]" table:style-name="ce19">
            <text:p>72,00</text:p>
          </table:table-cell>
          <table:table-cell office:value-type="float" office:value="0.14285714285714285" table:formula="of:=[.R28]/[.Q28]" table:style-name="ce19">
            <text:p>0,14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Бульмени хрустящие с мясом ТМ Горячая штучка ТС Бульмени ГШ сфера ф/в 0,22 кг ПГП2 МГ</text:p>
          </table:table-cell>
          <table:table-cell office:value-type="string" table:style-name="ce2">
            <text:p>120 шт</text:p>
          </table:table-cell>
          <table:table-cell office:value-type="float" office:value="26.4" table:style-name="ce2">
            <text:p>26,4</text:p>
          </table:table-cell>
          <table:table-cell office:value-type="float" office:value="120" table:formula="of:=VALUE(LEFT([.D29];LEN([.D29])-3))" table:style-name="ce13">
            <text:p>120</text:p>
          </table:table-cell>
          <table:table-cell office:value-type="float" office:value="26.4" table:formula="of:=[.F29]*[.N29]" table:style-name="ce13">
            <text:p>26,4</text:p>
          </table:table-cell>
          <table:table-cell office:value-type="float" office:value="0" table:formula="of:=[.G29]-[.E29]" table:style-name="ce14">
            <text:p>0<text:s/></text:p>
          </table:table-cell>
          <table:table-cell office:value-type="string" office:string-value="SU003945" table:formula="of:=VLOOKUP([.C29];['file:///D:/Father/Work/2025_05/РАБОЧИЙ%20СТОЛ/16,01,26%20ПОКОМ%20ЗПФ%20Коныгин/(отмена)рассчет%20заказ%20СТВ%20ПГП%20и%20ЗПФ.ods'#Лист1.$C:.$Q];7;0)" table:style-name="ce15">
            <text:p>SU003945</text:p>
          </table:table-cell>
          <table:table-cell office:value-type="string" office:string-value="P005065" table:formula="of:=VLOOKUP([.C29];['file:///D:/Father/Work/2025_05/РАБОЧИЙ%20СТОЛ/16,01,26%20ПОКОМ%20ЗПФ%20Коныгин/(отмена)рассчет%20заказ%20СТВ%20ПГП%20и%20ЗПФ.ods'#Лист1.$C:.$Q];8;0)" table:style-name="ce15">
            <text:p>P005065</text:p>
          </table:table-cell>
          <table:table-cell office:value-type="float" office:value="4301135826" table:formula="of:=VLOOKUP([.C29];['file:///D:/Father/Work/2025_05/РАБОЧИЙ%20СТОЛ/16,01,26%20ПОКОМ%20ЗПФ%20Коныгин/(отмена)рассчет%20заказ%20СТВ%20ПГП%20и%20ЗПФ.ods'#Лист1.$C:.$Q];9;0)" table:style-name="ce15">
            <text:p>4301135826</text:p>
          </table:table-cell>
          <table:table-cell office:value-type="float" office:value="4620207490983" table:formula="of:=VLOOKUP([.C29];['file:///D:/Father/Work/2025_05/РАБОЧИЙ%20СТОЛ/16,01,26%20ПОКОМ%20ЗПФ%20Коныгин/(отмена)рассчет%20заказ%20СТВ%20ПГП%20и%20ЗПФ.ods'#Лист1.$C:.$Q];10;0)" table:style-name="ce15">
            <text:p>4620207490983</text:p>
          </table:table-cell>
          <table:table-cell office:value-type="string" office:string-value="Снеки «Бульмени хрустящие с мясом» Фикс.вес 0,22 сфера ТМ «Горячая штучка»" table:formula="of:=VLOOKUP([.C29];['file:///D:/Father/Work/2025_05/РАБОЧИЙ%20СТОЛ/16,01,26%20ПОКОМ%20ЗПФ%20Коныгин/(отмена)рассчет%20заказ%20СТВ%20ПГП%20и%20ЗПФ.ods'#Лист1.$C:.$Q];11;0)" table:style-name="ce16">
            <text:p>Снеки «Бульмени хрустящие с мясом» Фикс.вес 0,22 сфера ТМ «Горячая штучка»</text:p>
          </table:table-cell>
          <table:table-cell office:value-type="float" office:value="0.22" table:formula="of:=VLOOKUP([.C29];['file:///D:/Father/Work/2025_05/РАБОЧИЙ%20СТОЛ/16,01,26%20ПОКОМ%20ЗПФ%20Коныгин/(отмена)рассчет%20заказ%20СТВ%20ПГП%20и%20ЗПФ.ods'#Лист1.$C:.$Q];12;0)" table:style-name="ce17">
            <text:p>0,22</text:p>
          </table:table-cell>
          <table:table-cell office:value-type="float" office:value="12" table:formula="of:=VLOOKUP([.C29];['file:///D:/Father/Work/2025_05/РАБОЧИЙ%20СТОЛ/16,01,26%20ПОКОМ%20ЗПФ%20Коныгин/(отмена)рассчет%20заказ%20СТВ%20ПГП%20и%20ЗПФ.ods'#Лист1.$C:.$Q];13;0)" table:style-name="ce17">
            <text:p>12,00</text:p>
          </table:table-cell>
          <table:table-cell office:value-type="float" office:value="14" table:formula="of:=VLOOKUP([.C29];['file:///D:/Father/Work/2025_05/РАБОЧИЙ%20СТОЛ/16,01,26%20ПОКОМ%20ЗПФ%20Коныгин/(отмена)рассчет%20заказ%20СТВ%20ПГП%20и%20ЗПФ.ods'#Лист1.$C:.$Q];14;0)" table:style-name="ce15">
            <text:p>14</text:p>
          </table:table-cell>
          <table:table-cell office:value-type="float" office:value="70" table:formula="of:=VLOOKUP([.C29];['file:///D:/Father/Work/2025_05/РАБОЧИЙ%20СТОЛ/16,01,26%20ПОКОМ%20ЗПФ%20Коныгин/(отмена)рассчет%20заказ%20СТВ%20ПГП%20и%20ЗПФ.ods'#Лист1.$C:.$Q];15;0)" table:style-name="ce15">
            <text:p>70</text:p>
          </table:table-cell>
          <table:table-cell office:value-type="float" office:value="14" table:formula="of:=MROUND([.F29];[.O29]*[.P29])/[.O29]" table:style-name="ce18">
            <text:p>14</text:p>
          </table:table-cell>
          <table:table-cell office:value-type="float" office:value="168" table:formula="of:=[.R29]*[.O29]" table:style-name="ce18">
            <text:p>168</text:p>
          </table:table-cell>
          <table:table-cell table:number-columns-repeated="2" table:style-name="ce1"/>
          <table:table-cell office:value-type="float" office:value="36.96" table:formula="of:=[.S29]*[.N29]" table:style-name="ce19">
            <text:p>36,96</text:p>
          </table:table-cell>
          <table:table-cell office:value-type="float" office:value="0.2" table:formula="of:=[.R29]/[.Q29]" table:style-name="ce19">
            <text:p>0,2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Готовые бельмеши сочные с мясом ТМ Горячая штучка ф/п ф/в 0,3 кг НД3 ПГП2 МГ</text:p>
          </table:table-cell>
          <table:table-cell office:value-type="string" table:style-name="ce2">
            <text:p>144 шт</text:p>
          </table:table-cell>
          <table:table-cell office:value-type="float" office:value="43.2" table:style-name="ce2">
            <text:p>43,2</text:p>
          </table:table-cell>
          <table:table-cell office:value-type="float" office:value="144" table:formula="of:=VALUE(LEFT([.D30];LEN([.D30])-3))" table:style-name="ce13">
            <text:p>144</text:p>
          </table:table-cell>
          <table:table-cell office:value-type="float" office:value="43.199999999999996" table:formula="of:=[.F30]*[.N30]" table:style-name="ce13">
            <text:p>43,2</text:p>
          </table:table-cell>
          <table:table-cell office:value-type="float" office:value="0" table:formula="of:=[.G30]-[.E30]" table:style-name="ce14">
            <text:p>0<text:s/></text:p>
          </table:table-cell>
          <table:table-cell office:value-type="string" office:string-value="SU003593" table:formula="of:=VLOOKUP([.C30];['file:///D:/Father/Work/2025_05/РАБОЧИЙ%20СТОЛ/16,01,26%20ПОКОМ%20ЗПФ%20Коныгин/(отмена)рассчет%20заказ%20СТВ%20ПГП%20и%20ЗПФ.ods'#Лист1.$C:.$Q];7;0)" table:style-name="ce15">
            <text:p>SU003593</text:p>
          </table:table-cell>
          <table:table-cell office:value-type="string" office:string-value="P004598" table:formula="of:=VLOOKUP([.C30];['file:///D:/Father/Work/2025_05/РАБОЧИЙ%20СТОЛ/16,01,26%20ПОКОМ%20ЗПФ%20Коныгин/(отмена)рассчет%20заказ%20СТВ%20ПГП%20и%20ЗПФ.ods'#Лист1.$C:.$Q];8;0)" table:style-name="ce15">
            <text:p>P004598</text:p>
          </table:table-cell>
          <table:table-cell office:value-type="float" office:value="4301135574" table:formula="of:=VLOOKUP([.C30];['file:///D:/Father/Work/2025_05/РАБОЧИЙ%20СТОЛ/16,01,26%20ПОКОМ%20ЗПФ%20Коныгин/(отмена)рассчет%20заказ%20СТВ%20ПГП%20и%20ЗПФ.ods'#Лист1.$C:.$Q];9;0)" table:style-name="ce15">
            <text:p>4301135574</text:p>
          </table:table-cell>
          <table:table-cell office:value-type="float" office:value="4607111033659" table:formula="of:=VLOOKUP([.C30];['file:///D:/Father/Work/2025_05/РАБОЧИЙ%20СТОЛ/16,01,26%20ПОКОМ%20ЗПФ%20Коныгин/(отмена)рассчет%20заказ%20СТВ%20ПГП%20и%20ЗПФ.ods'#Лист1.$C:.$Q];10;0)" table:style-name="ce15">
            <text:p>4607111033659</text:p>
          </table:table-cell>
          <table:table-cell office:value-type="string" office:string-value="Снеки «Бельмеши сочные с мясом» Фикс.вес 0,3 Пакет ТМ «Горячая штучка»" table:formula="of:=VLOOKUP([.C30];['file:///D:/Father/Work/2025_05/РАБОЧИЙ%20СТОЛ/16,01,26%20ПОКОМ%20ЗПФ%20Коныгин/(отмена)рассчет%20заказ%20СТВ%20ПГП%20и%20ЗПФ.ods'#Лист1.$C:.$Q];11;0)" table:style-name="ce16">
            <text:p>Снеки «Бельмеши сочные с мясом» Фикс.вес 0,3 Пакет ТМ «Горячая штучка»</text:p>
          </table:table-cell>
          <table:table-cell office:value-type="float" office:value="0.3" table:formula="of:=VLOOKUP([.C30];['file:///D:/Father/Work/2025_05/РАБОЧИЙ%20СТОЛ/16,01,26%20ПОКОМ%20ЗПФ%20Коныгин/(отмена)рассчет%20заказ%20СТВ%20ПГП%20и%20ЗПФ.ods'#Лист1.$C:.$Q];12;0)" table:style-name="ce17">
            <text:p>0,30</text:p>
          </table:table-cell>
          <table:table-cell office:value-type="float" office:value="12" table:formula="of:=VLOOKUP([.C30];['file:///D:/Father/Work/2025_05/РАБОЧИЙ%20СТОЛ/16,01,26%20ПОКОМ%20ЗПФ%20Коныгин/(отмена)рассчет%20заказ%20СТВ%20ПГП%20и%20ЗПФ.ods'#Лист1.$C:.$Q];13;0)" table:style-name="ce17">
            <text:p>12,00</text:p>
          </table:table-cell>
          <table:table-cell office:value-type="float" office:value="14" table:formula="of:=VLOOKUP([.C30];['file:///D:/Father/Work/2025_05/РАБОЧИЙ%20СТОЛ/16,01,26%20ПОКОМ%20ЗПФ%20Коныгин/(отмена)рассчет%20заказ%20СТВ%20ПГП%20и%20ЗПФ.ods'#Лист1.$C:.$Q];14;0)" table:style-name="ce15">
            <text:p>14</text:p>
          </table:table-cell>
          <table:table-cell office:value-type="float" office:value="70" table:formula="of:=VLOOKUP([.C30];['file:///D:/Father/Work/2025_05/РАБОЧИЙ%20СТОЛ/16,01,26%20ПОКОМ%20ЗПФ%20Коныгин/(отмена)рассчет%20заказ%20СТВ%20ПГП%20и%20ЗПФ.ods'#Лист1.$C:.$Q];15;0)" table:style-name="ce15">
            <text:p>70</text:p>
          </table:table-cell>
          <table:table-cell office:value-type="float" office:value="14" table:formula="of:=MROUND([.F30];[.O30]*[.P30])/[.O30]" table:style-name="ce18">
            <text:p>14</text:p>
          </table:table-cell>
          <table:table-cell office:value-type="float" office:value="168" table:formula="of:=[.R30]*[.O30]" table:style-name="ce18">
            <text:p>168</text:p>
          </table:table-cell>
          <table:table-cell table:number-columns-repeated="2" table:style-name="ce1"/>
          <table:table-cell office:value-type="float" office:value="50.4" table:formula="of:=[.S30]*[.N30]" table:style-name="ce19">
            <text:p>50,40</text:p>
          </table:table-cell>
          <table:table-cell office:value-type="float" office:value="0.2" table:formula="of:=[.R30]/[.Q30]" table:style-name="ce19">
            <text:p>0,2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Готовые чебупели острые с мясом ТМ Горячая штучка ф/п ф/в 0,24 кг МГ</text:p>
          </table:table-cell>
          <table:table-cell office:value-type="string" table:style-name="ce2">
            <text:p>1200 шт</text:p>
          </table:table-cell>
          <table:table-cell office:value-type="float" office:value="288" table:style-name="ce2">
            <text:p>288</text:p>
          </table:table-cell>
          <table:table-cell office:value-type="float" office:value="1200" table:formula="of:=VALUE(LEFT([.D31];LEN([.D31])-3))" table:style-name="ce13">
            <text:p>1200</text:p>
          </table:table-cell>
          <table:table-cell office:value-type="float" office:value="288" table:formula="of:=[.F31]*[.N31]" table:style-name="ce13">
            <text:p>288</text:p>
          </table:table-cell>
          <table:table-cell office:value-type="float" office:value="0" table:formula="of:=[.G31]-[.E31]" table:style-name="ce14">
            <text:p>0<text:s/></text:p>
          </table:table-cell>
          <table:table-cell office:value-type="string" office:string-value="SU003887" table:formula="of:=VLOOKUP([.C31];['file:///D:/Father/Work/2025_05/РАБОЧИЙ%20СТОЛ/16,01,26%20ПОКОМ%20ЗПФ%20Коныгин/(отмена)рассчет%20заказ%20СТВ%20ПГП%20и%20ЗПФ.ods'#Лист1.$C:.$Q];7;0)" table:style-name="ce15">
            <text:p>SU003887</text:p>
          </table:table-cell>
          <table:table-cell office:value-type="string" office:string-value="P004969" table:formula="of:=VLOOKUP([.C31];['file:///D:/Father/Work/2025_05/РАБОЧИЙ%20СТОЛ/16,01,26%20ПОКОМ%20ЗПФ%20Коныгин/(отмена)рассчет%20заказ%20СТВ%20ПГП%20и%20ЗПФ.ods'#Лист1.$C:.$Q];8;0)" table:style-name="ce15">
            <text:p>P004969</text:p>
          </table:table-cell>
          <table:table-cell office:value-type="float" office:value="4301135763" table:formula="of:=VLOOKUP([.C31];['file:///D:/Father/Work/2025_05/РАБОЧИЙ%20СТОЛ/16,01,26%20ПОКОМ%20ЗПФ%20Коныгин/(отмена)рассчет%20заказ%20СТВ%20ПГП%20и%20ЗПФ.ods'#Лист1.$C:.$Q];9;0)" table:style-name="ce15">
            <text:p>4301135763</text:p>
          </table:table-cell>
          <table:table-cell office:value-type="float" office:value="4620207491027" table:formula="of:=VLOOKUP([.C31];['file:///D:/Father/Work/2025_05/РАБОЧИЙ%20СТОЛ/16,01,26%20ПОКОМ%20ЗПФ%20Коныгин/(отмена)рассчет%20заказ%20СТВ%20ПГП%20и%20ЗПФ.ods'#Лист1.$C:.$Q];10;0)" table:style-name="ce15">
            <text:p>4620207491027</text:p>
          </table:table-cell>
          <table:table-cell office:value-type="string" office:string-value="Снеки «Готовые чебупели острые с мясом» Фикс.вес 0,24 ТМ «Горячая штучка»" table:formula="of:=VLOOKUP([.C31];['file:///D:/Father/Work/2025_05/РАБОЧИЙ%20СТОЛ/16,01,26%20ПОКОМ%20ЗПФ%20Коныгин/(отмена)рассчет%20заказ%20СТВ%20ПГП%20и%20ЗПФ.ods'#Лист1.$C:.$Q];11;0)" table:style-name="ce16">
            <text:p>Снеки «Готовые чебупели острые с мясом» Фикс.вес 0,24 ТМ «Горячая штучка»</text:p>
          </table:table-cell>
          <table:table-cell office:value-type="float" office:value="0.24" table:formula="of:=VLOOKUP([.C31];['file:///D:/Father/Work/2025_05/РАБОЧИЙ%20СТОЛ/16,01,26%20ПОКОМ%20ЗПФ%20Коныгин/(отмена)рассчет%20заказ%20СТВ%20ПГП%20и%20ЗПФ.ods'#Лист1.$C:.$Q];12;0)" table:style-name="ce17">
            <text:p>0,24</text:p>
          </table:table-cell>
          <table:table-cell office:value-type="float" office:value="12" table:formula="of:=VLOOKUP([.C31];['file:///D:/Father/Work/2025_05/РАБОЧИЙ%20СТОЛ/16,01,26%20ПОКОМ%20ЗПФ%20Коныгин/(отмена)рассчет%20заказ%20СТВ%20ПГП%20и%20ЗПФ.ods'#Лист1.$C:.$Q];13;0)" table:style-name="ce17">
            <text:p>12,00</text:p>
          </table:table-cell>
          <table:table-cell office:value-type="float" office:value="14" table:formula="of:=VLOOKUP([.C31];['file:///D:/Father/Work/2025_05/РАБОЧИЙ%20СТОЛ/16,01,26%20ПОКОМ%20ЗПФ%20Коныгин/(отмена)рассчет%20заказ%20СТВ%20ПГП%20и%20ЗПФ.ods'#Лист1.$C:.$Q];14;0)" table:style-name="ce15">
            <text:p>14</text:p>
          </table:table-cell>
          <table:table-cell office:value-type="float" office:value="70" table:formula="of:=VLOOKUP([.C31];['file:///D:/Father/Work/2025_05/РАБОЧИЙ%20СТОЛ/16,01,26%20ПОКОМ%20ЗПФ%20Коныгин/(отмена)рассчет%20заказ%20СТВ%20ПГП%20и%20ЗПФ.ods'#Лист1.$C:.$Q];15;0)" table:style-name="ce15">
            <text:p>70</text:p>
          </table:table-cell>
          <table:table-cell office:value-type="float" office:value="98" table:formula="of:=MROUND([.F31];[.O31]*[.P31])/[.O31]" table:style-name="ce18">
            <text:p>98</text:p>
          </table:table-cell>
          <table:table-cell office:value-type="float" office:value="1176" table:formula="of:=[.R31]*[.O31]" table:style-name="ce18">
            <text:p>1176</text:p>
          </table:table-cell>
          <table:table-cell table:number-columns-repeated="2" table:style-name="ce1"/>
          <table:table-cell office:value-type="float" office:value="282.24" table:formula="of:=[.S31]*[.N31]" table:style-name="ce19">
            <text:p>282,24</text:p>
          </table:table-cell>
          <table:table-cell office:value-type="float" office:value="1.4" table:formula="of:=[.R31]/[.Q31]" table:style-name="ce19">
            <text:p>1,4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Готовые чебупели с ветчиной и сыром ТМ Горячая штучка ф/п ф/в 0,24 кг ПГП2 МГ</text:p>
          </table:table-cell>
          <table:table-cell office:value-type="string" table:style-name="ce2">
            <text:p>1200 шт</text:p>
          </table:table-cell>
          <table:table-cell office:value-type="float" office:value="288" table:style-name="ce2">
            <text:p>288</text:p>
          </table:table-cell>
          <table:table-cell office:value-type="float" office:value="1200" table:formula="of:=VALUE(LEFT([.D32];LEN([.D32])-3))" table:style-name="ce13">
            <text:p>1200</text:p>
          </table:table-cell>
          <table:table-cell office:value-type="float" office:value="288" table:formula="of:=[.F32]*[.N32]" table:style-name="ce13">
            <text:p>288</text:p>
          </table:table-cell>
          <table:table-cell office:value-type="float" office:value="0" table:formula="of:=[.G32]-[.E32]" table:style-name="ce14">
            <text:p>0<text:s/></text:p>
          </table:table-cell>
          <table:table-cell office:value-type="string" office:string-value="SU003889" table:formula="of:=VLOOKUP([.C32];['file:///D:/Father/Work/2025_05/РАБОЧИЙ%20СТОЛ/16,01,26%20ПОКОМ%20ЗПФ%20Коныгин/(отмена)рассчет%20заказ%20СТВ%20ПГП%20и%20ЗПФ.ods'#Лист1.$C:.$Q];7;0)" table:style-name="ce15">
            <text:p>SU003889</text:p>
          </table:table-cell>
          <table:table-cell office:value-type="string" office:string-value="P004971" table:formula="of:=VLOOKUP([.C32];['file:///D:/Father/Work/2025_05/РАБОЧИЙ%20СТОЛ/16,01,26%20ПОКОМ%20ЗПФ%20Коныгин/(отмена)рассчет%20заказ%20СТВ%20ПГП%20и%20ЗПФ.ods'#Лист1.$C:.$Q];8;0)" table:style-name="ce15">
            <text:p>P004971</text:p>
          </table:table-cell>
          <table:table-cell office:value-type="float" office:value="4301135793" table:formula="of:=VLOOKUP([.C32];['file:///D:/Father/Work/2025_05/РАБОЧИЙ%20СТОЛ/16,01,26%20ПОКОМ%20ЗПФ%20Коныгин/(отмена)рассчет%20заказ%20СТВ%20ПГП%20и%20ЗПФ.ods'#Лист1.$C:.$Q];9;0)" table:style-name="ce15">
            <text:p>4301135793</text:p>
          </table:table-cell>
          <table:table-cell office:value-type="float" office:value="4620207491003" table:formula="of:=VLOOKUP([.C32];['file:///D:/Father/Work/2025_05/РАБОЧИЙ%20СТОЛ/16,01,26%20ПОКОМ%20ЗПФ%20Коныгин/(отмена)рассчет%20заказ%20СТВ%20ПГП%20и%20ЗПФ.ods'#Лист1.$C:.$Q];10;0)" table:style-name="ce15">
            <text:p>4620207491003</text:p>
          </table:table-cell>
          <table:table-cell office:value-type="string" office:string-value="Снеки «Готовые чебупели с ветчиной и сыром» Фикс.вес 0,24 ТМ «Горячая штучка»" table:formula="of:=VLOOKUP([.C32];['file:///D:/Father/Work/2025_05/РАБОЧИЙ%20СТОЛ/16,01,26%20ПОКОМ%20ЗПФ%20Коныгин/(отмена)рассчет%20заказ%20СТВ%20ПГП%20и%20ЗПФ.ods'#Лист1.$C:.$Q];11;0)" table:style-name="ce16">
            <text:p>Снеки «Готовые чебупели с ветчиной и сыром» Фикс.вес 0,24 ТМ «Горячая штучка»</text:p>
          </table:table-cell>
          <table:table-cell office:value-type="float" office:value="0.24" table:formula="of:=VLOOKUP([.C32];['file:///D:/Father/Work/2025_05/РАБОЧИЙ%20СТОЛ/16,01,26%20ПОКОМ%20ЗПФ%20Коныгин/(отмена)рассчет%20заказ%20СТВ%20ПГП%20и%20ЗПФ.ods'#Лист1.$C:.$Q];12;0)" table:style-name="ce17">
            <text:p>0,24</text:p>
          </table:table-cell>
          <table:table-cell office:value-type="float" office:value="12" table:formula="of:=VLOOKUP([.C32];['file:///D:/Father/Work/2025_05/РАБОЧИЙ%20СТОЛ/16,01,26%20ПОКОМ%20ЗПФ%20Коныгин/(отмена)рассчет%20заказ%20СТВ%20ПГП%20и%20ЗПФ.ods'#Лист1.$C:.$Q];13;0)" table:style-name="ce17">
            <text:p>12,00</text:p>
          </table:table-cell>
          <table:table-cell office:value-type="float" office:value="14" table:formula="of:=VLOOKUP([.C32];['file:///D:/Father/Work/2025_05/РАБОЧИЙ%20СТОЛ/16,01,26%20ПОКОМ%20ЗПФ%20Коныгин/(отмена)рассчет%20заказ%20СТВ%20ПГП%20и%20ЗПФ.ods'#Лист1.$C:.$Q];14;0)" table:style-name="ce15">
            <text:p>14</text:p>
          </table:table-cell>
          <table:table-cell office:value-type="float" office:value="70" table:formula="of:=VLOOKUP([.C32];['file:///D:/Father/Work/2025_05/РАБОЧИЙ%20СТОЛ/16,01,26%20ПОКОМ%20ЗПФ%20Коныгин/(отмена)рассчет%20заказ%20СТВ%20ПГП%20и%20ЗПФ.ods'#Лист1.$C:.$Q];15;0)" table:style-name="ce15">
            <text:p>70</text:p>
          </table:table-cell>
          <table:table-cell office:value-type="float" office:value="98" table:formula="of:=MROUND([.F32];[.O32]*[.P32])/[.O32]" table:style-name="ce18">
            <text:p>98</text:p>
          </table:table-cell>
          <table:table-cell office:value-type="float" office:value="1176" table:formula="of:=[.R32]*[.O32]" table:style-name="ce18">
            <text:p>1176</text:p>
          </table:table-cell>
          <table:table-cell table:number-columns-repeated="2" table:style-name="ce1"/>
          <table:table-cell office:value-type="float" office:value="282.24" table:formula="of:=[.S32]*[.N32]" table:style-name="ce19">
            <text:p>282,24</text:p>
          </table:table-cell>
          <table:table-cell office:value-type="float" office:value="1.4" table:formula="of:=[.R32]/[.Q32]" table:style-name="ce19">
            <text:p>1,4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Готовые чебупели сочные с мясом ТМ Горячая штучка ф/п ф/в 0,24 кг НКК, Топ-ЛКК, Дистр МГ</text:p>
          </table:table-cell>
          <table:table-cell office:value-type="string" table:style-name="ce2">
            <text:p>2004 шт</text:p>
          </table:table-cell>
          <table:table-cell office:value-type="float" office:value="480.96" table:style-name="ce2">
            <text:p>480,96</text:p>
          </table:table-cell>
          <table:table-cell office:value-type="float" office:value="2004" table:formula="of:=VALUE(LEFT([.D33];LEN([.D33])-3))" table:style-name="ce13">
            <text:p>2004</text:p>
          </table:table-cell>
          <table:table-cell office:value-type="float" office:value="480.96" table:formula="of:=[.F33]*[.N33]" table:style-name="ce13">
            <text:p>480,96</text:p>
          </table:table-cell>
          <table:table-cell office:value-type="float" office:value="0" table:formula="of:=[.G33]-[.E33]" table:style-name="ce14">
            <text:p>0<text:s/></text:p>
          </table:table-cell>
          <table:table-cell office:value-type="string" office:string-value="SU003884" table:formula="of:=VLOOKUP([.C33];['file:///D:/Father/Work/2025_05/РАБОЧИЙ%20СТОЛ/16,01,26%20ПОКОМ%20ЗПФ%20Коныгин/(отмена)рассчет%20заказ%20СТВ%20ПГП%20и%20ЗПФ.ods'#Лист1.$C:.$Q];7;0)" table:style-name="ce15">
            <text:p>SU003884</text:p>
          </table:table-cell>
          <table:table-cell office:value-type="string" office:string-value="P004966" table:formula="of:=VLOOKUP([.C33];['file:///D:/Father/Work/2025_05/РАБОЧИЙ%20СТОЛ/16,01,26%20ПОКОМ%20ЗПФ%20Коныгин/(отмена)рассчет%20заказ%20СТВ%20ПГП%20и%20ЗПФ.ods'#Лист1.$C:.$Q];8;0)" table:style-name="ce15">
            <text:p>P004966</text:p>
          </table:table-cell>
          <table:table-cell office:value-type="float" office:value="4301135760" table:formula="of:=VLOOKUP([.C33];['file:///D:/Father/Work/2025_05/РАБОЧИЙ%20СТОЛ/16,01,26%20ПОКОМ%20ЗПФ%20Коныгин/(отмена)рассчет%20заказ%20СТВ%20ПГП%20и%20ЗПФ.ods'#Лист1.$C:.$Q];9;0)" table:style-name="ce15">
            <text:p>4301135760</text:p>
          </table:table-cell>
          <table:table-cell office:value-type="float" office:value="4620207491010" table:formula="of:=VLOOKUP([.C33];['file:///D:/Father/Work/2025_05/РАБОЧИЙ%20СТОЛ/16,01,26%20ПОКОМ%20ЗПФ%20Коныгин/(отмена)рассчет%20заказ%20СТВ%20ПГП%20и%20ЗПФ.ods'#Лист1.$C:.$Q];10;0)" table:style-name="ce15">
            <text:p>4620207491010</text:p>
          </table:table-cell>
          <table:table-cell office:value-type="string" office:string-value="Снеки «Готовые чебупели сочные с мясом» Фикс.вес 0,24 ТМ «Горячая штучка»" table:formula="of:=VLOOKUP([.C33];['file:///D:/Father/Work/2025_05/РАБОЧИЙ%20СТОЛ/16,01,26%20ПОКОМ%20ЗПФ%20Коныгин/(отмена)рассчет%20заказ%20СТВ%20ПГП%20и%20ЗПФ.ods'#Лист1.$C:.$Q];11;0)" table:style-name="ce16">
            <text:p>Снеки «Готовые чебупели сочные с мясом» Фикс.вес 0,24 ТМ «Горячая штучка»</text:p>
          </table:table-cell>
          <table:table-cell office:value-type="float" office:value="0.24" table:formula="of:=VLOOKUP([.C33];['file:///D:/Father/Work/2025_05/РАБОЧИЙ%20СТОЛ/16,01,26%20ПОКОМ%20ЗПФ%20Коныгин/(отмена)рассчет%20заказ%20СТВ%20ПГП%20и%20ЗПФ.ods'#Лист1.$C:.$Q];12;0)" table:style-name="ce17">
            <text:p>0,24</text:p>
          </table:table-cell>
          <table:table-cell office:value-type="float" office:value="12" table:formula="of:=VLOOKUP([.C33];['file:///D:/Father/Work/2025_05/РАБОЧИЙ%20СТОЛ/16,01,26%20ПОКОМ%20ЗПФ%20Коныгин/(отмена)рассчет%20заказ%20СТВ%20ПГП%20и%20ЗПФ.ods'#Лист1.$C:.$Q];13;0)" table:style-name="ce17">
            <text:p>12,00</text:p>
          </table:table-cell>
          <table:table-cell office:value-type="float" office:value="14" table:formula="of:=VLOOKUP([.C33];['file:///D:/Father/Work/2025_05/РАБОЧИЙ%20СТОЛ/16,01,26%20ПОКОМ%20ЗПФ%20Коныгин/(отмена)рассчет%20заказ%20СТВ%20ПГП%20и%20ЗПФ.ods'#Лист1.$C:.$Q];14;0)" table:style-name="ce15">
            <text:p>14</text:p>
          </table:table-cell>
          <table:table-cell office:value-type="float" office:value="70" table:formula="of:=VLOOKUP([.C33];['file:///D:/Father/Work/2025_05/РАБОЧИЙ%20СТОЛ/16,01,26%20ПОКОМ%20ЗПФ%20Коныгин/(отмена)рассчет%20заказ%20СТВ%20ПГП%20и%20ЗПФ.ods'#Лист1.$C:.$Q];15;0)" table:style-name="ce15">
            <text:p>70</text:p>
          </table:table-cell>
          <table:table-cell office:value-type="float" office:value="168" table:formula="of:=MROUND([.F33];[.O33]*[.P33])/[.O33]" table:style-name="ce18">
            <text:p>168</text:p>
          </table:table-cell>
          <table:table-cell office:value-type="float" office:value="2016" table:formula="of:=[.R33]*[.O33]" table:style-name="ce18">
            <text:p>2016</text:p>
          </table:table-cell>
          <table:table-cell table:number-columns-repeated="2" table:style-name="ce1"/>
          <table:table-cell office:value-type="float" office:value="483.84" table:formula="of:=[.S33]*[.N33]" table:style-name="ce19">
            <text:p>483,84</text:p>
          </table:table-cell>
          <table:table-cell office:value-type="float" office:value="2.4" table:formula="of:=[.R33]/[.Q33]" table:style-name="ce19">
            <text:p>2,4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Готовые чебупели сочные с мясом ТМ Горячая штучка ф/п ф/в 0,48 кг XXL НД МГ</text:p>
          </table:table-cell>
          <table:table-cell office:value-type="string" table:style-name="ce2">
            <text:p>40 шт</text:p>
          </table:table-cell>
          <table:table-cell office:value-type="float" office:value="19.2" table:style-name="ce2">
            <text:p>19,2</text:p>
          </table:table-cell>
          <table:table-cell office:value-type="float" office:value="40" table:formula="of:=VALUE(LEFT([.D34];LEN([.D34])-3))" table:style-name="ce13">
            <text:p>40</text:p>
          </table:table-cell>
          <table:table-cell office:value-type="float" office:value="19.2" table:formula="of:=[.F34]*[.N34]" table:style-name="ce13">
            <text:p>19,2</text:p>
          </table:table-cell>
          <table:table-cell office:value-type="float" office:value="0" table:formula="of:=[.G34]-[.E34]" table:style-name="ce14">
            <text:p>0<text:s/></text:p>
          </table:table-cell>
          <table:table-cell office:value-type="string" office:string-value="SU003605" table:formula="of:=VLOOKUP([.C34];['file:///D:/Father/Work/2025_05/РАБОЧИЙ%20СТОЛ/16,01,26%20ПОКОМ%20ЗПФ%20Коныгин/(отмена)рассчет%20заказ%20СТВ%20ПГП%20и%20ЗПФ.ods'#Лист1.$C:.$Q];7;0)" table:style-name="ce15">
            <text:p>SU003605</text:p>
          </table:table-cell>
          <table:table-cell office:value-type="string" office:string-value="P004595" table:formula="of:=VLOOKUP([.C34];['file:///D:/Father/Work/2025_05/РАБОЧИЙ%20СТОЛ/16,01,26%20ПОКОМ%20ЗПФ%20Коныгин/(отмена)рассчет%20заказ%20СТВ%20ПГП%20и%20ЗПФ.ods'#Лист1.$C:.$Q];8;0)" table:style-name="ce15">
            <text:p>P004595</text:p>
          </table:table-cell>
          <table:table-cell office:value-type="float" office:value="4301135571" table:formula="of:=VLOOKUP([.C34];['file:///D:/Father/Work/2025_05/РАБОЧИЙ%20СТОЛ/16,01,26%20ПОКОМ%20ЗПФ%20Коныгин/(отмена)рассчет%20заказ%20СТВ%20ПГП%20и%20ЗПФ.ods'#Лист1.$C:.$Q];9;0)" table:style-name="ce15">
            <text:p>4301135571</text:p>
          </table:table-cell>
          <table:table-cell office:value-type="float" office:value="4607111035028" table:formula="of:=VLOOKUP([.C34];['file:///D:/Father/Work/2025_05/РАБОЧИЙ%20СТОЛ/16,01,26%20ПОКОМ%20ЗПФ%20Коныгин/(отмена)рассчет%20заказ%20СТВ%20ПГП%20и%20ЗПФ.ods'#Лист1.$C:.$Q];10;0)" table:style-name="ce15">
            <text:p>4607111035028</text:p>
          </table:table-cell>
          <table:table-cell office:value-type="string" office:string-value="Снеки «Готовые чебупели сочные с мясом» Фикс.вес 0,48 ТМ «Горячая штучка»" table:formula="of:=VLOOKUP([.C34];['file:///D:/Father/Work/2025_05/РАБОЧИЙ%20СТОЛ/16,01,26%20ПОКОМ%20ЗПФ%20Коныгин/(отмена)рассчет%20заказ%20СТВ%20ПГП%20и%20ЗПФ.ods'#Лист1.$C:.$Q];11;0)" table:style-name="ce16">
            <text:p>Снеки «Готовые чебупели сочные с мясом» Фикс.вес 0,48 ТМ «Горячая штучка»</text:p>
          </table:table-cell>
          <table:table-cell office:value-type="float" office:value="0.48" table:formula="of:=VLOOKUP([.C34];['file:///D:/Father/Work/2025_05/РАБОЧИЙ%20СТОЛ/16,01,26%20ПОКОМ%20ЗПФ%20Коныгин/(отмена)рассчет%20заказ%20СТВ%20ПГП%20и%20ЗПФ.ods'#Лист1.$C:.$Q];12;0)" table:style-name="ce17">
            <text:p>0,48</text:p>
          </table:table-cell>
          <table:table-cell office:value-type="float" office:value="8" table:formula="of:=VLOOKUP([.C34];['file:///D:/Father/Work/2025_05/РАБОЧИЙ%20СТОЛ/16,01,26%20ПОКОМ%20ЗПФ%20Коныгин/(отмена)рассчет%20заказ%20СТВ%20ПГП%20и%20ЗПФ.ods'#Лист1.$C:.$Q];13;0)" table:style-name="ce17">
            <text:p>8,00</text:p>
          </table:table-cell>
          <table:table-cell office:value-type="float" office:value="14" table:formula="of:=VLOOKUP([.C34];['file:///D:/Father/Work/2025_05/РАБОЧИЙ%20СТОЛ/16,01,26%20ПОКОМ%20ЗПФ%20Коныгин/(отмена)рассчет%20заказ%20СТВ%20ПГП%20и%20ЗПФ.ods'#Лист1.$C:.$Q];14;0)" table:style-name="ce15">
            <text:p>14</text:p>
          </table:table-cell>
          <table:table-cell office:value-type="float" office:value="70" table:formula="of:=VLOOKUP([.C34];['file:///D:/Father/Work/2025_05/РАБОЧИЙ%20СТОЛ/16,01,26%20ПОКОМ%20ЗПФ%20Коныгин/(отмена)рассчет%20заказ%20СТВ%20ПГП%20и%20ЗПФ.ods'#Лист1.$C:.$Q];15;0)" table:style-name="ce15">
            <text:p>70</text:p>
          </table:table-cell>
          <table:table-cell office:value-type="float" office:value="0" table:formula="of:=MROUND([.F34];[.O34]*[.P34])/[.O34]" table:style-name="ce20">
            <text:p>0</text:p>
          </table:table-cell>
          <table:table-cell office:value-type="float" office:value="0" table:formula="of:=[.R34]*[.O34]" table:style-name="ce20">
            <text:p>0</text:p>
          </table:table-cell>
          <table:table-cell office:value-type="float" office:value="112" table:formula="of:=[.O34]*[.P34]" table:style-name="ce21">
            <text:p>112</text:p>
          </table:table-cell>
          <table:table-cell office:value-type="string" table:style-name="ce21">
            <text:p>кратность</text:p>
          </table:table-cell>
          <table:table-cell office:value-type="float" office:value="0" table:formula="of:=[.S34]*[.N34]" table:style-name="ce22">
            <text:p>0,00</text:p>
          </table:table-cell>
          <table:table-cell office:value-type="float" office:value="0" table:formula="of:=[.R34]/[.Q34]" table:style-name="ce22">
            <text:p>0,0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ЖАР-ладушки с мясом ТМ Стародворье ф/в 0,2 кг МГ</text:p>
          </table:table-cell>
          <table:table-cell office:value-type="string" table:style-name="ce2">
            <text:p>360 шт</text:p>
          </table:table-cell>
          <table:table-cell office:value-type="float" office:value="72" table:style-name="ce2">
            <text:p>72</text:p>
          </table:table-cell>
          <table:table-cell office:value-type="float" office:value="360" table:formula="of:=VALUE(LEFT([.D35];LEN([.D35])-3))" table:style-name="ce13">
            <text:p>360</text:p>
          </table:table-cell>
          <table:table-cell office:value-type="float" office:value="72" table:formula="of:=[.F35]*[.N35]" table:style-name="ce13">
            <text:p>72</text:p>
          </table:table-cell>
          <table:table-cell office:value-type="float" office:value="0" table:formula="of:=[.G35]-[.E35]" table:style-name="ce14">
            <text:p>0<text:s/></text:p>
          </table:table-cell>
          <table:table-cell office:value-type="string" office:string-value="SU003963" table:formula="of:=VLOOKUP([.C35];['file:///D:/Father/Work/2025_05/РАБОЧИЙ%20СТОЛ/16,01,26%20ПОКОМ%20ЗПФ%20Коныгин/(отмена)рассчет%20заказ%20СТВ%20ПГП%20и%20ЗПФ.ods'#Лист1.$C:.$Q];7;0)" table:style-name="ce15">
            <text:p>SU003963</text:p>
          </table:table-cell>
          <table:table-cell office:value-type="string" office:string-value="P005095" table:formula="of:=VLOOKUP([.C35];['file:///D:/Father/Work/2025_05/РАБОЧИЙ%20СТОЛ/16,01,26%20ПОКОМ%20ЗПФ%20Коныгин/(отмена)рассчет%20заказ%20СТВ%20ПГП%20и%20ЗПФ.ods'#Лист1.$C:.$Q];8;0)" table:style-name="ce15">
            <text:p>P005095</text:p>
          </table:table-cell>
          <table:table-cell office:value-type="float" office:value="4301135829" table:formula="of:=VLOOKUP([.C35];['file:///D:/Father/Work/2025_05/РАБОЧИЙ%20СТОЛ/16,01,26%20ПОКОМ%20ЗПФ%20Коныгин/(отмена)рассчет%20заказ%20СТВ%20ПГП%20и%20ЗПФ.ods'#Лист1.$C:.$Q];9;0)" table:style-name="ce15">
            <text:p>4301135829</text:p>
          </table:table-cell>
          <table:table-cell office:value-type="float" office:value="4620207490235" table:formula="of:=VLOOKUP([.C35];['file:///D:/Father/Work/2025_05/РАБОЧИЙ%20СТОЛ/16,01,26%20ПОКОМ%20ЗПФ%20Коныгин/(отмена)рассчет%20заказ%20СТВ%20ПГП%20и%20ЗПФ.ods'#Лист1.$C:.$Q];10;0)" table:style-name="ce15">
            <text:p>4620207490235</text:p>
          </table:table-cell>
          <table:table-cell office:value-type="string" office:string-value="Снеки «ЖАР-ладушки с мясом» Фикс.вес 0,2 ТМ «Стародворье»" table:formula="of:=VLOOKUP([.C35];['file:///D:/Father/Work/2025_05/РАБОЧИЙ%20СТОЛ/16,01,26%20ПОКОМ%20ЗПФ%20Коныгин/(отмена)рассчет%20заказ%20СТВ%20ПГП%20и%20ЗПФ.ods'#Лист1.$C:.$Q];11;0)" table:style-name="ce16">
            <text:p>Снеки «ЖАР-ладушки с мясом» Фикс.вес 0,2 ТМ «Стародворье»</text:p>
          </table:table-cell>
          <table:table-cell office:value-type="float" office:value="0.2" table:formula="of:=VLOOKUP([.C35];['file:///D:/Father/Work/2025_05/РАБОЧИЙ%20СТОЛ/16,01,26%20ПОКОМ%20ЗПФ%20Коныгин/(отмена)рассчет%20заказ%20СТВ%20ПГП%20и%20ЗПФ.ods'#Лист1.$C:.$Q];12;0)" table:style-name="ce17">
            <text:p>0,20</text:p>
          </table:table-cell>
          <table:table-cell office:value-type="float" office:value="12" table:formula="of:=VLOOKUP([.C35];['file:///D:/Father/Work/2025_05/РАБОЧИЙ%20СТОЛ/16,01,26%20ПОКОМ%20ЗПФ%20Коныгин/(отмена)рассчет%20заказ%20СТВ%20ПГП%20и%20ЗПФ.ods'#Лист1.$C:.$Q];13;0)" table:style-name="ce17">
            <text:p>12,00</text:p>
          </table:table-cell>
          <table:table-cell office:value-type="float" office:value="14" table:formula="of:=VLOOKUP([.C35];['file:///D:/Father/Work/2025_05/РАБОЧИЙ%20СТОЛ/16,01,26%20ПОКОМ%20ЗПФ%20Коныгин/(отмена)рассчет%20заказ%20СТВ%20ПГП%20и%20ЗПФ.ods'#Лист1.$C:.$Q];14;0)" table:style-name="ce15">
            <text:p>14</text:p>
          </table:table-cell>
          <table:table-cell office:value-type="float" office:value="70" table:formula="of:=VLOOKUP([.C35];['file:///D:/Father/Work/2025_05/РАБОЧИЙ%20СТОЛ/16,01,26%20ПОКОМ%20ЗПФ%20Коныгин/(отмена)рассчет%20заказ%20СТВ%20ПГП%20и%20ЗПФ.ods'#Лист1.$C:.$Q];15;0)" table:style-name="ce15">
            <text:p>70</text:p>
          </table:table-cell>
          <table:table-cell office:value-type="float" office:value="28" table:formula="of:=MROUND([.F35];[.O35]*[.P35])/[.O35]" table:style-name="ce18">
            <text:p>28</text:p>
          </table:table-cell>
          <table:table-cell office:value-type="float" office:value="336" table:formula="of:=[.R35]*[.O35]" table:style-name="ce18">
            <text:p>336</text:p>
          </table:table-cell>
          <table:table-cell table:number-columns-repeated="2" table:style-name="ce1"/>
          <table:table-cell office:value-type="float" office:value="67.2" table:formula="of:=[.S35]*[.N35]" table:style-name="ce19">
            <text:p>67,20</text:p>
          </table:table-cell>
          <table:table-cell office:value-type="float" office:value="0.4" table:formula="of:=[.R35]/[.Q35]" table:style-name="ce19">
            <text:p>0,4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Круггетсы с сырным соусом ТМ Горячая штучка ТС Круггетсы ф/п ф/в 0,2 кг ПГП2 МГ</text:p>
          </table:table-cell>
          <table:table-cell office:value-type="string" table:style-name="ce2">
            <text:p>1200 шт</text:p>
          </table:table-cell>
          <table:table-cell office:value-type="float" office:value="240" table:style-name="ce2">
            <text:p>240</text:p>
          </table:table-cell>
          <table:table-cell office:value-type="float" office:value="1200" table:formula="of:=VALUE(LEFT([.D36];LEN([.D36])-3))" table:style-name="ce13">
            <text:p>1200</text:p>
          </table:table-cell>
          <table:table-cell office:value-type="float" office:value="240" table:formula="of:=[.F36]*[.N36]" table:style-name="ce13">
            <text:p>240</text:p>
          </table:table-cell>
          <table:table-cell office:value-type="float" office:value="0" table:formula="of:=[.G36]-[.E36]" table:style-name="ce14">
            <text:p>0<text:s/></text:p>
          </table:table-cell>
          <table:table-cell office:value-type="string" office:string-value="SU003872" table:formula="of:=VLOOKUP([.C36];['file:///D:/Father/Work/2025_05/РАБОЧИЙ%20СТОЛ/16,01,26%20ПОКОМ%20ЗПФ%20Коныгин/(отмена)рассчет%20заказ%20СТВ%20ПГП%20и%20ЗПФ.ods'#Лист1.$C:.$Q];7;0)" table:style-name="ce15">
            <text:p>SU003872</text:p>
          </table:table-cell>
          <table:table-cell office:value-type="string" office:string-value="P004956" table:formula="of:=VLOOKUP([.C36];['file:///D:/Father/Work/2025_05/РАБОЧИЙ%20СТОЛ/16,01,26%20ПОКОМ%20ЗПФ%20Коныгин/(отмена)рассчет%20заказ%20СТВ%20ПГП%20и%20ЗПФ.ods'#Лист1.$C:.$Q];8;0)" table:style-name="ce15">
            <text:p>P004956</text:p>
          </table:table-cell>
          <table:table-cell office:value-type="float" office:value="4301135753" table:formula="of:=VLOOKUP([.C36];['file:///D:/Father/Work/2025_05/РАБОЧИЙ%20СТОЛ/16,01,26%20ПОКОМ%20ЗПФ%20Коныгин/(отмена)рассчет%20заказ%20СТВ%20ПГП%20и%20ЗПФ.ods'#Лист1.$C:.$Q];9;0)" table:style-name="ce15">
            <text:p>4301135753</text:p>
          </table:table-cell>
          <table:table-cell office:value-type="float" office:value="4620207490914" table:formula="of:=VLOOKUP([.C36];['file:///D:/Father/Work/2025_05/РАБОЧИЙ%20СТОЛ/16,01,26%20ПОКОМ%20ЗПФ%20Коныгин/(отмена)рассчет%20заказ%20СТВ%20ПГП%20и%20ЗПФ.ods'#Лист1.$C:.$Q];10;0)" table:style-name="ce15">
            <text:p>4620207490914</text:p>
          </table:table-cell>
          <table:table-cell office:value-type="string" office:string-value="Снеки «Круггетсы с сырным соусом» Фикс.вес 0,2 ТМ «Горячая штучка»" table:formula="of:=VLOOKUP([.C36];['file:///D:/Father/Work/2025_05/РАБОЧИЙ%20СТОЛ/16,01,26%20ПОКОМ%20ЗПФ%20Коныгин/(отмена)рассчет%20заказ%20СТВ%20ПГП%20и%20ЗПФ.ods'#Лист1.$C:.$Q];11;0)" table:style-name="ce16">
            <text:p>Снеки «Круггетсы с сырным соусом» Фикс.вес 0,2 ТМ «Горячая штучка»</text:p>
          </table:table-cell>
          <table:table-cell office:value-type="float" office:value="0.2" table:formula="of:=VLOOKUP([.C36];['file:///D:/Father/Work/2025_05/РАБОЧИЙ%20СТОЛ/16,01,26%20ПОКОМ%20ЗПФ%20Коныгин/(отмена)рассчет%20заказ%20СТВ%20ПГП%20и%20ЗПФ.ods'#Лист1.$C:.$Q];12;0)" table:style-name="ce17">
            <text:p>0,20</text:p>
          </table:table-cell>
          <table:table-cell office:value-type="float" office:value="12" table:formula="of:=VLOOKUP([.C36];['file:///D:/Father/Work/2025_05/РАБОЧИЙ%20СТОЛ/16,01,26%20ПОКОМ%20ЗПФ%20Коныгин/(отмена)рассчет%20заказ%20СТВ%20ПГП%20и%20ЗПФ.ods'#Лист1.$C:.$Q];13;0)" table:style-name="ce17">
            <text:p>12,00</text:p>
          </table:table-cell>
          <table:table-cell office:value-type="float" office:value="14" table:formula="of:=VLOOKUP([.C36];['file:///D:/Father/Work/2025_05/РАБОЧИЙ%20СТОЛ/16,01,26%20ПОКОМ%20ЗПФ%20Коныгин/(отмена)рассчет%20заказ%20СТВ%20ПГП%20и%20ЗПФ.ods'#Лист1.$C:.$Q];14;0)" table:style-name="ce15">
            <text:p>14</text:p>
          </table:table-cell>
          <table:table-cell office:value-type="float" office:value="70" table:formula="of:=VLOOKUP([.C36];['file:///D:/Father/Work/2025_05/РАБОЧИЙ%20СТОЛ/16,01,26%20ПОКОМ%20ЗПФ%20Коныгин/(отмена)рассчет%20заказ%20СТВ%20ПГП%20и%20ЗПФ.ods'#Лист1.$C:.$Q];15;0)" table:style-name="ce15">
            <text:p>70</text:p>
          </table:table-cell>
          <table:table-cell office:value-type="float" office:value="98" table:formula="of:=MROUND([.F36];[.O36]*[.P36])/[.O36]" table:style-name="ce18">
            <text:p>98</text:p>
          </table:table-cell>
          <table:table-cell office:value-type="float" office:value="1176" table:formula="of:=[.R36]*[.O36]" table:style-name="ce18">
            <text:p>1176</text:p>
          </table:table-cell>
          <table:table-cell table:number-columns-repeated="2" table:style-name="ce1"/>
          <table:table-cell office:value-type="float" office:value="235.20000000000002" table:formula="of:=[.S36]*[.N36]" table:style-name="ce19">
            <text:p>235,20</text:p>
          </table:table-cell>
          <table:table-cell office:value-type="float" office:value="1.4" table:formula="of:=[.R36]/[.Q36]" table:style-name="ce19">
            <text:p>1,4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Круггетсы сочные ТМ Горячая штучка ТС Круггетсы ф/п ф/в 0,2 кг ПГП2 МГ</text:p>
          </table:table-cell>
          <table:table-cell office:value-type="string" table:style-name="ce2">
            <text:p>1200 шт</text:p>
          </table:table-cell>
          <table:table-cell office:value-type="float" office:value="240" table:style-name="ce2">
            <text:p>240</text:p>
          </table:table-cell>
          <table:table-cell office:value-type="float" office:value="1200" table:formula="of:=VALUE(LEFT([.D37];LEN([.D37])-3))" table:style-name="ce13">
            <text:p>1200</text:p>
          </table:table-cell>
          <table:table-cell office:value-type="float" office:value="240" table:formula="of:=[.F37]*[.N37]" table:style-name="ce13">
            <text:p>240</text:p>
          </table:table-cell>
          <table:table-cell office:value-type="float" office:value="0" table:formula="of:=[.G37]-[.E37]" table:style-name="ce14">
            <text:p>0<text:s/></text:p>
          </table:table-cell>
          <table:table-cell office:value-type="string" office:string-value="SU003870" table:formula="of:=VLOOKUP([.C37];['file:///D:/Father/Work/2025_05/РАБОЧИЙ%20СТОЛ/16,01,26%20ПОКОМ%20ЗПФ%20Коныгин/(отмена)рассчет%20заказ%20СТВ%20ПГП%20и%20ЗПФ.ods'#Лист1.$C:.$Q];7;0)" table:style-name="ce15">
            <text:p>SU003870</text:p>
          </table:table-cell>
          <table:table-cell office:value-type="string" office:string-value="P004953" table:formula="of:=VLOOKUP([.C37];['file:///D:/Father/Work/2025_05/РАБОЧИЙ%20СТОЛ/16,01,26%20ПОКОМ%20ЗПФ%20Коныгин/(отмена)рассчет%20заказ%20СТВ%20ПГП%20и%20ЗПФ.ods'#Лист1.$C:.$Q];8;0)" table:style-name="ce15">
            <text:p>P004953</text:p>
          </table:table-cell>
          <table:table-cell office:value-type="float" office:value="4301135778" table:formula="of:=VLOOKUP([.C37];['file:///D:/Father/Work/2025_05/РАБОЧИЙ%20СТОЛ/16,01,26%20ПОКОМ%20ЗПФ%20Коныгин/(отмена)рассчет%20заказ%20СТВ%20ПГП%20и%20ЗПФ.ods'#Лист1.$C:.$Q];9;0)" table:style-name="ce15">
            <text:p>4301135778</text:p>
          </table:table-cell>
          <table:table-cell office:value-type="float" office:value="4620207490853" table:formula="of:=VLOOKUP([.C37];['file:///D:/Father/Work/2025_05/РАБОЧИЙ%20СТОЛ/16,01,26%20ПОКОМ%20ЗПФ%20Коныгин/(отмена)рассчет%20заказ%20СТВ%20ПГП%20и%20ЗПФ.ods'#Лист1.$C:.$Q];10;0)" table:style-name="ce15">
            <text:p>4620207490853</text:p>
          </table:table-cell>
          <table:table-cell office:value-type="string" office:string-value="Снеки «Круггетсы сочные» Фикс.вес 0,2 ТМ «Горячая штучка»" table:formula="of:=VLOOKUP([.C37];['file:///D:/Father/Work/2025_05/РАБОЧИЙ%20СТОЛ/16,01,26%20ПОКОМ%20ЗПФ%20Коныгин/(отмена)рассчет%20заказ%20СТВ%20ПГП%20и%20ЗПФ.ods'#Лист1.$C:.$Q];11;0)" table:style-name="ce16">
            <text:p>Снеки «Круггетсы сочные» Фикс.вес 0,2 ТМ «Горячая штучка»</text:p>
          </table:table-cell>
          <table:table-cell office:value-type="float" office:value="0.2" table:formula="of:=VLOOKUP([.C37];['file:///D:/Father/Work/2025_05/РАБОЧИЙ%20СТОЛ/16,01,26%20ПОКОМ%20ЗПФ%20Коныгин/(отмена)рассчет%20заказ%20СТВ%20ПГП%20и%20ЗПФ.ods'#Лист1.$C:.$Q];12;0)" table:style-name="ce17">
            <text:p>0,20</text:p>
          </table:table-cell>
          <table:table-cell office:value-type="float" office:value="12" table:formula="of:=VLOOKUP([.C37];['file:///D:/Father/Work/2025_05/РАБОЧИЙ%20СТОЛ/16,01,26%20ПОКОМ%20ЗПФ%20Коныгин/(отмена)рассчет%20заказ%20СТВ%20ПГП%20и%20ЗПФ.ods'#Лист1.$C:.$Q];13;0)" table:style-name="ce17">
            <text:p>12,00</text:p>
          </table:table-cell>
          <table:table-cell office:value-type="float" office:value="14" table:formula="of:=VLOOKUP([.C37];['file:///D:/Father/Work/2025_05/РАБОЧИЙ%20СТОЛ/16,01,26%20ПОКОМ%20ЗПФ%20Коныгин/(отмена)рассчет%20заказ%20СТВ%20ПГП%20и%20ЗПФ.ods'#Лист1.$C:.$Q];14;0)" table:style-name="ce15">
            <text:p>14</text:p>
          </table:table-cell>
          <table:table-cell office:value-type="float" office:value="70" table:formula="of:=VLOOKUP([.C37];['file:///D:/Father/Work/2025_05/РАБОЧИЙ%20СТОЛ/16,01,26%20ПОКОМ%20ЗПФ%20Коныгин/(отмена)рассчет%20заказ%20СТВ%20ПГП%20и%20ЗПФ.ods'#Лист1.$C:.$Q];15;0)" table:style-name="ce15">
            <text:p>70</text:p>
          </table:table-cell>
          <table:table-cell office:value-type="float" office:value="98" table:formula="of:=MROUND([.F37];[.O37]*[.P37])/[.O37]" table:style-name="ce18">
            <text:p>98</text:p>
          </table:table-cell>
          <table:table-cell office:value-type="float" office:value="1176" table:formula="of:=[.R37]*[.O37]" table:style-name="ce18">
            <text:p>1176</text:p>
          </table:table-cell>
          <table:table-cell table:number-columns-repeated="2" table:style-name="ce1"/>
          <table:table-cell office:value-type="float" office:value="235.20000000000002" table:formula="of:=[.S37]*[.N37]" table:style-name="ce19">
            <text:p>235,20</text:p>
          </table:table-cell>
          <table:table-cell office:value-type="float" office:value="1.4" table:formula="of:=[.R37]/[.Q37]" table:style-name="ce19">
            <text:p>1,4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Мини-сосиски в тесте ТМ Зареченские ТС Зареченские продукты вес 3,7 кг ПГП2 МГ</text:p>
          </table:table-cell>
          <table:table-cell office:value-type="string" table:style-name="ce2">
            <text:p>111 кг</text:p>
          </table:table-cell>
          <table:table-cell office:value-type="float" office:value="111" table:style-name="ce2">
            <text:p>111</text:p>
          </table:table-cell>
          <table:table-cell office:value-type="float" office:value="111" table:formula="of:=VALUE(LEFT([.D38];LEN([.D38])-3))" table:style-name="ce13">
            <text:p>111</text:p>
          </table:table-cell>
          <table:table-cell office:value-type="float" office:value="111" table:formula="of:=[.F38]*[.N38]" table:style-name="ce13">
            <text:p>111</text:p>
          </table:table-cell>
          <table:table-cell office:value-type="float" office:value="0" table:formula="of:=[.G38]-[.E38]" table:style-name="ce14">
            <text:p>0<text:s/></text:p>
          </table:table-cell>
          <table:table-cell office:value-type="string" office:string-value="SU003454" table:formula="of:=VLOOKUP([.C38];['file:///D:/Father/Work/2025_05/РАБОЧИЙ%20СТОЛ/16,01,26%20ПОКОМ%20ЗПФ%20Коныгин/(отмена)рассчет%20заказ%20СТВ%20ПГП%20и%20ЗПФ.ods'#Лист1.$C:.$Q];7;0)" table:style-name="ce15">
            <text:p>SU003454</text:p>
          </table:table-cell>
          <table:table-cell office:value-type="string" office:string-value="P004364" table:formula="of:=VLOOKUP([.C38];['file:///D:/Father/Work/2025_05/РАБОЧИЙ%20СТОЛ/16,01,26%20ПОКОМ%20ЗПФ%20Коныгин/(отмена)рассчет%20заказ%20СТВ%20ПГП%20и%20ЗПФ.ods'#Лист1.$C:.$Q];8;0)" table:style-name="ce15">
            <text:p>P004364</text:p>
          </table:table-cell>
          <table:table-cell office:value-type="float" office:value="4301135518" table:formula="of:=VLOOKUP([.C38];['file:///D:/Father/Work/2025_05/РАБОЧИЙ%20СТОЛ/16,01,26%20ПОКОМ%20ЗПФ%20Коныгин/(отмена)рассчет%20заказ%20СТВ%20ПГП%20и%20ЗПФ.ods'#Лист1.$C:.$Q];9;0)" table:style-name="ce15">
            <text:p>4301135518</text:p>
          </table:table-cell>
          <table:table-cell office:value-type="float" office:value="4640242181561" table:formula="of:=VLOOKUP([.C38];['file:///D:/Father/Work/2025_05/РАБОЧИЙ%20СТОЛ/16,01,26%20ПОКОМ%20ЗПФ%20Коныгин/(отмена)рассчет%20заказ%20СТВ%20ПГП%20и%20ЗПФ.ods'#Лист1.$C:.$Q];10;0)" table:style-name="ce15">
            <text:p>4640242181561</text:p>
          </table:table-cell>
          <table:table-cell office:value-type="string" office:string-value="Снеки «Мини-сосиски в тесте» Весовые ТМ «Зареченские» 3,7 кг" table:formula="of:=VLOOKUP([.C38];['file:///D:/Father/Work/2025_05/РАБОЧИЙ%20СТОЛ/16,01,26%20ПОКОМ%20ЗПФ%20Коныгин/(отмена)рассчет%20заказ%20СТВ%20ПГП%20и%20ЗПФ.ods'#Лист1.$C:.$Q];11;0)" table:style-name="ce16">
            <text:p>Снеки «Мини-сосиски в тесте» Весовые ТМ «Зареченские» 3,7 кг</text:p>
          </table:table-cell>
          <table:table-cell office:value-type="float" office:value="1" table:formula="of:=VLOOKUP([.C38];['file:///D:/Father/Work/2025_05/РАБОЧИЙ%20СТОЛ/16,01,26%20ПОКОМ%20ЗПФ%20Коныгин/(отмена)рассчет%20заказ%20СТВ%20ПГП%20и%20ЗПФ.ods'#Лист1.$C:.$Q];12;0)" table:style-name="ce17">
            <text:p>1,00</text:p>
          </table:table-cell>
          <table:table-cell office:value-type="float" office:value="3.7" table:formula="of:=VLOOKUP([.C38];['file:///D:/Father/Work/2025_05/РАБОЧИЙ%20СТОЛ/16,01,26%20ПОКОМ%20ЗПФ%20Коныгин/(отмена)рассчет%20заказ%20СТВ%20ПГП%20и%20ЗПФ.ods'#Лист1.$C:.$Q];13;0)" table:style-name="ce17">
            <text:p>3,70</text:p>
          </table:table-cell>
          <table:table-cell office:value-type="float" office:value="14" table:formula="of:=VLOOKUP([.C38];['file:///D:/Father/Work/2025_05/РАБОЧИЙ%20СТОЛ/16,01,26%20ПОКОМ%20ЗПФ%20Коныгин/(отмена)рассчет%20заказ%20СТВ%20ПГП%20и%20ЗПФ.ods'#Лист1.$C:.$Q];14;0)" table:style-name="ce15">
            <text:p>14</text:p>
          </table:table-cell>
          <table:table-cell office:value-type="float" office:value="126" table:formula="of:=VLOOKUP([.C38];['file:///D:/Father/Work/2025_05/РАБОЧИЙ%20СТОЛ/16,01,26%20ПОКОМ%20ЗПФ%20Коныгин/(отмена)рассчет%20заказ%20СТВ%20ПГП%20и%20ЗПФ.ods'#Лист1.$C:.$Q];15;0)" table:style-name="ce15">
            <text:p>126</text:p>
          </table:table-cell>
          <table:table-cell office:value-type="float" office:value="28" table:formula="of:=MROUND([.F38];[.O38]*[.P38])/[.O38]" table:style-name="ce18">
            <text:p>28</text:p>
          </table:table-cell>
          <table:table-cell office:value-type="float" office:value="103.60000000000001" table:formula="of:=[.R38]*[.O38]" table:style-name="ce18">
            <text:p>103,6</text:p>
          </table:table-cell>
          <table:table-cell table:number-columns-repeated="2" table:style-name="ce1"/>
          <table:table-cell office:value-type="float" office:value="103.60000000000001" table:formula="of:=[.S38]*[.N38]" table:style-name="ce19">
            <text:p>103,60</text:p>
          </table:table-cell>
          <table:table-cell office:value-type="float" office:value="0.22222222222222221" table:formula="of:=[.R38]/[.Q38]" table:style-name="ce19">
            <text:p>0,22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Мини-чебуречки с мясом ТМ Зареченские ТС Зареченские продукты вес 5,5 кг МГ</text:p>
          </table:table-cell>
          <table:table-cell office:value-type="string" table:style-name="ce2">
            <text:p>55 кг</text:p>
          </table:table-cell>
          <table:table-cell office:value-type="float" office:value="55" table:style-name="ce2">
            <text:p>55</text:p>
          </table:table-cell>
          <table:table-cell office:value-type="float" office:value="55" table:formula="of:=VALUE(LEFT([.D39];LEN([.D39])-3))" table:style-name="ce13">
            <text:p>55</text:p>
          </table:table-cell>
          <table:table-cell office:value-type="float" office:value="55" table:formula="of:=[.F39]*[.N39]" table:style-name="ce13">
            <text:p>55</text:p>
          </table:table-cell>
          <table:table-cell office:value-type="float" office:value="0" table:formula="of:=[.G39]-[.E39]" table:style-name="ce14">
            <text:p>0<text:s/></text:p>
          </table:table-cell>
          <table:table-cell office:value-type="string" office:string-value="SU003434" table:formula="of:=VLOOKUP([.C39];['file:///D:/Father/Work/2025_05/РАБОЧИЙ%20СТОЛ/16,01,26%20ПОКОМ%20ЗПФ%20Коныгин/(отмена)рассчет%20заказ%20СТВ%20ПГП%20и%20ЗПФ.ods'#Лист1.$C:.$Q];7;0)" table:style-name="ce15">
            <text:p>SU003434</text:p>
          </table:table-cell>
          <table:table-cell office:value-type="string" office:string-value="P004358" table:formula="of:=VLOOKUP([.C39];['file:///D:/Father/Work/2025_05/РАБОЧИЙ%20СТОЛ/16,01,26%20ПОКОМ%20ЗПФ%20Коныгин/(отмена)рассчет%20заказ%20СТВ%20ПГП%20и%20ЗПФ.ods'#Лист1.$C:.$Q];8;0)" table:style-name="ce15">
            <text:p>P004358</text:p>
          </table:table-cell>
          <table:table-cell office:value-type="float" office:value="4301135374" table:formula="of:=VLOOKUP([.C39];['file:///D:/Father/Work/2025_05/РАБОЧИЙ%20СТОЛ/16,01,26%20ПОКОМ%20ЗПФ%20Коныгин/(отмена)рассчет%20заказ%20СТВ%20ПГП%20и%20ЗПФ.ods'#Лист1.$C:.$Q];9;0)" table:style-name="ce15">
            <text:p>4301135374</text:p>
          </table:table-cell>
          <table:table-cell office:value-type="float" office:value="4640242181424" table:formula="of:=VLOOKUP([.C39];['file:///D:/Father/Work/2025_05/РАБОЧИЙ%20СТОЛ/16,01,26%20ПОКОМ%20ЗПФ%20Коныгин/(отмена)рассчет%20заказ%20СТВ%20ПГП%20и%20ЗПФ.ods'#Лист1.$C:.$Q];10;0)" table:style-name="ce15">
            <text:p>4640242181424</text:p>
          </table:table-cell>
          <table:table-cell office:value-type="string" office:string-value="Снеки «Мини-чебуречки с мясом» Весовой ТМ «Зареченские» 5,5 кг" table:formula="of:=VLOOKUP([.C39];['file:///D:/Father/Work/2025_05/РАБОЧИЙ%20СТОЛ/16,01,26%20ПОКОМ%20ЗПФ%20Коныгин/(отмена)рассчет%20заказ%20СТВ%20ПГП%20и%20ЗПФ.ods'#Лист1.$C:.$Q];11;0)" table:style-name="ce16">
            <text:p>Снеки «Мини-чебуречки с мясом» Весовой ТМ «Зареченские» 5,5 кг</text:p>
          </table:table-cell>
          <table:table-cell office:value-type="float" office:value="1" table:formula="of:=VLOOKUP([.C39];['file:///D:/Father/Work/2025_05/РАБОЧИЙ%20СТОЛ/16,01,26%20ПОКОМ%20ЗПФ%20Коныгин/(отмена)рассчет%20заказ%20СТВ%20ПГП%20и%20ЗПФ.ods'#Лист1.$C:.$Q];12;0)" table:style-name="ce17">
            <text:p>1,00</text:p>
          </table:table-cell>
          <table:table-cell office:value-type="float" office:value="5.5" table:formula="of:=VLOOKUP([.C39];['file:///D:/Father/Work/2025_05/РАБОЧИЙ%20СТОЛ/16,01,26%20ПОКОМ%20ЗПФ%20Коныгин/(отмена)рассчет%20заказ%20СТВ%20ПГП%20и%20ЗПФ.ods'#Лист1.$C:.$Q];13;0)" table:style-name="ce17">
            <text:p>5,50</text:p>
          </table:table-cell>
          <table:table-cell office:value-type="float" office:value="12" table:formula="of:=VLOOKUP([.C39];['file:///D:/Father/Work/2025_05/РАБОЧИЙ%20СТОЛ/16,01,26%20ПОКОМ%20ЗПФ%20Коныгин/(отмена)рассчет%20заказ%20СТВ%20ПГП%20и%20ЗПФ.ods'#Лист1.$C:.$Q];14;0)" table:style-name="ce15">
            <text:p>12</text:p>
          </table:table-cell>
          <table:table-cell office:value-type="float" office:value="84" table:formula="of:=VLOOKUP([.C39];['file:///D:/Father/Work/2025_05/РАБОЧИЙ%20СТОЛ/16,01,26%20ПОКОМ%20ЗПФ%20Коныгин/(отмена)рассчет%20заказ%20СТВ%20ПГП%20и%20ЗПФ.ods'#Лист1.$C:.$Q];15;0)" table:style-name="ce15">
            <text:p>84</text:p>
          </table:table-cell>
          <table:table-cell office:value-type="float" office:value="12" table:formula="of:=MROUND([.F39];[.O39]*[.P39])/[.O39]" table:style-name="ce18">
            <text:p>12</text:p>
          </table:table-cell>
          <table:table-cell office:value-type="float" office:value="66" table:formula="of:=[.R39]*[.O39]" table:style-name="ce18">
            <text:p>66</text:p>
          </table:table-cell>
          <table:table-cell table:number-columns-repeated="2" table:style-name="ce1"/>
          <table:table-cell office:value-type="float" office:value="66" table:formula="of:=[.S39]*[.N39]" table:style-name="ce19">
            <text:p>66,00</text:p>
          </table:table-cell>
          <table:table-cell office:value-type="float" office:value="0.14285714285714285" table:formula="of:=[.R39]/[.Q39]" table:style-name="ce19">
            <text:p>0,14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Мини-шарики с курочкой и сыром ТМ Зареченские ТС Зареченские продукты вес 3 кг МГ</text:p>
          </table:table-cell>
          <table:table-cell office:value-type="string" table:style-name="ce2">
            <text:p>60 кг</text:p>
          </table:table-cell>
          <table:table-cell office:value-type="float" office:value="60" table:style-name="ce2">
            <text:p>60</text:p>
          </table:table-cell>
          <table:table-cell office:value-type="float" office:value="60" table:formula="of:=VALUE(LEFT([.D40];LEN([.D40])-3))" table:style-name="ce13">
            <text:p>60</text:p>
          </table:table-cell>
          <table:table-cell office:value-type="float" office:value="60" table:formula="of:=[.F40]*[.N40]" table:style-name="ce13">
            <text:p>60</text:p>
          </table:table-cell>
          <table:table-cell office:value-type="float" office:value="0" table:formula="of:=[.G40]-[.E40]" table:style-name="ce14">
            <text:p>0<text:s/></text:p>
          </table:table-cell>
          <table:table-cell office:value-type="string" office:string-value="SU003448" table:formula="of:=VLOOKUP([.C40];['file:///D:/Father/Work/2025_05/РАБОЧИЙ%20СТОЛ/16,01,26%20ПОКОМ%20ЗПФ%20Коныгин/(отмена)рассчет%20заказ%20СТВ%20ПГП%20и%20ЗПФ.ods'#Лист1.$C:.$Q];7;0)" table:style-name="ce15">
            <text:p>SU003448</text:p>
          </table:table-cell>
          <table:table-cell office:value-type="string" office:string-value="P004394" table:formula="of:=VLOOKUP([.C40];['file:///D:/Father/Work/2025_05/РАБОЧИЙ%20СТОЛ/16,01,26%20ПОКОМ%20ЗПФ%20Коныгин/(отмена)рассчет%20заказ%20СТВ%20ПГП%20и%20ЗПФ.ods'#Лист1.$C:.$Q];8;0)" table:style-name="ce15">
            <text:p>P004394</text:p>
          </table:table-cell>
          <table:table-cell office:value-type="float" office:value="4301135405" table:formula="of:=VLOOKUP([.C40];['file:///D:/Father/Work/2025_05/РАБОЧИЙ%20СТОЛ/16,01,26%20ПОКОМ%20ЗПФ%20Коныгин/(отмена)рассчет%20заказ%20СТВ%20ПГП%20и%20ЗПФ.ods'#Лист1.$C:.$Q];9;0)" table:style-name="ce15">
            <text:p>4301135405</text:p>
          </table:table-cell>
          <table:table-cell office:value-type="float" office:value="4640242181523" table:formula="of:=VLOOKUP([.C40];['file:///D:/Father/Work/2025_05/РАБОЧИЙ%20СТОЛ/16,01,26%20ПОКОМ%20ЗПФ%20Коныгин/(отмена)рассчет%20заказ%20СТВ%20ПГП%20и%20ЗПФ.ods'#Лист1.$C:.$Q];10;0)" table:style-name="ce15">
            <text:p>4640242181523</text:p>
          </table:table-cell>
          <table:table-cell office:value-type="string" office:string-value="Снеки «Мини-шарики с курочкой и сыром» Весовой ТМ «Зареченские» 3 кг" table:formula="of:=VLOOKUP([.C40];['file:///D:/Father/Work/2025_05/РАБОЧИЙ%20СТОЛ/16,01,26%20ПОКОМ%20ЗПФ%20Коныгин/(отмена)рассчет%20заказ%20СТВ%20ПГП%20и%20ЗПФ.ods'#Лист1.$C:.$Q];11;0)" table:style-name="ce16">
            <text:p>Снеки «Мини-шарики с курочкой и сыром» Весовой ТМ «Зареченские» 3 кг</text:p>
          </table:table-cell>
          <table:table-cell office:value-type="float" office:value="1" table:formula="of:=VLOOKUP([.C40];['file:///D:/Father/Work/2025_05/РАБОЧИЙ%20СТОЛ/16,01,26%20ПОКОМ%20ЗПФ%20Коныгин/(отмена)рассчет%20заказ%20СТВ%20ПГП%20и%20ЗПФ.ods'#Лист1.$C:.$Q];12;0)" table:style-name="ce17">
            <text:p>1,00</text:p>
          </table:table-cell>
          <table:table-cell office:value-type="float" office:value="3" table:formula="of:=VLOOKUP([.C40];['file:///D:/Father/Work/2025_05/РАБОЧИЙ%20СТОЛ/16,01,26%20ПОКОМ%20ЗПФ%20Коныгин/(отмена)рассчет%20заказ%20СТВ%20ПГП%20и%20ЗПФ.ods'#Лист1.$C:.$Q];13;0)" table:style-name="ce17">
            <text:p>3,00</text:p>
          </table:table-cell>
          <table:table-cell office:value-type="float" office:value="14" table:formula="of:=VLOOKUP([.C40];['file:///D:/Father/Work/2025_05/РАБОЧИЙ%20СТОЛ/16,01,26%20ПОКОМ%20ЗПФ%20Коныгин/(отмена)рассчет%20заказ%20СТВ%20ПГП%20и%20ЗПФ.ods'#Лист1.$C:.$Q];14;0)" table:style-name="ce15">
            <text:p>14</text:p>
          </table:table-cell>
          <table:table-cell office:value-type="float" office:value="126" table:formula="of:=VLOOKUP([.C40];['file:///D:/Father/Work/2025_05/РАБОЧИЙ%20СТОЛ/16,01,26%20ПОКОМ%20ЗПФ%20Коныгин/(отмена)рассчет%20заказ%20СТВ%20ПГП%20и%20ЗПФ.ods'#Лист1.$C:.$Q];15;0)" table:style-name="ce15">
            <text:p>126</text:p>
          </table:table-cell>
          <table:table-cell office:value-type="float" office:value="14" table:formula="of:=MROUND([.F40];[.O40]*[.P40])/[.O40]" table:style-name="ce18">
            <text:p>14</text:p>
          </table:table-cell>
          <table:table-cell office:value-type="float" office:value="42" table:formula="of:=[.R40]*[.O40]" table:style-name="ce18">
            <text:p>42</text:p>
          </table:table-cell>
          <table:table-cell table:number-columns-repeated="2" table:style-name="ce1"/>
          <table:table-cell office:value-type="float" office:value="42" table:formula="of:=[.S40]*[.N40]" table:style-name="ce19">
            <text:p>42,00</text:p>
          </table:table-cell>
          <table:table-cell office:value-type="float" office:value="0.1111111111111111" table:formula="of:=[.R40]/[.Q40]" table:style-name="ce19">
            <text:p>0,11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Пекерсы с индейкой в сливочном соусе ТМ Горячая штучка ТС Пекерсы ф/п ф/в 0,25 кг НД4 МГ</text:p>
          </table:table-cell>
          <table:table-cell office:value-type="string" table:style-name="ce2">
            <text:p>180 шт</text:p>
          </table:table-cell>
          <table:table-cell office:value-type="float" office:value="45" table:style-name="ce2">
            <text:p>45</text:p>
          </table:table-cell>
          <table:table-cell office:value-type="float" office:value="180" table:formula="of:=VALUE(LEFT([.D41];LEN([.D41])-3))" table:style-name="ce13">
            <text:p>180</text:p>
          </table:table-cell>
          <table:table-cell office:value-type="float" office:value="45" table:formula="of:=[.F41]*[.N41]" table:style-name="ce13">
            <text:p>45</text:p>
          </table:table-cell>
          <table:table-cell office:value-type="float" office:value="0" table:formula="of:=[.G41]-[.E41]" table:style-name="ce14">
            <text:p>0<text:s/></text:p>
          </table:table-cell>
          <table:table-cell office:value-type="string" office:string-value="SU003596" table:formula="of:=VLOOKUP([.C41];['file:///D:/Father/Work/2025_05/РАБОЧИЙ%20СТОЛ/16,01,26%20ПОКОМ%20ЗПФ%20Коныгин/(отмена)рассчет%20заказ%20СТВ%20ПГП%20и%20ЗПФ.ods'#Лист1.$C:.$Q];7;0)" table:style-name="ce15">
            <text:p>SU003596</text:p>
          </table:table-cell>
          <table:table-cell office:value-type="string" office:string-value="P004594" table:formula="of:=VLOOKUP([.C41];['file:///D:/Father/Work/2025_05/РАБОЧИЙ%20СТОЛ/16,01,26%20ПОКОМ%20ЗПФ%20Коныгин/(отмена)рассчет%20заказ%20СТВ%20ПГП%20и%20ЗПФ.ods'#Лист1.$C:.$Q];8;0)" table:style-name="ce15">
            <text:p>P004594</text:p>
          </table:table-cell>
          <table:table-cell office:value-type="float" office:value="4301135570" table:formula="of:=VLOOKUP([.C41];['file:///D:/Father/Work/2025_05/РАБОЧИЙ%20СТОЛ/16,01,26%20ПОКОМ%20ЗПФ%20Коныгин/(отмена)рассчет%20заказ%20СТВ%20ПГП%20и%20ЗПФ.ods'#Лист1.$C:.$Q];9;0)" table:style-name="ce15">
            <text:p>4301135570</text:p>
          </table:table-cell>
          <table:table-cell office:value-type="float" office:value="4607111035806" table:formula="of:=VLOOKUP([.C41];['file:///D:/Father/Work/2025_05/РАБОЧИЙ%20СТОЛ/16,01,26%20ПОКОМ%20ЗПФ%20Коныгин/(отмена)рассчет%20заказ%20СТВ%20ПГП%20и%20ЗПФ.ods'#Лист1.$C:.$Q];10;0)" table:style-name="ce15">
            <text:p>4607111035806</text:p>
          </table:table-cell>
          <table:table-cell office:value-type="string" office:string-value="Снеки «Пекерсы с индейкой в сливочном соусе» Фикс.вес 0,25 Пакет ТМ «Горячая штучка»" table:formula="of:=VLOOKUP([.C41];['file:///D:/Father/Work/2025_05/РАБОЧИЙ%20СТОЛ/16,01,26%20ПОКОМ%20ЗПФ%20Коныгин/(отмена)рассчет%20заказ%20СТВ%20ПГП%20и%20ЗПФ.ods'#Лист1.$C:.$Q];11;0)" table:style-name="ce16">
            <text:p>Снеки «Пекерсы с индейкой в сливочном соусе» Фикс.вес 0,25 Пакет ТМ «Горячая штучка»</text:p>
          </table:table-cell>
          <table:table-cell office:value-type="float" office:value="0.25" table:formula="of:=VLOOKUP([.C41];['file:///D:/Father/Work/2025_05/РАБОЧИЙ%20СТОЛ/16,01,26%20ПОКОМ%20ЗПФ%20Коныгин/(отмена)рассчет%20заказ%20СТВ%20ПГП%20и%20ЗПФ.ods'#Лист1.$C:.$Q];12;0)" table:style-name="ce17">
            <text:p>0,25</text:p>
          </table:table-cell>
          <table:table-cell office:value-type="float" office:value="12" table:formula="of:=VLOOKUP([.C41];['file:///D:/Father/Work/2025_05/РАБОЧИЙ%20СТОЛ/16,01,26%20ПОКОМ%20ЗПФ%20Коныгин/(отмена)рассчет%20заказ%20СТВ%20ПГП%20и%20ЗПФ.ods'#Лист1.$C:.$Q];13;0)" table:style-name="ce17">
            <text:p>12,00</text:p>
          </table:table-cell>
          <table:table-cell office:value-type="float" office:value="14" table:formula="of:=VLOOKUP([.C41];['file:///D:/Father/Work/2025_05/РАБОЧИЙ%20СТОЛ/16,01,26%20ПОКОМ%20ЗПФ%20Коныгин/(отмена)рассчет%20заказ%20СТВ%20ПГП%20и%20ЗПФ.ods'#Лист1.$C:.$Q];14;0)" table:style-name="ce15">
            <text:p>14</text:p>
          </table:table-cell>
          <table:table-cell office:value-type="float" office:value="70" table:formula="of:=VLOOKUP([.C41];['file:///D:/Father/Work/2025_05/РАБОЧИЙ%20СТОЛ/16,01,26%20ПОКОМ%20ЗПФ%20Коныгин/(отмена)рассчет%20заказ%20СТВ%20ПГП%20и%20ЗПФ.ods'#Лист1.$C:.$Q];15;0)" table:style-name="ce15">
            <text:p>70</text:p>
          </table:table-cell>
          <table:table-cell office:value-type="float" office:value="14" table:formula="of:=MROUND([.F41];[.O41]*[.P41])/[.O41]" table:style-name="ce18">
            <text:p>14</text:p>
          </table:table-cell>
          <table:table-cell office:value-type="float" office:value="168" table:formula="of:=[.R41]*[.O41]" table:style-name="ce18">
            <text:p>168</text:p>
          </table:table-cell>
          <table:table-cell table:number-columns-repeated="2" table:style-name="ce1"/>
          <table:table-cell office:value-type="float" office:value="42" table:formula="of:=[.S41]*[.N41]" table:style-name="ce19">
            <text:p>42,00</text:p>
          </table:table-cell>
          <table:table-cell office:value-type="float" office:value="0.2" table:formula="of:=[.R41]/[.Q41]" table:style-name="ce19">
            <text:p>0,2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Пирожки с мясом ТМ Зареченские ТС Зареченские продукты вес 3,7 кг МГ</text:p>
          </table:table-cell>
          <table:table-cell office:value-type="string" table:style-name="ce2">
            <text:p>111 <text:s/>кг</text:p>
          </table:table-cell>
          <table:table-cell office:value-type="float" office:value="111" table:style-name="ce2">
            <text:p>111</text:p>
          </table:table-cell>
          <table:table-cell office:value-type="float" office:value="111" table:formula="of:=VALUE(LEFT([.D42];LEN([.D42])-3))" table:style-name="ce13">
            <text:p>111</text:p>
          </table:table-cell>
          <table:table-cell office:value-type="float" office:value="111" table:formula="of:=[.F42]*[.N42]" table:style-name="ce13">
            <text:p>111</text:p>
          </table:table-cell>
          <table:table-cell office:value-type="float" office:value="0" table:formula="of:=[.G42]-[.E42]" table:style-name="ce14">
            <text:p>0<text:s/></text:p>
          </table:table-cell>
          <table:table-cell office:value-type="string" office:string-value="SU003439" table:formula="of:=VLOOKUP([.C42];['file:///D:/Father/Work/2025_05/РАБОЧИЙ%20СТОЛ/16,01,26%20ПОКОМ%20ЗПФ%20Коныгин/(отмена)рассчет%20заказ%20СТВ%20ПГП%20и%20ЗПФ.ods'#Лист1.$C:.$Q];7;0)" table:style-name="ce15">
            <text:p>SU003439</text:p>
          </table:table-cell>
          <table:table-cell office:value-type="string" office:string-value="P004359" table:formula="of:=VLOOKUP([.C42];['file:///D:/Father/Work/2025_05/РАБОЧИЙ%20СТОЛ/16,01,26%20ПОКОМ%20ЗПФ%20Коныгин/(отмена)рассчет%20заказ%20СТВ%20ПГП%20и%20ЗПФ.ods'#Лист1.$C:.$Q];8;0)" table:style-name="ce15">
            <text:p>P004359</text:p>
          </table:table-cell>
          <table:table-cell office:value-type="float" office:value="4301135375" table:formula="of:=VLOOKUP([.C42];['file:///D:/Father/Work/2025_05/РАБОЧИЙ%20СТОЛ/16,01,26%20ПОКОМ%20ЗПФ%20Коныгин/(отмена)рассчет%20заказ%20СТВ%20ПГП%20и%20ЗПФ.ods'#Лист1.$C:.$Q];9;0)" table:style-name="ce15">
            <text:p>4301135375</text:p>
          </table:table-cell>
          <table:table-cell office:value-type="float" office:value="4640242181486" table:formula="of:=VLOOKUP([.C42];['file:///D:/Father/Work/2025_05/РАБОЧИЙ%20СТОЛ/16,01,26%20ПОКОМ%20ЗПФ%20Коныгин/(отмена)рассчет%20заказ%20СТВ%20ПГП%20и%20ЗПФ.ods'#Лист1.$C:.$Q];10;0)" table:style-name="ce15">
            <text:p>4640242181486</text:p>
          </table:table-cell>
          <table:table-cell office:value-type="string" office:string-value="«Пирожки с мясом» Весовые ТМ «Зареченские» 3,7 кг" table:formula="of:=VLOOKUP([.C42];['file:///D:/Father/Work/2025_05/РАБОЧИЙ%20СТОЛ/16,01,26%20ПОКОМ%20ЗПФ%20Коныгин/(отмена)рассчет%20заказ%20СТВ%20ПГП%20и%20ЗПФ.ods'#Лист1.$C:.$Q];11;0)" table:style-name="ce16">
            <text:p>«Пирожки с мясом» Весовые ТМ «Зареченские» 3,7 кг</text:p>
          </table:table-cell>
          <table:table-cell office:value-type="float" office:value="1" table:formula="of:=VLOOKUP([.C42];['file:///D:/Father/Work/2025_05/РАБОЧИЙ%20СТОЛ/16,01,26%20ПОКОМ%20ЗПФ%20Коныгин/(отмена)рассчет%20заказ%20СТВ%20ПГП%20и%20ЗПФ.ods'#Лист1.$C:.$Q];12;0)" table:style-name="ce17">
            <text:p>1,00</text:p>
          </table:table-cell>
          <table:table-cell office:value-type="float" office:value="3.7" table:formula="of:=VLOOKUP([.C42];['file:///D:/Father/Work/2025_05/РАБОЧИЙ%20СТОЛ/16,01,26%20ПОКОМ%20ЗПФ%20Коныгин/(отмена)рассчет%20заказ%20СТВ%20ПГП%20и%20ЗПФ.ods'#Лист1.$C:.$Q];13;0)" table:style-name="ce17">
            <text:p>3,70</text:p>
          </table:table-cell>
          <table:table-cell office:value-type="float" office:value="14" table:formula="of:=VLOOKUP([.C42];['file:///D:/Father/Work/2025_05/РАБОЧИЙ%20СТОЛ/16,01,26%20ПОКОМ%20ЗПФ%20Коныгин/(отмена)рассчет%20заказ%20СТВ%20ПГП%20и%20ЗПФ.ods'#Лист1.$C:.$Q];14;0)" table:style-name="ce15">
            <text:p>14</text:p>
          </table:table-cell>
          <table:table-cell office:value-type="float" office:value="126" table:formula="of:=VLOOKUP([.C42];['file:///D:/Father/Work/2025_05/РАБОЧИЙ%20СТОЛ/16,01,26%20ПОКОМ%20ЗПФ%20Коныгин/(отмена)рассчет%20заказ%20СТВ%20ПГП%20и%20ЗПФ.ods'#Лист1.$C:.$Q];15;0)" table:style-name="ce15">
            <text:p>126</text:p>
          </table:table-cell>
          <table:table-cell office:value-type="float" office:value="28" table:formula="of:=MROUND([.F42];[.O42]*[.P42])/[.O42]" table:style-name="ce18">
            <text:p>28</text:p>
          </table:table-cell>
          <table:table-cell office:value-type="float" office:value="103.60000000000001" table:formula="of:=[.R42]*[.O42]" table:style-name="ce18">
            <text:p>103,6</text:p>
          </table:table-cell>
          <table:table-cell table:number-columns-repeated="2" table:style-name="ce1"/>
          <table:table-cell office:value-type="float" office:value="103.60000000000001" table:formula="of:=[.S42]*[.N42]" table:style-name="ce19">
            <text:p>103,60</text:p>
          </table:table-cell>
          <table:table-cell office:value-type="float" office:value="0.22222222222222221" table:formula="of:=[.R42]/[.Q42]" table:style-name="ce19">
            <text:p>0,22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Пирожки с мясом, картофелем и грибами ТМ Зареченские ТС Зареченские продукты вес 3,7 кг МГ</text:p>
          </table:table-cell>
          <table:table-cell office:value-type="string" table:style-name="ce2">
            <text:p>74 кг</text:p>
          </table:table-cell>
          <table:table-cell office:value-type="float" office:value="74" table:style-name="ce2">
            <text:p>74</text:p>
          </table:table-cell>
          <table:table-cell office:value-type="float" office:value="74" table:formula="of:=VALUE(LEFT([.D43];LEN([.D43])-3))" table:style-name="ce13">
            <text:p>74</text:p>
          </table:table-cell>
          <table:table-cell office:value-type="float" office:value="74" table:formula="of:=[.F43]*[.N43]" table:style-name="ce13">
            <text:p>74</text:p>
          </table:table-cell>
          <table:table-cell office:value-type="float" office:value="0" table:formula="of:=[.G43]-[.E43]" table:style-name="ce14">
            <text:p>0<text:s/></text:p>
          </table:table-cell>
          <table:table-cell office:value-type="string" office:string-value="SU003442" table:formula="of:=VLOOKUP([.C43];['file:///D:/Father/Work/2025_05/РАБОЧИЙ%20СТОЛ/16,01,26%20ПОКОМ%20ЗПФ%20Коныгин/(отмена)рассчет%20заказ%20СТВ%20ПГП%20и%20ЗПФ.ods'#Лист1.$C:.$Q];7;0)" table:style-name="ce15">
            <text:p>SU003442</text:p>
          </table:table-cell>
          <table:table-cell office:value-type="string" office:string-value="P004391" table:formula="of:=VLOOKUP([.C43];['file:///D:/Father/Work/2025_05/РАБОЧИЙ%20СТОЛ/16,01,26%20ПОКОМ%20ЗПФ%20Коныгин/(отмена)рассчет%20заказ%20СТВ%20ПГП%20и%20ЗПФ.ods'#Лист1.$C:.$Q];8;0)" table:style-name="ce15">
            <text:p>P004391</text:p>
          </table:table-cell>
          <table:table-cell office:value-type="float" office:value="4301135402" table:formula="of:=VLOOKUP([.C43];['file:///D:/Father/Work/2025_05/РАБОЧИЙ%20СТОЛ/16,01,26%20ПОКОМ%20ЗПФ%20Коныгин/(отмена)рассчет%20заказ%20СТВ%20ПГП%20и%20ЗПФ.ods'#Лист1.$C:.$Q];9;0)" table:style-name="ce15">
            <text:p>4301135402</text:p>
          </table:table-cell>
          <table:table-cell office:value-type="float" office:value="4640242181493" table:formula="of:=VLOOKUP([.C43];['file:///D:/Father/Work/2025_05/РАБОЧИЙ%20СТОЛ/16,01,26%20ПОКОМ%20ЗПФ%20Коныгин/(отмена)рассчет%20заказ%20СТВ%20ПГП%20и%20ЗПФ.ods'#Лист1.$C:.$Q];10;0)" table:style-name="ce15">
            <text:p>4640242181493</text:p>
          </table:table-cell>
          <table:table-cell office:value-type="string" office:string-value="Снеки «Пирожки с мясом, картофелем и грибами» Весовые ТМ «Зареченские» 3,7 кг" table:formula="of:=VLOOKUP([.C43];['file:///D:/Father/Work/2025_05/РАБОЧИЙ%20СТОЛ/16,01,26%20ПОКОМ%20ЗПФ%20Коныгин/(отмена)рассчет%20заказ%20СТВ%20ПГП%20и%20ЗПФ.ods'#Лист1.$C:.$Q];11;0)" table:style-name="ce16">
            <text:p>Снеки «Пирожки с мясом, картофелем и грибами» Весовые ТМ «Зареченские» 3,7 кг</text:p>
          </table:table-cell>
          <table:table-cell office:value-type="float" office:value="1" table:formula="of:=VLOOKUP([.C43];['file:///D:/Father/Work/2025_05/РАБОЧИЙ%20СТОЛ/16,01,26%20ПОКОМ%20ЗПФ%20Коныгин/(отмена)рассчет%20заказ%20СТВ%20ПГП%20и%20ЗПФ.ods'#Лист1.$C:.$Q];12;0)" table:style-name="ce17">
            <text:p>1,00</text:p>
          </table:table-cell>
          <table:table-cell office:value-type="float" office:value="3.7" table:formula="of:=VLOOKUP([.C43];['file:///D:/Father/Work/2025_05/РАБОЧИЙ%20СТОЛ/16,01,26%20ПОКОМ%20ЗПФ%20Коныгин/(отмена)рассчет%20заказ%20СТВ%20ПГП%20и%20ЗПФ.ods'#Лист1.$C:.$Q];13;0)" table:style-name="ce17">
            <text:p>3,70</text:p>
          </table:table-cell>
          <table:table-cell office:value-type="float" office:value="14" table:formula="of:=VLOOKUP([.C43];['file:///D:/Father/Work/2025_05/РАБОЧИЙ%20СТОЛ/16,01,26%20ПОКОМ%20ЗПФ%20Коныгин/(отмена)рассчет%20заказ%20СТВ%20ПГП%20и%20ЗПФ.ods'#Лист1.$C:.$Q];14;0)" table:style-name="ce15">
            <text:p>14</text:p>
          </table:table-cell>
          <table:table-cell office:value-type="float" office:value="126" table:formula="of:=VLOOKUP([.C43];['file:///D:/Father/Work/2025_05/РАБОЧИЙ%20СТОЛ/16,01,26%20ПОКОМ%20ЗПФ%20Коныгин/(отмена)рассчет%20заказ%20СТВ%20ПГП%20и%20ЗПФ.ods'#Лист1.$C:.$Q];15;0)" table:style-name="ce15">
            <text:p>126</text:p>
          </table:table-cell>
          <table:table-cell office:value-type="float" office:value="14" table:formula="of:=MROUND([.F43];[.O43]*[.P43])/[.O43]" table:style-name="ce18">
            <text:p>14</text:p>
          </table:table-cell>
          <table:table-cell office:value-type="float" office:value="51.800000000000004" table:formula="of:=[.R43]*[.O43]" table:style-name="ce18">
            <text:p>51,8</text:p>
          </table:table-cell>
          <table:table-cell table:number-columns-repeated="2" table:style-name="ce1"/>
          <table:table-cell office:value-type="float" office:value="51.800000000000004" table:formula="of:=[.S43]*[.N43]" table:style-name="ce19">
            <text:p>51,80</text:p>
          </table:table-cell>
          <table:table-cell office:value-type="float" office:value="0.1111111111111111" table:formula="of:=[.R43]/[.Q43]" table:style-name="ce19">
            <text:p>0,11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Хотстеры с сыром ТМ Горячая штучка ТС Хотстеры ф/в 0,25 кг ПГП2 МГ</text:p>
          </table:table-cell>
          <table:table-cell office:value-type="string" table:style-name="ce2">
            <text:p>1200 шт</text:p>
          </table:table-cell>
          <table:table-cell office:value-type="float" office:value="300" table:style-name="ce2">
            <text:p>300</text:p>
          </table:table-cell>
          <table:table-cell office:value-type="float" office:value="1200" table:formula="of:=VALUE(LEFT([.D44];LEN([.D44])-3))" table:style-name="ce13">
            <text:p>1200</text:p>
          </table:table-cell>
          <table:table-cell office:value-type="float" office:value="300" table:formula="of:=[.F44]*[.N44]" table:style-name="ce13">
            <text:p>300</text:p>
          </table:table-cell>
          <table:table-cell office:value-type="float" office:value="0" table:formula="of:=[.G44]-[.E44]" table:style-name="ce14">
            <text:p>0<text:s/></text:p>
          </table:table-cell>
          <table:table-cell office:value-type="string" office:string-value="SU003944" table:formula="of:=VLOOKUP([.C44];['file:///D:/Father/Work/2025_05/РАБОЧИЙ%20СТОЛ/16,01,26%20ПОКОМ%20ЗПФ%20Коныгин/(отмена)рассчет%20заказ%20СТВ%20ПГП%20и%20ЗПФ.ods'#Лист1.$C:.$Q];7;0)" table:style-name="ce15">
            <text:p>SU003944</text:p>
          </table:table-cell>
          <table:table-cell office:value-type="string" office:string-value="P005058" table:formula="of:=VLOOKUP([.C44];['file:///D:/Father/Work/2025_05/РАБОЧИЙ%20СТОЛ/16,01,26%20ПОКОМ%20ЗПФ%20Коныгин/(отмена)рассчет%20заказ%20СТВ%20ПГП%20и%20ЗПФ.ods'#Лист1.$C:.$Q];8;0)" table:style-name="ce15">
            <text:p>P005058</text:p>
          </table:table-cell>
          <table:table-cell office:value-type="float" office:value="4301135824" table:formula="of:=VLOOKUP([.C44];['file:///D:/Father/Work/2025_05/РАБОЧИЙ%20СТОЛ/16,01,26%20ПОКОМ%20ЗПФ%20Коныгин/(отмена)рассчет%20заказ%20СТВ%20ПГП%20и%20ЗПФ.ods'#Лист1.$C:.$Q];9;0)" table:style-name="ce15">
            <text:p>4301135824</text:p>
          </table:table-cell>
          <table:table-cell office:value-type="float" office:value="4607111039095" table:formula="of:=VLOOKUP([.C44];['file:///D:/Father/Work/2025_05/РАБОЧИЙ%20СТОЛ/16,01,26%20ПОКОМ%20ЗПФ%20Коныгин/(отмена)рассчет%20заказ%20СТВ%20ПГП%20и%20ЗПФ.ods'#Лист1.$C:.$Q];10;0)" table:style-name="ce15">
            <text:p>4607111039095</text:p>
          </table:table-cell>
          <table:table-cell office:value-type="string" office:string-value="Снеки «Хотстеры с сыром» Фикс.вес 0,25 ТМ «Горячая штучка»" table:formula="of:=VLOOKUP([.C44];['file:///D:/Father/Work/2025_05/РАБОЧИЙ%20СТОЛ/16,01,26%20ПОКОМ%20ЗПФ%20Коныгин/(отмена)рассчет%20заказ%20СТВ%20ПГП%20и%20ЗПФ.ods'#Лист1.$C:.$Q];11;0)" table:style-name="ce16">
            <text:p>Снеки «Хотстеры с сыром» Фикс.вес 0,25 ТМ «Горячая штучка»</text:p>
          </table:table-cell>
          <table:table-cell office:value-type="float" office:value="0.25" table:formula="of:=VLOOKUP([.C44];['file:///D:/Father/Work/2025_05/РАБОЧИЙ%20СТОЛ/16,01,26%20ПОКОМ%20ЗПФ%20Коныгин/(отмена)рассчет%20заказ%20СТВ%20ПГП%20и%20ЗПФ.ods'#Лист1.$C:.$Q];12;0)" table:style-name="ce17">
            <text:p>0,25</text:p>
          </table:table-cell>
          <table:table-cell office:value-type="float" office:value="12" table:formula="of:=VLOOKUP([.C44];['file:///D:/Father/Work/2025_05/РАБОЧИЙ%20СТОЛ/16,01,26%20ПОКОМ%20ЗПФ%20Коныгин/(отмена)рассчет%20заказ%20СТВ%20ПГП%20и%20ЗПФ.ods'#Лист1.$C:.$Q];13;0)" table:style-name="ce17">
            <text:p>12,00</text:p>
          </table:table-cell>
          <table:table-cell office:value-type="float" office:value="14" table:formula="of:=VLOOKUP([.C44];['file:///D:/Father/Work/2025_05/РАБОЧИЙ%20СТОЛ/16,01,26%20ПОКОМ%20ЗПФ%20Коныгин/(отмена)рассчет%20заказ%20СТВ%20ПГП%20и%20ЗПФ.ods'#Лист1.$C:.$Q];14;0)" table:style-name="ce15">
            <text:p>14</text:p>
          </table:table-cell>
          <table:table-cell office:value-type="float" office:value="70" table:formula="of:=VLOOKUP([.C44];['file:///D:/Father/Work/2025_05/РАБОЧИЙ%20СТОЛ/16,01,26%20ПОКОМ%20ЗПФ%20Коныгин/(отмена)рассчет%20заказ%20СТВ%20ПГП%20и%20ЗПФ.ods'#Лист1.$C:.$Q];15;0)" table:style-name="ce15">
            <text:p>70</text:p>
          </table:table-cell>
          <table:table-cell office:value-type="float" office:value="98" table:formula="of:=MROUND([.F44];[.O44]*[.P44])/[.O44]" table:style-name="ce18">
            <text:p>98</text:p>
          </table:table-cell>
          <table:table-cell office:value-type="float" office:value="1176" table:formula="of:=[.R44]*[.O44]" table:style-name="ce18">
            <text:p>1176</text:p>
          </table:table-cell>
          <table:table-cell table:number-columns-repeated="2" table:style-name="ce1"/>
          <table:table-cell office:value-type="float" office:value="294" table:formula="of:=[.S44]*[.N44]" table:style-name="ce19">
            <text:p>294,00</text:p>
          </table:table-cell>
          <table:table-cell office:value-type="float" office:value="1.4" table:formula="of:=[.R44]/[.Q44]" table:style-name="ce19">
            <text:p>1,4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Хотстеры ТМ Горячая штучка ТС Хотстеры ф/п ф/в 0,25 кг НД2 ПГП2 МГ</text:p>
          </table:table-cell>
          <table:table-cell office:value-type="string" table:style-name="ce2">
            <text:p>1200 шт</text:p>
          </table:table-cell>
          <table:table-cell office:value-type="float" office:value="300" table:style-name="ce2">
            <text:p>300</text:p>
          </table:table-cell>
          <table:table-cell office:value-type="float" office:value="1200" table:formula="of:=VALUE(LEFT([.D45];LEN([.D45])-3))" table:style-name="ce13">
            <text:p>1200</text:p>
          </table:table-cell>
          <table:table-cell office:value-type="float" office:value="300" table:formula="of:=[.F45]*[.N45]" table:style-name="ce13">
            <text:p>300</text:p>
          </table:table-cell>
          <table:table-cell office:value-type="float" office:value="0" table:formula="of:=[.G45]-[.E45]" table:style-name="ce14">
            <text:p>0<text:s/></text:p>
          </table:table-cell>
          <table:table-cell office:value-type="string" office:string-value="SU003576" table:formula="of:=VLOOKUP([.C45];['file:///D:/Father/Work/2025_05/РАБОЧИЙ%20СТОЛ/16,01,26%20ПОКОМ%20ЗПФ%20Коныгин/(отмена)рассчет%20заказ%20СТВ%20ПГП%20и%20ЗПФ.ods'#Лист1.$C:.$Q];7;0)" table:style-name="ce15">
            <text:p>SU003576</text:p>
          </table:table-cell>
          <table:table-cell office:value-type="string" office:string-value="P004489" table:formula="of:=VLOOKUP([.C45];['file:///D:/Father/Work/2025_05/РАБОЧИЙ%20СТОЛ/16,01,26%20ПОКОМ%20ЗПФ%20Коныгин/(отмена)рассчет%20заказ%20СТВ%20ПГП%20и%20ЗПФ.ods'#Лист1.$C:.$Q];8;0)" table:style-name="ce15">
            <text:p>P004489</text:p>
          </table:table-cell>
          <table:table-cell office:value-type="float" office:value="4301135550" table:formula="of:=VLOOKUP([.C45];['file:///D:/Father/Work/2025_05/РАБОЧИЙ%20СТОЛ/16,01,26%20ПОКОМ%20ЗПФ%20Коныгин/(отмена)рассчет%20заказ%20СТВ%20ПГП%20и%20ЗПФ.ods'#Лист1.$C:.$Q];9;0)" table:style-name="ce15">
            <text:p>4301135550</text:p>
          </table:table-cell>
          <table:table-cell office:value-type="float" office:value="4607111034199" table:formula="of:=VLOOKUP([.C45];['file:///D:/Father/Work/2025_05/РАБОЧИЙ%20СТОЛ/16,01,26%20ПОКОМ%20ЗПФ%20Коныгин/(отмена)рассчет%20заказ%20СТВ%20ПГП%20и%20ЗПФ.ods'#Лист1.$C:.$Q];10;0)" table:style-name="ce15">
            <text:p>4607111034199</text:p>
          </table:table-cell>
          <table:table-cell office:value-type="string" office:string-value="Снеки «Хотстеры» Фикс.вес 0,25 Пакет ТМ «Горячая штучка»" table:formula="of:=VLOOKUP([.C45];['file:///D:/Father/Work/2025_05/РАБОЧИЙ%20СТОЛ/16,01,26%20ПОКОМ%20ЗПФ%20Коныгин/(отмена)рассчет%20заказ%20СТВ%20ПГП%20и%20ЗПФ.ods'#Лист1.$C:.$Q];11;0)" table:style-name="ce16">
            <text:p>Снеки «Хотстеры» Фикс.вес 0,25 Пакет ТМ «Горячая штучка»</text:p>
          </table:table-cell>
          <table:table-cell office:value-type="float" office:value="0.25" table:formula="of:=VLOOKUP([.C45];['file:///D:/Father/Work/2025_05/РАБОЧИЙ%20СТОЛ/16,01,26%20ПОКОМ%20ЗПФ%20Коныгин/(отмена)рассчет%20заказ%20СТВ%20ПГП%20и%20ЗПФ.ods'#Лист1.$C:.$Q];12;0)" table:style-name="ce17">
            <text:p>0,25</text:p>
          </table:table-cell>
          <table:table-cell office:value-type="float" office:value="12" table:formula="of:=VLOOKUP([.C45];['file:///D:/Father/Work/2025_05/РАБОЧИЙ%20СТОЛ/16,01,26%20ПОКОМ%20ЗПФ%20Коныгин/(отмена)рассчет%20заказ%20СТВ%20ПГП%20и%20ЗПФ.ods'#Лист1.$C:.$Q];13;0)" table:style-name="ce17">
            <text:p>12,00</text:p>
          </table:table-cell>
          <table:table-cell office:value-type="float" office:value="14" table:formula="of:=VLOOKUP([.C45];['file:///D:/Father/Work/2025_05/РАБОЧИЙ%20СТОЛ/16,01,26%20ПОКОМ%20ЗПФ%20Коныгин/(отмена)рассчет%20заказ%20СТВ%20ПГП%20и%20ЗПФ.ods'#Лист1.$C:.$Q];14;0)" table:style-name="ce15">
            <text:p>14</text:p>
          </table:table-cell>
          <table:table-cell office:value-type="float" office:value="70" table:formula="of:=VLOOKUP([.C45];['file:///D:/Father/Work/2025_05/РАБОЧИЙ%20СТОЛ/16,01,26%20ПОКОМ%20ЗПФ%20Коныгин/(отмена)рассчет%20заказ%20СТВ%20ПГП%20и%20ЗПФ.ods'#Лист1.$C:.$Q];15;0)" table:style-name="ce15">
            <text:p>70</text:p>
          </table:table-cell>
          <table:table-cell office:value-type="float" office:value="98" table:formula="of:=MROUND([.F45];[.O45]*[.P45])/[.O45]" table:style-name="ce18">
            <text:p>98</text:p>
          </table:table-cell>
          <table:table-cell office:value-type="float" office:value="1176" table:formula="of:=[.R45]*[.O45]" table:style-name="ce18">
            <text:p>1176</text:p>
          </table:table-cell>
          <table:table-cell table:number-columns-repeated="2" table:style-name="ce1"/>
          <table:table-cell office:value-type="float" office:value="294" table:formula="of:=[.S45]*[.N45]" table:style-name="ce19">
            <text:p>294,00</text:p>
          </table:table-cell>
          <table:table-cell office:value-type="float" office:value="1.4" table:formula="of:=[.R45]/[.Q45]" table:style-name="ce19">
            <text:p>1,4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Чебупели Курочка гриль ТМ Горячая штучка ф/п ф/в 0,3 кг НД МГ</text:p>
          </table:table-cell>
          <table:table-cell office:value-type="string" table:style-name="ce2">
            <text:p>4200 шт</text:p>
          </table:table-cell>
          <table:table-cell office:value-type="float" office:value="1260" table:style-name="ce2">
            <text:p>1260</text:p>
          </table:table-cell>
          <table:table-cell office:value-type="float" office:value="4200" table:formula="of:=VALUE(LEFT([.D46];LEN([.D46])-3))" table:style-name="ce13">
            <text:p>4200</text:p>
          </table:table-cell>
          <table:table-cell office:value-type="float" office:value="1260" table:formula="of:=[.F46]*[.N46]" table:style-name="ce13">
            <text:p>1260</text:p>
          </table:table-cell>
          <table:table-cell office:value-type="float" office:value="0" table:formula="of:=[.G46]-[.E46]" table:style-name="ce14">
            <text:p>0<text:s/></text:p>
          </table:table-cell>
          <table:table-cell office:value-type="string" office:string-value="SU002293" table:formula="of:=VLOOKUP([.C46];['file:///D:/Father/Work/2025_05/РАБОЧИЙ%20СТОЛ/16,01,26%20ПОКОМ%20ЗПФ%20Коныгин/(отмена)рассчет%20заказ%20СТВ%20ПГП%20и%20ЗПФ.ods'#Лист1.$C:.$Q];7;0)" table:style-name="ce15">
            <text:p>SU002293</text:p>
          </table:table-cell>
          <table:table-cell office:value-type="string" office:string-value="P004113" table:formula="of:=VLOOKUP([.C46];['file:///D:/Father/Work/2025_05/РАБОЧИЙ%20СТОЛ/16,01,26%20ПОКОМ%20ЗПФ%20Коныгин/(отмена)рассчет%20заказ%20СТВ%20ПГП%20и%20ЗПФ.ods'#Лист1.$C:.$Q];8;0)" table:style-name="ce15">
            <text:p>P004113</text:p>
          </table:table-cell>
          <table:table-cell office:value-type="float" office:value="4301135285" table:formula="of:=VLOOKUP([.C46];['file:///D:/Father/Work/2025_05/РАБОЧИЙ%20СТОЛ/16,01,26%20ПОКОМ%20ЗПФ%20Коныгин/(отмена)рассчет%20заказ%20СТВ%20ПГП%20и%20ЗПФ.ods'#Лист1.$C:.$Q];9;0)" table:style-name="ce15">
            <text:p>4301135285</text:p>
          </table:table-cell>
          <table:table-cell office:value-type="float" office:value="4607111036407" table:formula="of:=VLOOKUP([.C46];['file:///D:/Father/Work/2025_05/РАБОЧИЙ%20СТОЛ/16,01,26%20ПОКОМ%20ЗПФ%20Коныгин/(отмена)рассчет%20заказ%20СТВ%20ПГП%20и%20ЗПФ.ods'#Лист1.$C:.$Q];10;0)" table:style-name="ce15">
            <text:p>4607111036407</text:p>
          </table:table-cell>
          <table:table-cell office:value-type="string" office:string-value="Чебупели Курочка гриль Базовый ассортимент Фикс.вес 0,3 Пакет Горячая штучка" table:formula="of:=VLOOKUP([.C46];['file:///D:/Father/Work/2025_05/РАБОЧИЙ%20СТОЛ/16,01,26%20ПОКОМ%20ЗПФ%20Коныгин/(отмена)рассчет%20заказ%20СТВ%20ПГП%20и%20ЗПФ.ods'#Лист1.$C:.$Q];11;0)" table:style-name="ce16">
            <text:p>Чебупели Курочка гриль Базовый ассортимент Фикс.вес 0,3 Пакет Горячая штучка</text:p>
          </table:table-cell>
          <table:table-cell office:value-type="float" office:value="0.3" table:formula="of:=VLOOKUP([.C46];['file:///D:/Father/Work/2025_05/РАБОЧИЙ%20СТОЛ/16,01,26%20ПОКОМ%20ЗПФ%20Коныгин/(отмена)рассчет%20заказ%20СТВ%20ПГП%20и%20ЗПФ.ods'#Лист1.$C:.$Q];12;0)" table:style-name="ce17">
            <text:p>0,30</text:p>
          </table:table-cell>
          <table:table-cell office:value-type="float" office:value="14" table:formula="of:=VLOOKUP([.C46];['file:///D:/Father/Work/2025_05/РАБОЧИЙ%20СТОЛ/16,01,26%20ПОКОМ%20ЗПФ%20Коныгин/(отмена)рассчет%20заказ%20СТВ%20ПГП%20и%20ЗПФ.ods'#Лист1.$C:.$Q];13;0)" table:style-name="ce17">
            <text:p>14,00</text:p>
          </table:table-cell>
          <table:table-cell office:value-type="float" office:value="14" table:formula="of:=VLOOKUP([.C46];['file:///D:/Father/Work/2025_05/РАБОЧИЙ%20СТОЛ/16,01,26%20ПОКОМ%20ЗПФ%20Коныгин/(отмена)рассчет%20заказ%20СТВ%20ПГП%20и%20ЗПФ.ods'#Лист1.$C:.$Q];14;0)" table:style-name="ce15">
            <text:p>14</text:p>
          </table:table-cell>
          <table:table-cell office:value-type="float" office:value="70" table:formula="of:=VLOOKUP([.C46];['file:///D:/Father/Work/2025_05/РАБОЧИЙ%20СТОЛ/16,01,26%20ПОКОМ%20ЗПФ%20Коныгин/(отмена)рассчет%20заказ%20СТВ%20ПГП%20и%20ЗПФ.ods'#Лист1.$C:.$Q];15;0)" table:style-name="ce15">
            <text:p>70</text:p>
          </table:table-cell>
          <table:table-cell office:value-type="float" office:value="294" table:formula="of:=MROUND([.F46];[.O46]*[.P46])/[.O46]" table:style-name="ce18">
            <text:p>294</text:p>
          </table:table-cell>
          <table:table-cell office:value-type="float" office:value="4116" table:formula="of:=[.R46]*[.O46]" table:style-name="ce18">
            <text:p>4116</text:p>
          </table:table-cell>
          <table:table-cell table:number-columns-repeated="2" table:style-name="ce1"/>
          <table:table-cell office:value-type="float" office:value="1234.8" table:formula="of:=[.S46]*[.N46]" table:style-name="ce19">
            <text:p>1234,80</text:p>
          </table:table-cell>
          <table:table-cell office:value-type="float" office:value="4.2" table:formula="of:=[.R46]/[.Q46]" table:style-name="ce19">
            <text:p>4,2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Чебупицца курочка по-итальянски ТМ Горячая штучка ТС Чебупицца ф/п ф/в 0,25 кг НД ПГП2 МГ</text:p>
          </table:table-cell>
          <table:table-cell office:value-type="string" table:style-name="ce2">
            <text:p>2400 <text:s/>шт</text:p>
          </table:table-cell>
          <table:table-cell office:value-type="float" office:value="600" table:style-name="ce2">
            <text:p>600</text:p>
          </table:table-cell>
          <table:table-cell office:value-type="float" office:value="2400" table:formula="of:=VALUE(LEFT([.D47];LEN([.D47])-3))" table:style-name="ce13">
            <text:p>2400</text:p>
          </table:table-cell>
          <table:table-cell office:value-type="float" office:value="600" table:formula="of:=[.F47]*[.N47]" table:style-name="ce13">
            <text:p>600</text:p>
          </table:table-cell>
          <table:table-cell office:value-type="float" office:value="0" table:formula="of:=[.G47]-[.E47]" table:style-name="ce14">
            <text:p>0<text:s/></text:p>
          </table:table-cell>
          <table:table-cell office:value-type="string" office:string-value="SU003578" table:formula="of:=VLOOKUP([.C47];['file:///D:/Father/Work/2025_05/РАБОЧИЙ%20СТОЛ/16,01,26%20ПОКОМ%20ЗПФ%20Коныгин/(отмена)рассчет%20заказ%20СТВ%20ПГП%20и%20ЗПФ.ods'#Лист1.$C:.$Q];7;0)" table:style-name="ce15">
            <text:p>SU003578</text:p>
          </table:table-cell>
          <table:table-cell office:value-type="string" office:string-value="P004484" table:formula="of:=VLOOKUP([.C47];['file:///D:/Father/Work/2025_05/РАБОЧИЙ%20СТОЛ/16,01,26%20ПОКОМ%20ЗПФ%20Коныгин/(отмена)рассчет%20заказ%20СТВ%20ПГП%20и%20ЗПФ.ods'#Лист1.$C:.$Q];8;0)" table:style-name="ce15">
            <text:p>P004484</text:p>
          </table:table-cell>
          <table:table-cell office:value-type="float" office:value="4301135555" table:formula="of:=VLOOKUP([.C47];['file:///D:/Father/Work/2025_05/РАБОЧИЙ%20СТОЛ/16,01,26%20ПОКОМ%20ЗПФ%20Коныгин/(отмена)рассчет%20заказ%20СТВ%20ПГП%20и%20ЗПФ.ods'#Лист1.$C:.$Q];9;0)" table:style-name="ce15">
            <text:p>4301135555</text:p>
          </table:table-cell>
          <table:table-cell office:value-type="float" office:value="4607111034014" table:formula="of:=VLOOKUP([.C47];['file:///D:/Father/Work/2025_05/РАБОЧИЙ%20СТОЛ/16,01,26%20ПОКОМ%20ЗПФ%20Коныгин/(отмена)рассчет%20заказ%20СТВ%20ПГП%20и%20ЗПФ.ods'#Лист1.$C:.$Q];10;0)" table:style-name="ce15">
            <text:p>4607111034014</text:p>
          </table:table-cell>
          <table:table-cell office:value-type="string" office:string-value="Снеки «Чебупицца курочка По-итальянски» Фикс.вес 0,25 Пакет ТМ «Горячая штучка»" table:formula="of:=VLOOKUP([.C47];['file:///D:/Father/Work/2025_05/РАБОЧИЙ%20СТОЛ/16,01,26%20ПОКОМ%20ЗПФ%20Коныгин/(отмена)рассчет%20заказ%20СТВ%20ПГП%20и%20ЗПФ.ods'#Лист1.$C:.$Q];11;0)" table:style-name="ce16">
            <text:p>Снеки «Чебупицца курочка По-итальянски» Фикс.вес 0,25 Пакет ТМ «Горячая штучка»</text:p>
          </table:table-cell>
          <table:table-cell office:value-type="float" office:value="0.25" table:formula="of:=VLOOKUP([.C47];['file:///D:/Father/Work/2025_05/РАБОЧИЙ%20СТОЛ/16,01,26%20ПОКОМ%20ЗПФ%20Коныгин/(отмена)рассчет%20заказ%20СТВ%20ПГП%20и%20ЗПФ.ods'#Лист1.$C:.$Q];12;0)" table:style-name="ce17">
            <text:p>0,25</text:p>
          </table:table-cell>
          <table:table-cell office:value-type="float" office:value="12" table:formula="of:=VLOOKUP([.C47];['file:///D:/Father/Work/2025_05/РАБОЧИЙ%20СТОЛ/16,01,26%20ПОКОМ%20ЗПФ%20Коныгин/(отмена)рассчет%20заказ%20СТВ%20ПГП%20и%20ЗПФ.ods'#Лист1.$C:.$Q];13;0)" table:style-name="ce17">
            <text:p>12,00</text:p>
          </table:table-cell>
          <table:table-cell office:value-type="float" office:value="14" table:formula="of:=VLOOKUP([.C47];['file:///D:/Father/Work/2025_05/РАБОЧИЙ%20СТОЛ/16,01,26%20ПОКОМ%20ЗПФ%20Коныгин/(отмена)рассчет%20заказ%20СТВ%20ПГП%20и%20ЗПФ.ods'#Лист1.$C:.$Q];14;0)" table:style-name="ce15">
            <text:p>14</text:p>
          </table:table-cell>
          <table:table-cell office:value-type="float" office:value="70" table:formula="of:=VLOOKUP([.C47];['file:///D:/Father/Work/2025_05/РАБОЧИЙ%20СТОЛ/16,01,26%20ПОКОМ%20ЗПФ%20Коныгин/(отмена)рассчет%20заказ%20СТВ%20ПГП%20и%20ЗПФ.ods'#Лист1.$C:.$Q];15;0)" table:style-name="ce15">
            <text:p>70</text:p>
          </table:table-cell>
          <table:table-cell office:value-type="float" office:value="196" table:formula="of:=MROUND([.F47];[.O47]*[.P47])/[.O47]" table:style-name="ce18">
            <text:p>196</text:p>
          </table:table-cell>
          <table:table-cell office:value-type="float" office:value="2352" table:formula="of:=[.R47]*[.O47]" table:style-name="ce18">
            <text:p>2352</text:p>
          </table:table-cell>
          <table:table-cell table:number-columns-repeated="2" table:style-name="ce1"/>
          <table:table-cell office:value-type="float" office:value="588" table:formula="of:=[.S47]*[.N47]" table:style-name="ce19">
            <text:p>588,00</text:p>
          </table:table-cell>
          <table:table-cell office:value-type="float" office:value="2.8" table:formula="of:=[.R47]/[.Q47]" table:style-name="ce19">
            <text:p>2,8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Чебупицца Пепперони ТМ Горячая штучка ТС Чебупицца ф/п ф/в 0,25 кг НД МГ</text:p>
          </table:table-cell>
          <table:table-cell office:value-type="string" table:style-name="ce2">
            <text:p>2760 <text:s/>шт</text:p>
          </table:table-cell>
          <table:table-cell office:value-type="float" office:value="690" table:style-name="ce2">
            <text:p>690</text:p>
          </table:table-cell>
          <table:table-cell office:value-type="float" office:value="2760" table:formula="of:=VALUE(LEFT([.D48];LEN([.D48])-3))" table:style-name="ce13">
            <text:p>2760</text:p>
          </table:table-cell>
          <table:table-cell office:value-type="float" office:value="690" table:formula="of:=[.F48]*[.N48]" table:style-name="ce13">
            <text:p>690</text:p>
          </table:table-cell>
          <table:table-cell office:value-type="float" office:value="0" table:formula="of:=[.G48]-[.E48]" table:style-name="ce14">
            <text:p>0<text:s/></text:p>
          </table:table-cell>
          <table:table-cell office:value-type="string" office:string-value="SU003580" table:formula="of:=VLOOKUP([.C48];['file:///D:/Father/Work/2025_05/РАБОЧИЙ%20СТОЛ/16,01,26%20ПОКОМ%20ЗПФ%20Коныгин/(отмена)рассчет%20заказ%20СТВ%20ПГП%20и%20ЗПФ.ods'#Лист1.$C:.$Q];7;0)" table:style-name="ce15">
            <text:p>SU003580</text:p>
          </table:table-cell>
          <table:table-cell office:value-type="string" office:string-value="P004486" table:formula="of:=VLOOKUP([.C48];['file:///D:/Father/Work/2025_05/РАБОЧИЙ%20СТОЛ/16,01,26%20ПОКОМ%20ЗПФ%20Коныгин/(отмена)рассчет%20заказ%20СТВ%20ПГП%20и%20ЗПФ.ods'#Лист1.$C:.$Q];8;0)" table:style-name="ce15">
            <text:p>P004486</text:p>
          </table:table-cell>
          <table:table-cell office:value-type="float" office:value="4301135532" table:formula="of:=VLOOKUP([.C48];['file:///D:/Father/Work/2025_05/РАБОЧИЙ%20СТОЛ/16,01,26%20ПОКОМ%20ЗПФ%20Коныгин/(отмена)рассчет%20заказ%20СТВ%20ПГП%20и%20ЗПФ.ods'#Лист1.$C:.$Q];9;0)" table:style-name="ce15">
            <text:p>4301135532</text:p>
          </table:table-cell>
          <table:table-cell office:value-type="float" office:value="4607111033994" table:formula="of:=VLOOKUP([.C48];['file:///D:/Father/Work/2025_05/РАБОЧИЙ%20СТОЛ/16,01,26%20ПОКОМ%20ЗПФ%20Коныгин/(отмена)рассчет%20заказ%20СТВ%20ПГП%20и%20ЗПФ.ods'#Лист1.$C:.$Q];10;0)" table:style-name="ce15">
            <text:p>4607111033994</text:p>
          </table:table-cell>
          <table:table-cell office:value-type="string" office:string-value="Снеки «Чебупицца Пепперони» Фикс.вес 0,25 Пакет ТМ «Горячая штучка»" table:formula="of:=VLOOKUP([.C48];['file:///D:/Father/Work/2025_05/РАБОЧИЙ%20СТОЛ/16,01,26%20ПОКОМ%20ЗПФ%20Коныгин/(отмена)рассчет%20заказ%20СТВ%20ПГП%20и%20ЗПФ.ods'#Лист1.$C:.$Q];11;0)" table:style-name="ce16">
            <text:p>Снеки «Чебупицца Пепперони» Фикс.вес 0,25 Пакет ТМ «Горячая штучка»</text:p>
          </table:table-cell>
          <table:table-cell office:value-type="float" office:value="0.25" table:formula="of:=VLOOKUP([.C48];['file:///D:/Father/Work/2025_05/РАБОЧИЙ%20СТОЛ/16,01,26%20ПОКОМ%20ЗПФ%20Коныгин/(отмена)рассчет%20заказ%20СТВ%20ПГП%20и%20ЗПФ.ods'#Лист1.$C:.$Q];12;0)" table:style-name="ce17">
            <text:p>0,25</text:p>
          </table:table-cell>
          <table:table-cell office:value-type="float" office:value="12" table:formula="of:=VLOOKUP([.C48];['file:///D:/Father/Work/2025_05/РАБОЧИЙ%20СТОЛ/16,01,26%20ПОКОМ%20ЗПФ%20Коныгин/(отмена)рассчет%20заказ%20СТВ%20ПГП%20и%20ЗПФ.ods'#Лист1.$C:.$Q];13;0)" table:style-name="ce17">
            <text:p>12,00</text:p>
          </table:table-cell>
          <table:table-cell office:value-type="float" office:value="14" table:formula="of:=VLOOKUP([.C48];['file:///D:/Father/Work/2025_05/РАБОЧИЙ%20СТОЛ/16,01,26%20ПОКОМ%20ЗПФ%20Коныгин/(отмена)рассчет%20заказ%20СТВ%20ПГП%20и%20ЗПФ.ods'#Лист1.$C:.$Q];14;0)" table:style-name="ce15">
            <text:p>14</text:p>
          </table:table-cell>
          <table:table-cell office:value-type="float" office:value="70" table:formula="of:=VLOOKUP([.C48];['file:///D:/Father/Work/2025_05/РАБОЧИЙ%20СТОЛ/16,01,26%20ПОКОМ%20ЗПФ%20Коныгин/(отмена)рассчет%20заказ%20СТВ%20ПГП%20и%20ЗПФ.ods'#Лист1.$C:.$Q];15;0)" table:style-name="ce15">
            <text:p>70</text:p>
          </table:table-cell>
          <table:table-cell office:value-type="float" office:value="224" table:formula="of:=MROUND([.F48];[.O48]*[.P48])/[.O48]" table:style-name="ce18">
            <text:p>224</text:p>
          </table:table-cell>
          <table:table-cell office:value-type="float" office:value="2688" table:formula="of:=[.R48]*[.O48]" table:style-name="ce18">
            <text:p>2688</text:p>
          </table:table-cell>
          <table:table-cell table:number-columns-repeated="2" table:style-name="ce1"/>
          <table:table-cell office:value-type="float" office:value="672" table:formula="of:=[.S48]*[.N48]" table:style-name="ce19">
            <text:p>672,00</text:p>
          </table:table-cell>
          <table:table-cell office:value-type="float" office:value="3.2" table:formula="of:=[.R48]/[.Q48]" table:style-name="ce19">
            <text:p>3,2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Чебур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Готовые чебуреки с мясом ТМ Горячая штучка ф/п шт 0,09 кг НД3 ПГП2 МГ</text:p>
          </table:table-cell>
          <table:table-cell office:value-type="string" table:style-name="ce2">
            <text:p>360 шт</text:p>
          </table:table-cell>
          <table:table-cell office:value-type="float" office:value="32.4" table:style-name="ce2">
            <text:p>32,4</text:p>
          </table:table-cell>
          <table:table-cell office:value-type="float" office:value="360" table:formula="of:=VALUE(LEFT([.D49];LEN([.D49])-3))" table:style-name="ce13">
            <text:p>360</text:p>
          </table:table-cell>
          <table:table-cell office:value-type="float" office:value="32.4" table:formula="of:=[.F49]*[.N49]" table:style-name="ce13">
            <text:p>32,4</text:p>
          </table:table-cell>
          <table:table-cell office:value-type="float" office:value="0" table:formula="of:=[.G49]-[.E49]" table:style-name="ce14">
            <text:p>0<text:s/></text:p>
          </table:table-cell>
          <table:table-cell office:value-type="string" office:string-value="SU002573" table:formula="of:=VLOOKUP([.C49];['file:///D:/Father/Work/2025_05/РАБОЧИЙ%20СТОЛ/16,01,26%20ПОКОМ%20ЗПФ%20Коныгин/(отмена)рассчет%20заказ%20СТВ%20ПГП%20и%20ЗПФ.ods'#Лист1.$C:.$Q];7;0)" table:style-name="ce15">
            <text:p>SU002573</text:p>
          </table:table-cell>
          <table:table-cell office:value-type="string" office:string-value="P004138" table:formula="of:=VLOOKUP([.C49];['file:///D:/Father/Work/2025_05/РАБОЧИЙ%20СТОЛ/16,01,26%20ПОКОМ%20ЗПФ%20Коныгин/(отмена)рассчет%20заказ%20СТВ%20ПГП%20и%20ЗПФ.ods'#Лист1.$C:.$Q];8;0)" table:style-name="ce15">
            <text:p>P004138</text:p>
          </table:table-cell>
          <table:table-cell office:value-type="float" office:value="4301136070" table:formula="of:=VLOOKUP([.C49];['file:///D:/Father/Work/2025_05/РАБОЧИЙ%20СТОЛ/16,01,26%20ПОКОМ%20ЗПФ%20Коныгин/(отмена)рассчет%20заказ%20СТВ%20ПГП%20и%20ЗПФ.ods'#Лист1.$C:.$Q];9;0)" table:style-name="ce15">
            <text:p>4301136070</text:p>
          </table:table-cell>
          <table:table-cell office:value-type="float" office:value="4607025784012" table:formula="of:=VLOOKUP([.C49];['file:///D:/Father/Work/2025_05/РАБОЧИЙ%20СТОЛ/16,01,26%20ПОКОМ%20ЗПФ%20Коныгин/(отмена)рассчет%20заказ%20СТВ%20ПГП%20и%20ЗПФ.ods'#Лист1.$C:.$Q];10;0)" table:style-name="ce15">
            <text:p>4607025784012</text:p>
          </table:table-cell>
          <table:table-cell office:value-type="string" office:string-value="Чебуреки с мясом Базовый ассортимент Штучка 0,09 Пленка Горячая штучка" table:formula="of:=VLOOKUP([.C49];['file:///D:/Father/Work/2025_05/РАБОЧИЙ%20СТОЛ/16,01,26%20ПОКОМ%20ЗПФ%20Коныгин/(отмена)рассчет%20заказ%20СТВ%20ПГП%20и%20ЗПФ.ods'#Лист1.$C:.$Q];11;0)" table:style-name="ce16">
            <text:p>Чебуреки с мясом Базовый ассортимент Штучка 0,09 Пленка Горячая штучка</text:p>
          </table:table-cell>
          <table:table-cell office:value-type="float" office:value="0.09" table:formula="of:=VLOOKUP([.C49];['file:///D:/Father/Work/2025_05/РАБОЧИЙ%20СТОЛ/16,01,26%20ПОКОМ%20ЗПФ%20Коныгин/(отмена)рассчет%20заказ%20СТВ%20ПГП%20и%20ЗПФ.ods'#Лист1.$C:.$Q];12;0)" table:style-name="ce17">
            <text:p>0,09</text:p>
          </table:table-cell>
          <table:table-cell office:value-type="float" office:value="24" table:formula="of:=VLOOKUP([.C49];['file:///D:/Father/Work/2025_05/РАБОЧИЙ%20СТОЛ/16,01,26%20ПОКОМ%20ЗПФ%20Коныгин/(отмена)рассчет%20заказ%20СТВ%20ПГП%20и%20ЗПФ.ods'#Лист1.$C:.$Q];13;0)" table:style-name="ce17">
            <text:p>24,00</text:p>
          </table:table-cell>
          <table:table-cell office:value-type="float" office:value="14" table:formula="of:=VLOOKUP([.C49];['file:///D:/Father/Work/2025_05/РАБОЧИЙ%20СТОЛ/16,01,26%20ПОКОМ%20ЗПФ%20Коныгин/(отмена)рассчет%20заказ%20СТВ%20ПГП%20и%20ЗПФ.ods'#Лист1.$C:.$Q];14;0)" table:style-name="ce15">
            <text:p>14</text:p>
          </table:table-cell>
          <table:table-cell office:value-type="float" office:value="126" table:formula="of:=VLOOKUP([.C49];['file:///D:/Father/Work/2025_05/РАБОЧИЙ%20СТОЛ/16,01,26%20ПОКОМ%20ЗПФ%20Коныгин/(отмена)рассчет%20заказ%20СТВ%20ПГП%20и%20ЗПФ.ods'#Лист1.$C:.$Q];15;0)" table:style-name="ce15">
            <text:p>126</text:p>
          </table:table-cell>
          <table:table-cell office:value-type="float" office:value="14" table:formula="of:=MROUND([.F49];[.O49]*[.P49])/[.O49]" table:style-name="ce18">
            <text:p>14</text:p>
          </table:table-cell>
          <table:table-cell office:value-type="float" office:value="336" table:formula="of:=[.R49]*[.O49]" table:style-name="ce18">
            <text:p>336</text:p>
          </table:table-cell>
          <table:table-cell table:number-columns-repeated="2" table:style-name="ce1"/>
          <table:table-cell office:value-type="float" office:value="30.24" table:formula="of:=[.S49]*[.N49]" table:style-name="ce19">
            <text:p>30,24</text:p>
          </table:table-cell>
          <table:table-cell office:value-type="float" office:value="0.1111111111111111" table:formula="of:=[.R49]/[.Q49]" table:style-name="ce19">
            <text:p>0,11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Чебур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Готовые чебуреки со свининой и говядиной ТМ Горячая штучка ф/п ф/в 0,36 кг НД4 ПГП2 МГ</text:p>
          </table:table-cell>
          <table:table-cell office:value-type="string" table:style-name="ce2">
            <text:p>150 шт</text:p>
          </table:table-cell>
          <table:table-cell office:value-type="float" office:value="54" table:style-name="ce2">
            <text:p>54</text:p>
          </table:table-cell>
          <table:table-cell office:value-type="float" office:value="150" table:formula="of:=VALUE(LEFT([.D50];LEN([.D50])-3))" table:style-name="ce13">
            <text:p>150</text:p>
          </table:table-cell>
          <table:table-cell office:value-type="float" office:value="54" table:formula="of:=[.F50]*[.N50]" table:style-name="ce13">
            <text:p>54</text:p>
          </table:table-cell>
          <table:table-cell office:value-type="float" office:value="0" table:formula="of:=[.G50]-[.E50]" table:style-name="ce14">
            <text:p>0<text:s/></text:p>
          </table:table-cell>
          <table:table-cell office:value-type="string" office:string-value="SU003613" table:formula="of:=VLOOKUP([.C50];['file:///D:/Father/Work/2025_05/РАБОЧИЙ%20СТОЛ/16,01,26%20ПОКОМ%20ЗПФ%20Коныгин/(отмена)рассчет%20заказ%20СТВ%20ПГП%20и%20ЗПФ.ods'#Лист1.$C:.$Q];7;0)" table:style-name="ce15">
            <text:p>SU003613</text:p>
          </table:table-cell>
          <table:table-cell office:value-type="string" office:string-value="P004583" table:formula="of:=VLOOKUP([.C50];['file:///D:/Father/Work/2025_05/РАБОЧИЙ%20СТОЛ/16,01,26%20ПОКОМ%20ЗПФ%20Коныгин/(отмена)рассчет%20заказ%20СТВ%20ПГП%20и%20ЗПФ.ods'#Лист1.$C:.$Q];8;0)" table:style-name="ce15">
            <text:p>P004583</text:p>
          </table:table-cell>
          <table:table-cell office:value-type="float" office:value="4301136079" table:formula="of:=VLOOKUP([.C50];['file:///D:/Father/Work/2025_05/РАБОЧИЙ%20СТОЛ/16,01,26%20ПОКОМ%20ЗПФ%20Коныгин/(отмена)рассчет%20заказ%20СТВ%20ПГП%20и%20ЗПФ.ods'#Лист1.$C:.$Q];9;0)" table:style-name="ce15">
            <text:p>4301136079</text:p>
          </table:table-cell>
          <table:table-cell office:value-type="float" office:value="4607025784319" table:formula="of:=VLOOKUP([.C50];['file:///D:/Father/Work/2025_05/РАБОЧИЙ%20СТОЛ/16,01,26%20ПОКОМ%20ЗПФ%20Коныгин/(отмена)рассчет%20заказ%20СТВ%20ПГП%20и%20ЗПФ.ods'#Лист1.$C:.$Q];10;0)" table:style-name="ce15">
            <text:p>4607025784319</text:p>
          </table:table-cell>
          <table:table-cell office:value-type="string" office:string-value="Чебуреки «Чебуреки со свининой и говядиной» Фикс.вес 0,36 Пакет ТМ «Горячая штучка»" table:formula="of:=VLOOKUP([.C50];['file:///D:/Father/Work/2025_05/РАБОЧИЙ%20СТОЛ/16,01,26%20ПОКОМ%20ЗПФ%20Коныгин/(отмена)рассчет%20заказ%20СТВ%20ПГП%20и%20ЗПФ.ods'#Лист1.$C:.$Q];11;0)" table:style-name="ce16">
            <text:p>Чебуреки «Чебуреки со свининой и говядиной» Фикс.вес 0,36 Пакет ТМ «Горячая штучка»</text:p>
          </table:table-cell>
          <table:table-cell office:value-type="float" office:value="0.36" table:formula="of:=VLOOKUP([.C50];['file:///D:/Father/Work/2025_05/РАБОЧИЙ%20СТОЛ/16,01,26%20ПОКОМ%20ЗПФ%20Коныгин/(отмена)рассчет%20заказ%20СТВ%20ПГП%20и%20ЗПФ.ods'#Лист1.$C:.$Q];12;0)" table:style-name="ce17">
            <text:p>0,36</text:p>
          </table:table-cell>
          <table:table-cell office:value-type="float" office:value="10" table:formula="of:=VLOOKUP([.C50];['file:///D:/Father/Work/2025_05/РАБОЧИЙ%20СТОЛ/16,01,26%20ПОКОМ%20ЗПФ%20Коныгин/(отмена)рассчет%20заказ%20СТВ%20ПГП%20и%20ЗПФ.ods'#Лист1.$C:.$Q];13;0)" table:style-name="ce17">
            <text:p>10,00</text:p>
          </table:table-cell>
          <table:table-cell office:value-type="float" office:value="14" table:formula="of:=VLOOKUP([.C50];['file:///D:/Father/Work/2025_05/РАБОЧИЙ%20СТОЛ/16,01,26%20ПОКОМ%20ЗПФ%20Коныгин/(отмена)рассчет%20заказ%20СТВ%20ПГП%20и%20ЗПФ.ods'#Лист1.$C:.$Q];14;0)" table:style-name="ce15">
            <text:p>14</text:p>
          </table:table-cell>
          <table:table-cell office:value-type="float" office:value="70" table:formula="of:=VLOOKUP([.C50];['file:///D:/Father/Work/2025_05/РАБОЧИЙ%20СТОЛ/16,01,26%20ПОКОМ%20ЗПФ%20Коныгин/(отмена)рассчет%20заказ%20СТВ%20ПГП%20и%20ЗПФ.ods'#Лист1.$C:.$Q];15;0)" table:style-name="ce15">
            <text:p>70</text:p>
          </table:table-cell>
          <table:table-cell office:value-type="float" office:value="14" table:formula="of:=MROUND([.F50];[.O50]*[.P50])/[.O50]" table:style-name="ce18">
            <text:p>14</text:p>
          </table:table-cell>
          <table:table-cell office:value-type="float" office:value="140" table:formula="of:=[.R50]*[.O50]" table:style-name="ce18">
            <text:p>140</text:p>
          </table:table-cell>
          <table:table-cell table:number-columns-repeated="2" table:style-name="ce1"/>
          <table:table-cell office:value-type="float" office:value="50.4" table:formula="of:=[.S50]*[.N50]" table:style-name="ce19">
            <text:p>50,40</text:p>
          </table:table-cell>
          <table:table-cell office:value-type="float" office:value="0.2" table:formula="of:=[.R50]/[.Q50]" table:style-name="ce19">
            <text:p>0,2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Чебур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Сочный мегачебурек ТМ Зареченские ТС Зареченские продукты вес 2,24 кг ПГП2 МГ</text:p>
          </table:table-cell>
          <table:table-cell office:value-type="string" table:style-name="ce2">
            <text:p>56 кг</text:p>
          </table:table-cell>
          <table:table-cell office:value-type="float" office:value="56" table:style-name="ce2">
            <text:p>56</text:p>
          </table:table-cell>
          <table:table-cell office:value-type="float" office:value="56" table:formula="of:=VALUE(LEFT([.D51];LEN([.D51])-3))" table:style-name="ce13">
            <text:p>56</text:p>
          </table:table-cell>
          <table:table-cell office:value-type="float" office:value="56" table:formula="of:=[.F51]*[.N51]" table:style-name="ce13">
            <text:p>56</text:p>
          </table:table-cell>
          <table:table-cell office:value-type="float" office:value="0" table:formula="of:=[.G51]-[.E51]" table:style-name="ce14">
            <text:p>0<text:s/></text:p>
          </table:table-cell>
          <table:table-cell office:value-type="string" office:string-value="SU003025" table:formula="of:=VLOOKUP([.C51];['file:///D:/Father/Work/2025_05/РАБОЧИЙ%20СТОЛ/16,01,26%20ПОКОМ%20ЗПФ%20Коныгин/(отмена)рассчет%20заказ%20СТВ%20ПГП%20и%20ЗПФ.ods'#Лист1.$C:.$Q];7;0)" table:style-name="ce15">
            <text:p>SU003025</text:p>
          </table:table-cell>
          <table:table-cell office:value-type="string" office:string-value="P003495" table:formula="of:=VLOOKUP([.C51];['file:///D:/Father/Work/2025_05/РАБОЧИЙ%20СТОЛ/16,01,26%20ПОКОМ%20ЗПФ%20Коныгин/(отмена)рассчет%20заказ%20СТВ%20ПГП%20и%20ЗПФ.ods'#Лист1.$C:.$Q];8;0)" table:style-name="ce15">
            <text:p>P003495</text:p>
          </table:table-cell>
          <table:table-cell office:value-type="float" office:value="4301136052" table:formula="of:=VLOOKUP([.C51];['file:///D:/Father/Work/2025_05/РАБОЧИЙ%20СТОЛ/16,01,26%20ПОКОМ%20ЗПФ%20Коныгин/(отмена)рассчет%20заказ%20СТВ%20ПГП%20и%20ЗПФ.ods'#Лист1.$C:.$Q];9;0)" table:style-name="ce15">
            <text:p>4301136052</text:p>
          </table:table-cell>
          <table:table-cell office:value-type="float" office:value="4640242180410" table:formula="of:=VLOOKUP([.C51];['file:///D:/Father/Work/2025_05/РАБОЧИЙ%20СТОЛ/16,01,26%20ПОКОМ%20ЗПФ%20Коныгин/(отмена)рассчет%20заказ%20СТВ%20ПГП%20и%20ЗПФ.ods'#Лист1.$C:.$Q];10;0)" table:style-name="ce15">
            <text:p>4640242180410</text:p>
          </table:table-cell>
          <table:table-cell office:value-type="string" office:string-value="Чебуреки «Сочный мегачебурек» Весовой ТМ «Зареченские» 2,24 кг" table:formula="of:=VLOOKUP([.C51];['file:///D:/Father/Work/2025_05/РАБОЧИЙ%20СТОЛ/16,01,26%20ПОКОМ%20ЗПФ%20Коныгин/(отмена)рассчет%20заказ%20СТВ%20ПГП%20и%20ЗПФ.ods'#Лист1.$C:.$Q];11;0)" table:style-name="ce16">
            <text:p>Чебуреки «Сочный мегачебурек» Весовой ТМ «Зареченские» 2,24 кг</text:p>
          </table:table-cell>
          <table:table-cell office:value-type="float" office:value="1" table:formula="of:=VLOOKUP([.C51];['file:///D:/Father/Work/2025_05/РАБОЧИЙ%20СТОЛ/16,01,26%20ПОКОМ%20ЗПФ%20Коныгин/(отмена)рассчет%20заказ%20СТВ%20ПГП%20и%20ЗПФ.ods'#Лист1.$C:.$Q];12;0)" table:style-name="ce17">
            <text:p>1,00</text:p>
          </table:table-cell>
          <table:table-cell office:value-type="float" office:value="2.2400000000000002" table:formula="of:=VLOOKUP([.C51];['file:///D:/Father/Work/2025_05/РАБОЧИЙ%20СТОЛ/16,01,26%20ПОКОМ%20ЗПФ%20Коныгин/(отмена)рассчет%20заказ%20СТВ%20ПГП%20и%20ЗПФ.ods'#Лист1.$C:.$Q];13;0)" table:style-name="ce17">
            <text:p>2,24</text:p>
          </table:table-cell>
          <table:table-cell office:value-type="float" office:value="14" table:formula="of:=VLOOKUP([.C51];['file:///D:/Father/Work/2025_05/РАБОЧИЙ%20СТОЛ/16,01,26%20ПОКОМ%20ЗПФ%20Коныгин/(отмена)рассчет%20заказ%20СТВ%20ПГП%20и%20ЗПФ.ods'#Лист1.$C:.$Q];14;0)" table:style-name="ce15">
            <text:p>14</text:p>
          </table:table-cell>
          <table:table-cell office:value-type="float" office:value="126" table:formula="of:=VLOOKUP([.C51];['file:///D:/Father/Work/2025_05/РАБОЧИЙ%20СТОЛ/16,01,26%20ПОКОМ%20ЗПФ%20Коныгин/(отмена)рассчет%20заказ%20СТВ%20ПГП%20и%20ЗПФ.ods'#Лист1.$C:.$Q];15;0)" table:style-name="ce15">
            <text:p>126</text:p>
          </table:table-cell>
          <table:table-cell office:value-type="float" office:value="28" table:formula="of:=MROUND([.F51];[.O51]*[.P51])/[.O51]" table:style-name="ce18">
            <text:p>28</text:p>
          </table:table-cell>
          <table:table-cell office:value-type="float" office:value="62.720000000000006" table:formula="of:=[.R51]*[.O51]" table:style-name="ce18">
            <text:p>62,72</text:p>
          </table:table-cell>
          <table:table-cell table:number-columns-repeated="2" table:style-name="ce1"/>
          <table:table-cell office:value-type="float" office:value="62.720000000000006" table:formula="of:=[.S51]*[.N51]" table:style-name="ce19">
            <text:p>62,72</text:p>
          </table:table-cell>
          <table:table-cell office:value-type="float" office:value="0.22222222222222221" table:formula="of:=[.R51]/[.Q51]" table:style-name="ce19">
            <text:p>0,22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Чебур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Чебуреки Мясные ТМ Зареченские ТС Зареченские продукты вес 2,7 кг ПГП2 МГ</text:p>
          </table:table-cell>
          <table:table-cell office:value-type="string" table:style-name="ce2">
            <text:p>81 кг</text:p>
          </table:table-cell>
          <table:table-cell office:value-type="float" office:value="81" table:style-name="ce2">
            <text:p>81</text:p>
          </table:table-cell>
          <table:table-cell office:value-type="float" office:value="81" table:formula="of:=VALUE(LEFT([.D52];LEN([.D52])-3))" table:style-name="ce13">
            <text:p>81</text:p>
          </table:table-cell>
          <table:table-cell office:value-type="float" office:value="81" table:formula="of:=[.F52]*[.N52]" table:style-name="ce13">
            <text:p>81</text:p>
          </table:table-cell>
          <table:table-cell office:value-type="float" office:value="0" table:formula="of:=[.G52]-[.E52]" table:style-name="ce14">
            <text:p>0<text:s/></text:p>
          </table:table-cell>
          <table:table-cell office:value-type="string" office:string-value="SU003012" table:formula="of:=VLOOKUP([.C52];['file:///D:/Father/Work/2025_05/РАБОЧИЙ%20СТОЛ/16,01,26%20ПОКОМ%20ЗПФ%20Коныгин/(отмена)рассчет%20заказ%20СТВ%20ПГП%20и%20ЗПФ.ods'#Лист1.$C:.$Q];7;0)" table:style-name="ce15">
            <text:p>SU003012</text:p>
          </table:table-cell>
          <table:table-cell office:value-type="string" office:string-value="P003478" table:formula="of:=VLOOKUP([.C52];['file:///D:/Father/Work/2025_05/РАБОЧИЙ%20СТОЛ/16,01,26%20ПОКОМ%20ЗПФ%20Коныгин/(отмена)рассчет%20заказ%20СТВ%20ПГП%20и%20ЗПФ.ods'#Лист1.$C:.$Q];8;0)" table:style-name="ce15">
            <text:p>P003478</text:p>
          </table:table-cell>
          <table:table-cell office:value-type="float" office:value="4301136051" table:formula="of:=VLOOKUP([.C52];['file:///D:/Father/Work/2025_05/РАБОЧИЙ%20СТОЛ/16,01,26%20ПОКОМ%20ЗПФ%20Коныгин/(отмена)рассчет%20заказ%20СТВ%20ПГП%20и%20ЗПФ.ods'#Лист1.$C:.$Q];9;0)" table:style-name="ce15">
            <text:p>4301136051</text:p>
          </table:table-cell>
          <table:table-cell office:value-type="float" office:value="4640242180304" table:formula="of:=VLOOKUP([.C52];['file:///D:/Father/Work/2025_05/РАБОЧИЙ%20СТОЛ/16,01,26%20ПОКОМ%20ЗПФ%20Коныгин/(отмена)рассчет%20заказ%20СТВ%20ПГП%20и%20ЗПФ.ods'#Лист1.$C:.$Q];10;0)" table:style-name="ce15">
            <text:p>4640242180304</text:p>
          </table:table-cell>
          <table:table-cell office:value-type="string" office:string-value="Чебуреки «Мясные» Весовые ТМ «Зареченские» 2,7 кг" table:formula="of:=VLOOKUP([.C52];['file:///D:/Father/Work/2025_05/РАБОЧИЙ%20СТОЛ/16,01,26%20ПОКОМ%20ЗПФ%20Коныгин/(отмена)рассчет%20заказ%20СТВ%20ПГП%20и%20ЗПФ.ods'#Лист1.$C:.$Q];11;0)" table:style-name="ce16">
            <text:p>Чебуреки «Мясные» Весовые ТМ «Зареченские» 2,7 кг</text:p>
          </table:table-cell>
          <table:table-cell office:value-type="float" office:value="1" table:formula="of:=VLOOKUP([.C52];['file:///D:/Father/Work/2025_05/РАБОЧИЙ%20СТОЛ/16,01,26%20ПОКОМ%20ЗПФ%20Коныгин/(отмена)рассчет%20заказ%20СТВ%20ПГП%20и%20ЗПФ.ods'#Лист1.$C:.$Q];12;0)" table:style-name="ce17">
            <text:p>1,00</text:p>
          </table:table-cell>
          <table:table-cell office:value-type="float" office:value="2.7" table:formula="of:=VLOOKUP([.C52];['file:///D:/Father/Work/2025_05/РАБОЧИЙ%20СТОЛ/16,01,26%20ПОКОМ%20ЗПФ%20Коныгин/(отмена)рассчет%20заказ%20СТВ%20ПГП%20и%20ЗПФ.ods'#Лист1.$C:.$Q];13;0)" table:style-name="ce17">
            <text:p>2,70</text:p>
          </table:table-cell>
          <table:table-cell office:value-type="float" office:value="14" table:formula="of:=VLOOKUP([.C52];['file:///D:/Father/Work/2025_05/РАБОЧИЙ%20СТОЛ/16,01,26%20ПОКОМ%20ЗПФ%20Коныгин/(отмена)рассчет%20заказ%20СТВ%20ПГП%20и%20ЗПФ.ods'#Лист1.$C:.$Q];14;0)" table:style-name="ce15">
            <text:p>14</text:p>
          </table:table-cell>
          <table:table-cell office:value-type="float" office:value="126" table:formula="of:=VLOOKUP([.C52];['file:///D:/Father/Work/2025_05/РАБОЧИЙ%20СТОЛ/16,01,26%20ПОКОМ%20ЗПФ%20Коныгин/(отмена)рассчет%20заказ%20СТВ%20ПГП%20и%20ЗПФ.ods'#Лист1.$C:.$Q];15;0)" table:style-name="ce15">
            <text:p>126</text:p>
          </table:table-cell>
          <table:table-cell office:value-type="float" office:value="28" table:formula="of:=MROUND([.F52];[.O52]*[.P52])/[.O52]" table:style-name="ce18">
            <text:p>28</text:p>
          </table:table-cell>
          <table:table-cell office:value-type="float" office:value="75.600000000000009" table:formula="of:=[.R52]*[.O52]" table:style-name="ce18">
            <text:p>75,6</text:p>
          </table:table-cell>
          <table:table-cell table:number-columns-repeated="2" table:style-name="ce1"/>
          <table:table-cell office:value-type="float" office:value="75.600000000000009" table:formula="of:=[.S52]*[.N52]" table:style-name="ce19">
            <text:p>75,60</text:p>
          </table:table-cell>
          <table:table-cell office:value-type="float" office:value="0.22222222222222221" table:formula="of:=[.R52]/[.Q52]" table:style-name="ce19">
            <text:p>0,22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Чебуреки</text:p>
          </table:table-cell>
          <table:table-cell office:value-type="string" table:style-name="ce3">
            <text:p>ПГП</text:p>
          </table:table-cell>
          <table:table-cell office:value-type="string" table:style-name="ce12">
            <text:p>Чебуреки Сочные ТМ Зареченские ТС Зареченские продукты вес 5 кг ПГП2 МГ</text:p>
          </table:table-cell>
          <table:table-cell office:value-type="string" table:style-name="ce2">
            <text:p>120 кг</text:p>
          </table:table-cell>
          <table:table-cell office:value-type="float" office:value="120" table:style-name="ce2">
            <text:p>120</text:p>
          </table:table-cell>
          <table:table-cell office:value-type="float" office:value="120" table:formula="of:=VALUE(LEFT([.D53];LEN([.D53])-3))" table:style-name="ce13">
            <text:p>120</text:p>
          </table:table-cell>
          <table:table-cell office:value-type="float" office:value="120" table:formula="of:=[.F53]*[.N53]" table:style-name="ce13">
            <text:p>120</text:p>
          </table:table-cell>
          <table:table-cell office:value-type="float" office:value="0" table:formula="of:=[.G53]-[.E53]" table:style-name="ce14">
            <text:p>0<text:s/></text:p>
          </table:table-cell>
          <table:table-cell office:value-type="string" office:string-value="SU003010" table:formula="of:=VLOOKUP([.C53];['file:///D:/Father/Work/2025_05/РАБОЧИЙ%20СТОЛ/16,01,26%20ПОКОМ%20ЗПФ%20Коныгин/(отмена)рассчет%20заказ%20СТВ%20ПГП%20и%20ЗПФ.ods'#Лист1.$C:.$Q];7;0)" table:style-name="ce15">
            <text:p>SU003010</text:p>
          </table:table-cell>
          <table:table-cell office:value-type="string" office:string-value="P003476" table:formula="of:=VLOOKUP([.C53];['file:///D:/Father/Work/2025_05/РАБОЧИЙ%20СТОЛ/16,01,26%20ПОКОМ%20ЗПФ%20Коныгин/(отмена)рассчет%20заказ%20СТВ%20ПГП%20и%20ЗПФ.ods'#Лист1.$C:.$Q];8;0)" table:style-name="ce15">
            <text:p>P003476</text:p>
          </table:table-cell>
          <table:table-cell office:value-type="float" office:value="4301136053" table:formula="of:=VLOOKUP([.C53];['file:///D:/Father/Work/2025_05/РАБОЧИЙ%20СТОЛ/16,01,26%20ПОКОМ%20ЗПФ%20Коныгин/(отмена)рассчет%20заказ%20СТВ%20ПГП%20и%20ЗПФ.ods'#Лист1.$C:.$Q];9;0)" table:style-name="ce15">
            <text:p>4301136053</text:p>
          </table:table-cell>
          <table:table-cell office:value-type="float" office:value="4640242180236" table:formula="of:=VLOOKUP([.C53];['file:///D:/Father/Work/2025_05/РАБОЧИЙ%20СТОЛ/16,01,26%20ПОКОМ%20ЗПФ%20Коныгин/(отмена)рассчет%20заказ%20СТВ%20ПГП%20и%20ЗПФ.ods'#Лист1.$C:.$Q];10;0)" table:style-name="ce15">
            <text:p>4640242180236</text:p>
          </table:table-cell>
          <table:table-cell office:value-type="string" office:string-value="Чебуреки «Сочные» Весовые ТМ «Зареченские» 5 кг" table:formula="of:=VLOOKUP([.C53];['file:///D:/Father/Work/2025_05/РАБОЧИЙ%20СТОЛ/16,01,26%20ПОКОМ%20ЗПФ%20Коныгин/(отмена)рассчет%20заказ%20СТВ%20ПГП%20и%20ЗПФ.ods'#Лист1.$C:.$Q];11;0)" table:style-name="ce16">
            <text:p>Чебуреки «Сочные» Весовые ТМ «Зареченские» 5 кг</text:p>
          </table:table-cell>
          <table:table-cell office:value-type="float" office:value="1" table:formula="of:=VLOOKUP([.C53];['file:///D:/Father/Work/2025_05/РАБОЧИЙ%20СТОЛ/16,01,26%20ПОКОМ%20ЗПФ%20Коныгин/(отмена)рассчет%20заказ%20СТВ%20ПГП%20и%20ЗПФ.ods'#Лист1.$C:.$Q];12;0)" table:style-name="ce17">
            <text:p>1,00</text:p>
          </table:table-cell>
          <table:table-cell office:value-type="float" office:value="5" table:formula="of:=VLOOKUP([.C53];['file:///D:/Father/Work/2025_05/РАБОЧИЙ%20СТОЛ/16,01,26%20ПОКОМ%20ЗПФ%20Коныгин/(отмена)рассчет%20заказ%20СТВ%20ПГП%20и%20ЗПФ.ods'#Лист1.$C:.$Q];13;0)" table:style-name="ce17">
            <text:p>5,00</text:p>
          </table:table-cell>
          <table:table-cell office:value-type="float" office:value="12" table:formula="of:=VLOOKUP([.C53];['file:///D:/Father/Work/2025_05/РАБОЧИЙ%20СТОЛ/16,01,26%20ПОКОМ%20ЗПФ%20Коныгин/(отмена)рассчет%20заказ%20СТВ%20ПГП%20и%20ЗПФ.ods'#Лист1.$C:.$Q];14;0)" table:style-name="ce15">
            <text:p>12</text:p>
          </table:table-cell>
          <table:table-cell office:value-type="float" office:value="84" table:formula="of:=VLOOKUP([.C53];['file:///D:/Father/Work/2025_05/РАБОЧИЙ%20СТОЛ/16,01,26%20ПОКОМ%20ЗПФ%20Коныгин/(отмена)рассчет%20заказ%20СТВ%20ПГП%20и%20ЗПФ.ods'#Лист1.$C:.$Q];15;0)" table:style-name="ce15">
            <text:p>84</text:p>
          </table:table-cell>
          <table:table-cell office:value-type="float" office:value="24" table:formula="of:=MROUND([.F53];[.O53]*[.P53])/[.O53]" table:style-name="ce18">
            <text:p>24</text:p>
          </table:table-cell>
          <table:table-cell office:value-type="float" office:value="120" table:formula="of:=[.R53]*[.O53]" table:style-name="ce18">
            <text:p>120</text:p>
          </table:table-cell>
          <table:table-cell table:number-columns-repeated="2" table:style-name="ce1"/>
          <table:table-cell office:value-type="float" office:value="120" table:formula="of:=[.S53]*[.N53]" table:style-name="ce19">
            <text:p>120,00</text:p>
          </table:table-cell>
          <table:table-cell office:value-type="float" office:value="0.2857142857142857" table:formula="of:=[.R53]/[.Q53]" table:style-name="ce19">
            <text:p>0,29</text:p>
          </table:table-cell>
          <table:table-cell table:number-columns-repeated="16361"/>
        </table:table-row>
        <table:table-row table:style-name="ro4">
          <table:table-cell table:number-columns-repeated="2" table:style-name="ce1"/>
          <table:table-cell office:value-type="string" table:style-name="ce12">
            <text:p>итого в кг</text:p>
          </table:table-cell>
          <table:table-cell table:style-name="ce2"/>
          <table:table-cell office:value-type="float" office:value="9135.98" table:formula="of:=SUM([.E2:.E53])" table:style-name="ce2">
            <text:p>9135,98</text:p>
          </table:table-cell>
          <table:table-cell table:number-columns-repeated="2" table:style-name="ce13"/>
          <table:table-cell table:style-name="ce14"/>
          <table:table-cell table:number-columns-repeated="4" table:style-name="ce15"/>
          <table:table-cell table:style-name="ce16"/>
          <table:table-cell table:number-columns-repeated="2" table:style-name="ce17"/>
          <table:table-cell table:number-columns-repeated="2" table:style-name="ce15"/>
          <table:table-cell office:value-type="float" office:value="2412" table:formula="of:=SUM([.R2:.R53])" table:style-name="ce23">
            <text:p>2412,00</text:p>
          </table:table-cell>
          <table:table-cell table:style-name="ce18"/>
          <table:table-cell table:number-columns-repeated="2" table:style-name="ce1"/>
          <table:table-cell office:value-type="float" office:value="8870.64" table:formula="of:=SUM([.V2:.V53])" table:style-name="ce23">
            <text:p>8870,64</text:p>
          </table:table-cell>
          <table:table-cell office:value-type="float" office:value="31.342002442002432" table:formula="of:=SUM([.W2:.W53])" table:style-name="ce23">
            <text:p>31,34</text:p>
          </table:table-cell>
          <table:table-cell table:number-columns-repeated="16361"/>
        </table:table-row>
        <table:table-row table:number-rows-repeated="1048522" table:style-name="ro4">
          <table:table-cell table:number-columns-repeated="16384"/>
        </table:table-row>
      </table:table>
      <table:table table:name="Лист2" table:style-name="ta1">
        <table:table-column table:style-name="co15" table:default-cell-style-name="ce1"/>
        <table:table-column table:style-name="co6" table:number-columns-repeated="1023" table:default-cell-style-name="ce1"/>
        <table:table-column table:style-name="co14" table:number-columns-repeated="15360" table:default-cell-style-name="ce1"/>
        <table:table-row table:number-rows-repeated="1048576" table:style-name="ro5">
          <table:table-cell table:number-columns-repeated="16384"/>
        </table:table-row>
      </table:table>
      <table:table table:name="Лист3" table:style-name="ta1">
        <table:table-column table:style-name="co15" table:default-cell-style-name="ce1"/>
        <table:table-column table:style-name="co6" table:number-columns-repeated="1023" table:default-cell-style-name="ce1"/>
        <table:table-column table:style-name="co14" table:number-columns-repeated="15360" table:default-cell-style-name="ce1"/>
        <table:table-row table:number-rows-repeated="1048576" table:style-name="ro5">
          <table:table-cell table:number-columns-repeated="16384"/>
        </table:table-row>
      </table:table>
      <table:table table:name="'file:///D:/Father/Work/2025_05/РАБОЧИЙ%20СТОЛ/16,01,26%20ПОКОМ%20ЗПФ%20Коныгин/(отмена)рассчет%20заказ%20СТВ%20ПГП%20и%20ЗПФ.ods'#Лист1" table:style-name="ta2">
        <table:table-source xlink:href="file:///D:/Father/Work/2025_05/РАБОЧИЙ%20СТОЛ/16,01,26%20ПОКОМ%20ЗПФ%20Коныгин/(отмена)рассчет%20заказ%20СТВ%20ПГП%20и%20ЗПФ.ods" table:table-name="Лист1" table:mode="copy-results-only"/>
        <table:table-column/>
        <table:table-row>
          <table:table-cell table:number-columns-repeated="2"/>
          <table:table-cell office:value-type="string" office:string-value="Номенклатура"/>
          <table:table-cell office:value-type="string" office:string-value="заказ в шт/кг"/>
          <table:table-cell office:value-type="string" office:string-value="общий вес в кг"/>
          <table:table-cell office:value-type="string" office:string-value="ЗАКАЗ"/>
          <table:table-cell office:value-type="string" office:string-value="ВЕС"/>
          <table:table-cell office:value-type="string" office:string-value="Разность вес"/>
          <table:table-cell office:value-type="string" office:string-value="Код единицы продаж"/>
          <table:table-cell office:value-type="string" office:string-value="Код продукта"/>
          <table:table-cell office:value-type="string" office:string-value="Номер варианта"/>
          <table:table-cell office:value-type="string" office:string-value="Штрих-код "/>
          <table:table-cell office:value-type="string" office:string-value="Наименование"/>
          <table:table-cell office:value-type="string" office:string-value="Вес нетто штуки, кг"/>
          <table:table-cell office:value-type="string" office:string-value="Кол-во штук в коробе, шт"/>
          <table:table-cell office:value-type="string" office:string-value="Коробов в слое"/>
          <table:table-cell office:value-type="string" office:string-value="Кол-во кор. на паллте, шт"/>
          <table:table-cell table:number-columns-repeated="16367"/>
        </table:table-row>
        <table:table-row>
          <table:table-cell table:number-columns-repeated="2"/>
          <table:table-cell office:value-type="string" office:string-value="Хрустящие крылышки острые к пиву ТМ Горячая штучка ф/п ф/в 0,3 кг НД9 ПГП2 МГ"/>
          <table:table-cell office:value-type="string" office:string-value="420 шт"/>
          <table:table-cell office:value-type="float" office:value="126"/>
          <table:table-cell office:value-type="float" office:value="420"/>
          <table:table-cell office:value-type="float" office:value="126"/>
          <table:table-cell office:value-type="float" office:value="0"/>
          <table:table-cell office:value-type="string" office:string-value="SU003607"/>
          <table:table-cell office:value-type="string" office:string-value="P004589"/>
          <table:table-cell office:value-type="float" office:value="4301131046"/>
          <table:table-cell office:value-type="float" office:value="4607111034137"/>
          <table:table-cell office:value-type="string" office:string-value="Крылья «Крылышки острые к пиву» Фикс.вес 0,3 Пакет ТМ «Горячая штучка»"/>
          <table:table-cell office:value-type="float" office:value="0.3"/>
          <table:table-cell office:value-type="float" office:value="12"/>
          <table:table-cell office:value-type="float" office:value="14"/>
          <table:table-cell office:value-type="float" office:value="70"/>
          <table:table-cell table:number-columns-repeated="16367"/>
        </table:table-row>
        <table:table-row>
          <table:table-cell table:number-columns-repeated="2"/>
          <table:table-cell office:value-type="string" office:string-value="Хрустящие крылышки ТМ Горячая штучка ф/п ф/в 0,3 кг НД6 ПГП2 МГ"/>
          <table:table-cell office:value-type="string" office:string-value="390 шт"/>
          <table:table-cell office:value-type="float" office:value="117"/>
          <table:table-cell office:value-type="float" office:value="390"/>
          <table:table-cell office:value-type="float" office:value="117"/>
          <table:table-cell office:value-type="float" office:value="0"/>
          <table:table-cell office:value-type="string" office:string-value="SU003591"/>
          <table:table-cell office:value-type="string" office:string-value="P004588"/>
          <table:table-cell office:value-type="float" office:value="4301131047"/>
          <table:table-cell office:value-type="float" office:value="4607111034120"/>
          <table:table-cell office:value-type="string" office:string-value="Крылья «Хрустящие крылышки» Фикс.вес 0,3 Пакет ТМ «Горячая штучка»"/>
          <table:table-cell office:value-type="float" office:value="0.3"/>
          <table:table-cell office:value-type="float" office:value="12"/>
          <table:table-cell office:value-type="float" office:value="14"/>
          <table:table-cell office:value-type="float" office:value="70"/>
          <table:table-cell table:number-columns-repeated="16367"/>
        </table:table-row>
        <table:table-row>
          <table:table-cell table:number-columns-repeated="2"/>
          <table:table-cell office:value-type="string" office:string-value="Наггетсы из печи ТМ Вязанка ф/п ф/в 0,25 кг тара2 ПГП2 МГ"/>
          <table:table-cell office:value-type="string" office:string-value="450 шт"/>
          <table:table-cell office:value-type="float" office:value="112.5"/>
          <table:table-cell office:value-type="float" office:value="450"/>
          <table:table-cell office:value-type="float" office:value="112.5"/>
          <table:table-cell office:value-type="float" office:value="0"/>
          <table:table-cell office:value-type="string" office:string-value="SU003797"/>
          <table:table-cell office:value-type="string" office:string-value="P004497"/>
          <table:table-cell office:value-type="float" office:value="4301132179"/>
          <table:table-cell office:value-type="float" office:value="4607111035691"/>
          <table:table-cell office:value-type="string" office:string-value="Наггетсы «из печи» Фикс.вес 0,25 ТМ «Вязанка»"/>
          <table:table-cell office:value-type="float" office:value="0.25"/>
          <table:table-cell office:value-type="float" office:value="12"/>
          <table:table-cell office:value-type="float" office:value="14"/>
          <table:table-cell office:value-type="float" office:value="70"/>
          <table:table-cell table:number-columns-repeated="16367"/>
        </table:table-row>
        <table:table-row>
          <table:table-cell table:number-columns-repeated="2"/>
          <table:table-cell office:value-type="string" office:string-value="Наггетсы Нагетосы Сочная курочка ТМ Горячая штучка ф/п ф/в 0,25 кг тара НД1 ПГП2 МГ"/>
          <table:table-cell office:value-type="string" office:string-value="480 шт"/>
          <table:table-cell office:value-type="float" office:value="120"/>
          <table:table-cell office:value-type="float" office:value="480"/>
          <table:table-cell office:value-type="float" office:value="120"/>
          <table:table-cell office:value-type="float" office:value="0"/>
          <table:table-cell office:value-type="string" office:string-value="SU003598"/>
          <table:table-cell office:value-type="string" office:string-value="P004602"/>
          <table:table-cell office:value-type="float" office:value="4301132190"/>
          <table:table-cell office:value-type="float" office:value="4607111036537"/>
          <table:table-cell office:value-type="string" office:string-value="Наггетсы «Нагетосы Сочная курочка» Фикс.вес 0,25 ТМ «Горячая штучка»"/>
          <table:table-cell office:value-type="float" office:value="0.25"/>
          <table:table-cell office:value-type="float" office:value="6"/>
          <table:table-cell office:value-type="float" office:value="14"/>
          <table:table-cell office:value-type="float" office:value="140"/>
          <table:table-cell table:number-columns-repeated="16367"/>
        </table:table-row>
        <table:table-row>
          <table:table-cell table:number-columns-repeated="2"/>
          <table:table-cell office:value-type="string" office:string-value="Наггетсы с индейкой ТМ Вязанка ТС Из печи Сливушки ф/п ф/в 0,25 кг тара2 ПГП2 МГ"/>
          <table:table-cell office:value-type="string" office:string-value="210  шт"/>
          <table:table-cell office:value-type="float" office:value="52.5"/>
          <table:table-cell office:value-type="float" office:value="210"/>
          <table:table-cell office:value-type="float" office:value="52.5"/>
          <table:table-cell office:value-type="float" office:value="0"/>
          <table:table-cell office:value-type="string" office:string-value="SU003800"/>
          <table:table-cell office:value-type="string" office:string-value="P004496"/>
          <table:table-cell office:value-type="float" office:value="4301132182"/>
          <table:table-cell office:value-type="float" office:value="4607111035721"/>
          <table:table-cell office:value-type="string" office:string-value="Наггетсы «с индейкой» Фикс.вес 0,25 ТМ «Вязанка»"/>
          <table:table-cell office:value-type="float" office:value="0.25"/>
          <table:table-cell office:value-type="float" office:value="12"/>
          <table:table-cell office:value-type="float" office:value="14"/>
          <table:table-cell office:value-type="float" office:value="70"/>
          <table:table-cell table:number-columns-repeated="16367"/>
        </table:table-row>
        <table:table-row>
          <table:table-cell table:number-columns-repeated="2"/>
          <table:table-cell office:value-type="string" office:string-value="Наггетсы с куриным филе и сыром ТМ Вязанка ТС Из печи Сливушки ф/п ф/в 0,25 кг тара2 НД1 ПГП2 МГ"/>
          <table:table-cell office:value-type="string" office:string-value="330 шт"/>
          <table:table-cell office:value-type="float" office:value="82.5"/>
          <table:table-cell office:value-type="float" office:value="330"/>
          <table:table-cell office:value-type="float" office:value="82.5"/>
          <table:table-cell office:value-type="float" office:value="0"/>
          <table:table-cell office:value-type="string" office:string-value="SU003795"/>
          <table:table-cell office:value-type="string" office:string-value="P004535"/>
          <table:table-cell office:value-type="float" office:value="4301132170"/>
          <table:table-cell office:value-type="float" office:value="4607111038487"/>
          <table:table-cell office:value-type="string" office:string-value="Наггетсы «с куриным филе и сыром» Фикс.вес 0,25 ТМ «Вязанка»"/>
          <table:table-cell office:value-type="float" office:value="0.25"/>
          <table:table-cell office:value-type="float" office:value="12"/>
          <table:table-cell office:value-type="float" office:value="14"/>
          <table:table-cell office:value-type="float" office:value="70"/>
          <table:table-cell table:number-columns-repeated="16367"/>
        </table:table-row>
        <table:table-row>
          <table:table-cell table:number-columns-repeated="2"/>
          <table:table-cell office:value-type="string" office:string-value="Наггетсы Хрустящие ТМ Зареченские ТС Зареченские продукты вес 6 кг МГ"/>
          <table:table-cell office:value-type="string" office:string-value="162 кг"/>
          <table:table-cell office:value-type="float" office:value="162"/>
          <table:table-cell office:value-type="float" office:value="162"/>
          <table:table-cell office:value-type="float" office:value="162"/>
          <table:table-cell office:value-type="float" office:value="0"/>
          <table:table-cell office:value-type="string" office:string-value="SU003020"/>
          <table:table-cell office:value-type="string" office:string-value="P003486"/>
          <table:table-cell office:value-type="float" office:value="4301132080"/>
          <table:table-cell office:value-type="float" office:value="4640242180397"/>
          <table:table-cell office:value-type="string" office:string-value="Наггетсы «Хрустящие» Весовые ТМ «Зареченские» 6 кг"/>
          <table:table-cell office:value-type="float" office:value="1"/>
          <table:table-cell office:value-type="float" office:value="6"/>
          <table:table-cell office:value-type="float" office:value="12"/>
          <table:table-cell office:value-type="float" office:value="84"/>
          <table:table-cell table:number-columns-repeated="16367"/>
        </table:table-row>
        <table:table-row>
          <table:table-cell table:number-columns-repeated="2"/>
          <table:table-cell office:value-type="string" office:string-value="Наггетсы Хрустящие ТМ Стародворье с сочной курочкой ф/в 0,23 кг Х5 МГ"/>
          <table:table-cell office:value-type="string" office:string-value="195  шт"/>
          <table:table-cell office:value-type="float" office:value="44.85"/>
          <table:table-cell office:value-type="float" office:value="195"/>
          <table:table-cell office:value-type="float" office:value="44.85"/>
          <table:table-cell office:value-type="float" office:value="0"/>
          <table:table-cell office:value-type="string" office:string-value="SU003930"/>
          <table:table-cell office:value-type="string" office:string-value="P005043"/>
          <table:table-cell office:value-type="float" office:value="4301132227"/>
          <table:table-cell office:value-type="float" office:value="4620207491133"/>
          <table:table-cell office:value-type="string" office:string-value="Наггетсы «Хрустящие с сочной курочкой» Фикс.вес 0,23 ТМ «Стародворье»"/>
          <table:table-cell office:value-type="float" office:value="0.23"/>
          <table:table-cell office:value-type="float" office:value="12"/>
          <table:table-cell office:value-type="float" office:value="14"/>
          <table:table-cell office:value-type="float" office:value="70"/>
          <table:table-cell table:number-columns-repeated="16367"/>
        </table:table-row>
        <table:table-row>
          <table:table-cell table:number-columns-repeated="2"/>
          <table:table-cell office:value-type="string" office:string-value="Пельмени Бигбули #МЕГАВКУСИЩЕ с сочной грудинкой ТМ Горячая штучка ТС Бигбули ГШ сфера ф/п ф/в 0,7 кг МГ"/>
          <table:table-cell office:value-type="string" office:string-value="30 шт"/>
          <table:table-cell office:value-type="float" office:value="21"/>
          <table:table-cell office:value-type="float" office:value="30"/>
          <table:table-cell office:value-type="float" office:value="21"/>
          <table:table-cell office:value-type="float" office:value="0"/>
          <table:table-cell office:value-type="string" office:string-value="SU003532"/>
          <table:table-cell office:value-type="string" office:string-value="P004440"/>
          <table:table-cell office:value-type="float" office:value="4301071044"/>
          <table:table-cell office:value-type="float" office:value="4607111039385"/>
          <table:table-cell office:value-type="string" office:string-value="Пельмени «Бигбули #МЕГАВКУСИЩЕ с сочной грудинкой» 0,7 сфера ТМ «Горячая штучка»"/>
          <table:table-cell office:value-type="float" office:value="0.7"/>
          <table:table-cell office:value-type="float" office:value="10"/>
          <table:table-cell office:value-type="float" office:value="12"/>
          <table:table-cell office:value-type="float" office:value="84"/>
          <table:table-cell table:number-columns-repeated="16367"/>
        </table:table-row>
        <table:table-row>
          <table:table-cell table:number-columns-repeated="2"/>
          <table:table-cell office:value-type="string" office:string-value="Пельмени Бигбули с мясом ТМ Горячая штучка БУЛЬМЕНИ ТС Бигбули ГШ #МЕГАМЯСИЩЕ ф/п сфера ф/в 0,4 кг МГ"/>
          <table:table-cell office:value-type="string" office:string-value="90 шт"/>
          <table:table-cell office:value-type="float" office:value="36"/>
          <table:table-cell office:value-type="float" office:value="90"/>
          <table:table-cell office:value-type="float" office:value="36"/>
          <table:table-cell office:value-type="float" office:value="0"/>
          <table:table-cell office:value-type="string" office:string-value="SU003530"/>
          <table:table-cell office:value-type="string" office:string-value="P004443"/>
          <table:table-cell office:value-type="float" office:value="4301071046"/>
          <table:table-cell office:value-type="float" office:value="4607111039354"/>
          <table:table-cell office:value-type="string" office:string-value="Пельмени «Бигбули с мясом» 0,4 Сфера ТМ «Горячая штучка»"/>
          <table:table-cell office:value-type="float" office:value="0.4"/>
          <table:table-cell office:value-type="float" office:value="16"/>
          <table:table-cell office:value-type="float" office:value="12"/>
          <table:table-cell office:value-type="float" office:value="84"/>
          <table:table-cell table:number-columns-repeated="16367"/>
        </table:table-row>
        <table:table-row>
          <table:table-cell table:number-columns-repeated="2"/>
          <table:table-cell office:value-type="string" office:string-value="Пельмени Бигбули с мясом ТМ Горячая штучка БУЛЬМЕНИ ТС Бигбули ГШ #МЕГАМЯСИЩЕ ф/п сфера ф/в 0,7 кг МГ"/>
          <table:table-cell office:value-type="string" office:string-value="180 шт"/>
          <table:table-cell office:value-type="float" office:value="126"/>
          <table:table-cell office:value-type="float" office:value="180"/>
          <table:table-cell office:value-type="float" office:value="125.99999999999999"/>
          <table:table-cell office:value-type="float" office:value="0"/>
          <table:table-cell office:value-type="string" office:string-value="SU003529"/>
          <table:table-cell office:value-type="string" office:string-value="P004442"/>
          <table:table-cell office:value-type="float" office:value="4301071047"/>
          <table:table-cell office:value-type="float" office:value="4607111039330"/>
          <table:table-cell office:value-type="string" office:string-value="Пельмени «Бигбули с мясом» 0,7 Сфера ТМ «Горячая штучка»"/>
          <table:table-cell office:value-type="float" office:value="0.7"/>
          <table:table-cell office:value-type="float" office:value="10"/>
          <table:table-cell office:value-type="float" office:value="12"/>
          <table:table-cell office:value-type="float" office:value="84"/>
          <table:table-cell table:number-columns-repeated="16367"/>
        </table:table-row>
        <table:table-row>
          <table:table-cell table:number-columns-repeated="2"/>
          <table:table-cell office:value-type="string" office:string-value="Пельмени Бигбули со сливочным маслом ТМ Горячая штучка БУЛЬМЕНИ ТС Бигбули ГШ #МЕГАМАСЛИЩЕ ф/п сфера ф/в 0,7 кг МГ"/>
          <table:table-cell office:value-type="string" office:string-value="60 шт"/>
          <table:table-cell office:value-type="float" office:value="42"/>
          <table:table-cell office:value-type="float" office:value="60"/>
          <table:table-cell office:value-type="float" office:value="42"/>
          <table:table-cell office:value-type="float" office:value="0"/>
          <table:table-cell office:value-type="string" office:string-value="SU003385"/>
          <table:table-cell office:value-type="string" office:string-value="P004203"/>
          <table:table-cell office:value-type="float" office:value="4301071031"/>
          <table:table-cell office:value-type="float" office:value="4607111038982"/>
          <table:table-cell office:value-type="string" office:string-value="Пельмени «Бигбули #МЕГАМАСЛИЩЕ со сливочным маслом» 0,7 сфера ТМ «Горячая штучка»"/>
          <table:table-cell office:value-type="float" office:value="0.7"/>
          <table:table-cell office:value-type="float" office:value="10"/>
          <table:table-cell office:value-type="float" office:value="12"/>
          <table:table-cell office:value-type="float" office:value="84"/>
          <table:table-cell table:number-columns-repeated="16367"/>
        </table:table-row>
        <table:table-row>
          <table:table-cell table:number-columns-repeated="2"/>
          <table:table-cell office:value-type="string" office:string-value="Пельмени Бульмени мини с мясом и оливковым маслом ТМ Горячая штучка ТС Бульмени ГШ ф/п сфера ф/в 0,7 кг МГ"/>
          <table:table-cell office:value-type="string" office:string-value="330 шт"/>
          <table:table-cell office:value-type="float" office:value="231"/>
          <table:table-cell office:value-type="float" office:value="330"/>
          <table:table-cell office:value-type="float" office:value="230.99999999999997"/>
          <table:table-cell office:value-type="float" office:value="0"/>
          <table:table-cell office:value-type="string" office:string-value="SU003717"/>
          <table:table-cell office:value-type="string" office:string-value="P004819"/>
          <table:table-cell office:value-type="float" office:value="4301071074"/>
          <table:table-cell office:value-type="float" office:value="4620207491157"/>
          <table:table-cell office:value-type="string" office:string-value="Пельмени «Бульмени мини с мясом и оливковым маслом» Фикс.вес 0,7 сфера ТМ «Горячая штучка»"/>
          <table:table-cell office:value-type="float" office:value="0.7"/>
          <table:table-cell office:value-type="float" office:value="10"/>
          <table:table-cell office:value-type="float" office:value="12"/>
          <table:table-cell office:value-type="float" office:value="84"/>
          <table:table-cell table:number-columns-repeated="16367"/>
        </table:table-row>
        <table:table-row>
          <table:table-cell table:number-columns-repeated="2"/>
          <table:table-cell office:value-type="string" office:string-value="Пельмени Бульмени с говядиной и свининой Наваристые ТМ Горячая штучка ТС Бульмени ГШ сфера Вес 2,7 кг УМК УВС МГ"/>
          <table:table-cell office:value-type="string" office:string-value="100 кг"/>
          <table:table-cell office:value-type="float" office:value="100"/>
          <table:table-cell office:value-type="float" office:value="100"/>
          <table:table-cell office:value-type="float" office:value="100"/>
          <table:table-cell office:value-type="float" office:value="0"/>
          <table:table-cell office:value-type="string" office:string-value="SU002798"/>
          <table:table-cell office:value-type="string" office:string-value="P003687"/>
          <table:table-cell office:value-type="float" office:value="4301070977"/>
          <table:table-cell office:value-type="float" office:value="4607111037411"/>
          <table:table-cell office:value-type="string" office:string-value="Пельмени «Бульмени с говядиной и свининой Наваристые» Весовые Сфера ТМ «Горячая штучка» 2,7 кг"/>
          <table:table-cell office:value-type="float" office:value="1"/>
          <table:table-cell office:value-type="float" office:value="2.7"/>
          <table:table-cell office:value-type="float" office:value="18"/>
          <table:table-cell office:value-type="float" office:value="234"/>
          <table:table-cell table:number-columns-repeated="16367"/>
        </table:table-row>
        <table:table-row>
          <table:table-cell table:number-columns-repeated="2"/>
          <table:table-cell office:value-type="string" office:string-value="Пельмени Бульмени с говядиной и свининой Наваристые ТМ Горячая штучка ТС Бульмени ГШ сфера Вес 5 кг УВС МГ"/>
          <table:table-cell office:value-type="string" office:string-value="300 кг"/>
          <table:table-cell office:value-type="float" office:value="300"/>
          <table:table-cell office:value-type="float" office:value="300"/>
          <table:table-cell office:value-type="float" office:value="300"/>
          <table:table-cell office:value-type="float" office:value="0"/>
          <table:table-cell office:value-type="string" office:string-value="SU002595"/>
          <table:table-cell office:value-type="string" office:string-value="P003697"/>
          <table:table-cell office:value-type="float" office:value="4301070981"/>
          <table:table-cell office:value-type="float" office:value="4607111036728"/>
          <table:table-cell office:value-type="string" office:string-value="Пельмени «Бульмени с говядиной и свининой Наваристые» Весовые Сфера ТМ «Горячая штучка» 5 кг"/>
          <table:table-cell office:value-type="float" office:value="1"/>
          <table:table-cell office:value-type="float" office:value="5"/>
          <table:table-cell office:value-type="float" office:value="12"/>
          <table:table-cell office:value-type="float" office:value="144"/>
          <table:table-cell table:number-columns-repeated="16367"/>
        </table:table-row>
        <table:table-row>
          <table:table-cell table:number-columns-repeated="2"/>
          <table:table-cell office:value-type="string" office:string-value="Пельмени Бульмени с говядиной и свининой ТМ Горячая штучка ТС Бульмени ГШ ф/п сфера ф/в 0,4 кг тара2 МГ"/>
          <table:table-cell office:value-type="string" office:string-value="750 шт"/>
          <table:table-cell office:value-type="float" office:value="300"/>
          <table:table-cell office:value-type="float" office:value="750"/>
          <table:table-cell office:value-type="float" office:value="300"/>
          <table:table-cell office:value-type="float" office:value="0"/>
          <table:table-cell office:value-type="string" office:string-value="SU003527"/>
          <table:table-cell office:value-type="string" office:string-value="P004474"/>
          <table:table-cell office:value-type="float" office:value="4301071051"/>
          <table:table-cell office:value-type="float" office:value="4607111039262"/>
          <table:table-cell office:value-type="string" office:string-value="Пельмени «Бульмени с говядиной и свининой» 0,4 Сфера ТМ «Горячая штучка»"/>
          <table:table-cell office:value-type="float" office:value="0.4"/>
          <table:table-cell office:value-type="float" office:value="16"/>
          <table:table-cell office:value-type="float" office:value="12"/>
          <table:table-cell office:value-type="float" office:value="84"/>
          <table:table-cell table:number-columns-repeated="16367"/>
        </table:table-row>
        <table:table-row>
          <table:table-cell table:number-columns-repeated="2"/>
          <table:table-cell office:value-type="string" office:string-value="Пельмени Бульмени с говядиной и свининой ТМ Горячая штучка ТС Бульмени ГШ ф/п сфера ф/в 0,7 кг МГ"/>
          <table:table-cell office:value-type="string" office:string-value="710 шт"/>
          <table:table-cell office:value-type="float" office:value="497"/>
          <table:table-cell office:value-type="float" office:value="710"/>
          <table:table-cell office:value-type="float" office:value="496.99999999999994"/>
          <table:table-cell office:value-type="float" office:value="0"/>
          <table:table-cell office:value-type="string" office:string-value="SU003460"/>
          <table:table-cell office:value-type="string" office:string-value="P004345"/>
          <table:table-cell office:value-type="float" office:value="4301071038"/>
          <table:table-cell office:value-type="float" office:value="4607111039248"/>
          <table:table-cell office:value-type="string" office:string-value="Пельмени «Бульмени с говядиной и свининой» 0,7 Сфера ТМ «Горячая штучка»"/>
          <table:table-cell office:value-type="float" office:value="0.7"/>
          <table:table-cell office:value-type="float" office:value="10"/>
          <table:table-cell office:value-type="float" office:value="12"/>
          <table:table-cell office:value-type="float" office:value="84"/>
          <table:table-cell table:number-columns-repeated="16367"/>
        </table:table-row>
        <table:table-row>
          <table:table-cell table:number-columns-repeated="2"/>
          <table:table-cell office:value-type="string" office:string-value="Пельмени Бульмени со сливочным маслом ТМ Горячая штучка ТС Бульмени ГШ ф/п сфера ф/в 0,4 кг МГ"/>
          <table:table-cell office:value-type="string" office:string-value="620 шт"/>
          <table:table-cell office:value-type="float" office:value="248"/>
          <table:table-cell office:value-type="float" office:value="620"/>
          <table:table-cell office:value-type="float" office:value="248"/>
          <table:table-cell office:value-type="float" office:value="0"/>
          <table:table-cell office:value-type="string" office:string-value="SU003528"/>
          <table:table-cell office:value-type="string" office:string-value="P004444"/>
          <table:table-cell office:value-type="float" office:value="4301071049"/>
          <table:table-cell office:value-type="float" office:value="4607111039293"/>
          <table:table-cell office:value-type="string" office:string-value="Пельмени «Бульмени со сливочным маслом» Фикс.вес 0,4 ТМ «Горячая штучка»"/>
          <table:table-cell office:value-type="float" office:value="0.4"/>
          <table:table-cell office:value-type="float" office:value="16"/>
          <table:table-cell office:value-type="float" office:value="12"/>
          <table:table-cell office:value-type="float" office:value="84"/>
          <table:table-cell table:number-columns-repeated="16367"/>
        </table:table-row>
        <table:table-row>
          <table:table-cell table:number-columns-repeated="2"/>
          <table:table-cell office:value-type="string" office:string-value="Пельмени Бульмени со сливочным маслом ТМ Горячая штучка ТС Бульмени ГШ ф/п сфера ф/в 0,7 кг МГ"/>
          <table:table-cell office:value-type="string" office:string-value="700 шт"/>
          <table:table-cell office:value-type="float" office:value="490"/>
          <table:table-cell office:value-type="float" office:value="700"/>
          <table:table-cell office:value-type="float" office:value="489.99999999999994"/>
          <table:table-cell office:value-type="float" office:value="0"/>
          <table:table-cell office:value-type="string" office:string-value="SU003459"/>
          <table:table-cell office:value-type="string" office:string-value="P004346"/>
          <table:table-cell office:value-type="float" office:value="4301071039"/>
          <table:table-cell office:value-type="float" office:value="4607111039279"/>
          <table:table-cell office:value-type="string" office:string-value="Пельмени «Бульмени со сливочным маслом» 0,7 Сфера ТМ «Горячая штучка»"/>
          <table:table-cell office:value-type="float" office:value="0.7"/>
          <table:table-cell office:value-type="float" office:value="10"/>
          <table:table-cell office:value-type="float" office:value="12"/>
          <table:table-cell office:value-type="float" office:value="84"/>
          <table:table-cell table:number-columns-repeated="16367"/>
        </table:table-row>
        <table:table-row>
          <table:table-cell table:number-columns-repeated="2"/>
          <table:table-cell office:value-type="string" office:string-value="Пельмени Мясные с говядиной ТМ Стародворье сфера ф/п ф/в 1 кг МГ"/>
          <table:table-cell office:value-type="string" office:string-value="300 кг"/>
          <table:table-cell office:value-type="float" office:value="300"/>
          <table:table-cell office:value-type="float" office:value="300"/>
          <table:table-cell office:value-type="float" office:value="300"/>
          <table:table-cell office:value-type="float" office:value="0"/>
          <table:table-cell office:value-type="string" office:string-value="SU003935"/>
          <table:table-cell office:value-type="string" office:string-value="P005048"/>
          <table:table-cell office:value-type="float" office:value="4301071097"/>
          <table:table-cell office:value-type="float" office:value="4620207491096"/>
          <table:table-cell office:value-type="string" office:string-value="Пельмени «Мясные с говядиной» Фикс.вес 1 сфера ТМ «Стародворье»"/>
          <table:table-cell office:value-type="float" office:value="1"/>
          <table:table-cell office:value-type="float" office:value="5"/>
          <table:table-cell office:value-type="float" office:value="12"/>
          <table:table-cell office:value-type="float" office:value="84"/>
          <table:table-cell table:number-columns-repeated="16367"/>
        </table:table-row>
        <table:table-row>
          <table:table-cell table:number-columns-repeated="2"/>
          <table:table-cell office:value-type="string" office:string-value="Пельмени Отборные с говядиной и свининой ТМ Медвежье ушко ТС Медвежье ушко псевдозащип ф/п ф/в 0,43 кг Топ-ЛКК, Дистр МГ"/>
          <table:table-cell office:value-type="string" office:string-value="230 шт"/>
          <table:table-cell office:value-type="float" office:value="98.9"/>
          <table:table-cell office:value-type="float" office:value="230"/>
          <table:table-cell office:value-type="float" office:value="98.899999999999991"/>
          <table:table-cell office:value-type="float" office:value="0"/>
          <table:table-cell office:value-type="string" office:string-value="SU003974"/>
          <table:table-cell office:value-type="string" office:string-value="P005106"/>
          <table:table-cell office:value-type="float" office:value="4301071108"/>
          <table:table-cell office:value-type="float" office:value="4607111035912"/>
          <table:table-cell office:value-type="string" office:string-value="Пельмени «Отборные с говядиной и свининой» 0,43 псевдозащип ТМ «Медвежье ушко»"/>
          <table:table-cell office:value-type="float" office:value="0.43"/>
          <table:table-cell office:value-type="float" office:value="16"/>
          <table:table-cell office:value-type="float" office:value="12"/>
          <table:table-cell office:value-type="float" office:value="84"/>
          <table:table-cell table:number-columns-repeated="16367"/>
        </table:table-row>
        <table:table-row>
          <table:table-cell table:number-columns-repeated="2"/>
          <table:table-cell office:value-type="string" office:string-value="Пельмени Отборные с говядиной и свининой ТМ Медвежье ушко ТС Медвежье ушко псевдозащип ф/п ф/в 0,9 кг Топ-ЛКК, Дистр МГ"/>
          <table:table-cell office:value-type="string" office:string-value="270  шт"/>
          <table:table-cell office:value-type="float" office:value="243"/>
          <table:table-cell office:value-type="float" office:value="270"/>
          <table:table-cell office:value-type="float" office:value="243"/>
          <table:table-cell office:value-type="float" office:value="0"/>
          <table:table-cell office:value-type="string" office:string-value="SU003975"/>
          <table:table-cell office:value-type="string" office:string-value="P005107"/>
          <table:table-cell office:value-type="float" office:value="4301071109"/>
          <table:table-cell office:value-type="float" office:value="4607111035929"/>
          <table:table-cell office:value-type="string" office:string-value="Пельмени «Отборные с говядиной и свининой» 0,9 псевдозащип ТМ «Медвежье ушко»"/>
          <table:table-cell office:value-type="float" office:value="0.9"/>
          <table:table-cell office:value-type="float" office:value="8"/>
          <table:table-cell office:value-type="float" office:value="12"/>
          <table:table-cell office:value-type="float" office:value="84"/>
          <table:table-cell table:number-columns-repeated="16367"/>
        </table:table-row>
        <table:table-row>
          <table:table-cell table:number-columns-repeated="2"/>
          <table:table-cell office:value-type="string" office:string-value="Пельмени Отборные с говядиной ТМ Медвежье ушко ТС Медвежье ушко псевдозащип ф/п ф/в 0,43 кг Топ-ЛКК, Дистр МГ"/>
          <table:table-cell office:value-type="string" office:string-value="105 шт"/>
          <table:table-cell office:value-type="float" office:value="45.15"/>
          <table:table-cell office:value-type="float" office:value="105"/>
          <table:table-cell office:value-type="float" office:value="45.15"/>
          <table:table-cell office:value-type="float" office:value="0"/>
          <table:table-cell office:value-type="string" office:string-value="SU003972"/>
          <table:table-cell office:value-type="string" office:string-value="P005104"/>
          <table:table-cell office:value-type="float" office:value="4301071106"/>
          <table:table-cell office:value-type="float" office:value="4607111035882"/>
          <table:table-cell office:value-type="string" office:string-value="Пельмени «Отборные с говядиной» 0,43 псевдозащип ТМ «Медвежье ушко»"/>
          <table:table-cell office:value-type="float" office:value="0.43"/>
          <table:table-cell office:value-type="float" office:value="16"/>
          <table:table-cell office:value-type="float" office:value="12"/>
          <table:table-cell office:value-type="float" office:value="84"/>
          <table:table-cell table:number-columns-repeated="16367"/>
        </table:table-row>
        <table:table-row>
          <table:table-cell table:number-columns-repeated="2"/>
          <table:table-cell office:value-type="string" office:string-value="Пельмени Отборные с говядиной ТМ Стародворье ТС Медвежье ушко ф/п псевдозащип ф/в 0,9 кг УВС1 РТТ МГ"/>
          <table:table-cell office:value-type="string" office:string-value="195 шт"/>
          <table:table-cell office:value-type="float" office:value="175.5"/>
          <table:table-cell office:value-type="float" office:value="195"/>
          <table:table-cell office:value-type="float" office:value="175.5"/>
          <table:table-cell office:value-type="float" office:value="0"/>
          <table:table-cell office:value-type="string" office:string-value="SU003973"/>
          <table:table-cell office:value-type="string" office:string-value="P005105"/>
          <table:table-cell office:value-type="float" office:value="4301071107"/>
          <table:table-cell office:value-type="float" office:value="4607111035905"/>
          <table:table-cell office:value-type="string" office:string-value="Пельмени «Отборные с говядиной» 0,9 псевдозащип ТМ «Медвежье ушко»"/>
          <table:table-cell office:value-type="float" office:value="0.9"/>
          <table:table-cell office:value-type="float" office:value="8"/>
          <table:table-cell office:value-type="float" office:value="12"/>
          <table:table-cell office:value-type="float" office:value="84"/>
          <table:table-cell table:number-columns-repeated="16367"/>
        </table:table-row>
        <table:table-row>
          <table:table-cell table:number-columns-repeated="2"/>
          <table:table-cell office:value-type="string" office:string-value="Пельмени С говядиной и свининой сфера пуговки вес 5 кг УВС НД1 МГ"/>
          <table:table-cell office:value-type="string" office:string-value="200 кг"/>
          <table:table-cell office:value-type="float" office:value="200"/>
          <table:table-cell office:value-type="float" office:value="200"/>
          <table:table-cell office:value-type="float" office:value="200"/>
          <table:table-cell office:value-type="float" office:value="0"/>
          <table:table-cell office:value-type="string" office:string-value="SU000197"/>
          <table:table-cell office:value-type="string" office:string-value="P004472"/>
          <table:table-cell office:value-type="float" office:value="4301071050"/>
          <table:table-cell office:value-type="float" office:value="4607111036216"/>
          <table:table-cell office:value-type="string" office:string-value="Пельмени «Пуговки с говядиной и свининой» Весовые Сфера ТМ «No Name» 5 кг"/>
          <table:table-cell office:value-type="float" office:value="1"/>
          <table:table-cell office:value-type="float" office:value="5"/>
          <table:table-cell office:value-type="float" office:value="12"/>
          <table:table-cell office:value-type="float" office:value="144"/>
          <table:table-cell table:number-columns-repeated="16367"/>
        </table:table-row>
        <table:table-row>
          <table:table-cell table:number-columns-repeated="2"/>
          <table:table-cell office:value-type="string" office:string-value="Пельмени Со свининой и говядиной ТМ Особый рецепт ТС Любимая ложка ф/п равиоли ф/в 1,0 кг УВС НД МГ"/>
          <table:table-cell office:value-type="string" office:string-value="450 кг"/>
          <table:table-cell office:value-type="float" office:value="450"/>
          <table:table-cell office:value-type="float" office:value="450"/>
          <table:table-cell office:value-type="float" office:value="450"/>
          <table:table-cell office:value-type="float" office:value="0"/>
          <table:table-cell office:value-type="string" office:string-value="SU002268"/>
          <table:table-cell office:value-type="string" office:string-value="P004081"/>
          <table:table-cell office:value-type="float" office:value="4301071029"/>
          <table:table-cell office:value-type="float" office:value="4607111035899"/>
          <table:table-cell office:value-type="string" office:string-value="Пельмени Со свининой и говядиной Любимая ложка 1,0 Равиоли Особый рецепт"/>
          <table:table-cell office:value-type="float" office:value="1"/>
          <table:table-cell office:value-type="float" office:value="5"/>
          <table:table-cell office:value-type="float" office:value="12"/>
          <table:table-cell office:value-type="float" office:value="84"/>
          <table:table-cell table:number-columns-repeated="16367"/>
        </table:table-row>
        <table:table-row>
          <table:table-cell table:number-columns-repeated="2"/>
          <table:table-cell office:value-type="string" office:string-value="Пельмени Бульмени Нейробуст с мясом ТМ Горячая штучка ТС Бульмени ГШ сфера ф/п ф/в 0,6 кг МГ"/>
          <table:table-cell office:value-type="string" office:string-value="90 шт"/>
          <table:table-cell office:value-type="float" office:value="54"/>
          <table:table-cell office:value-type="float" office:value="90"/>
          <table:table-cell office:value-type="float" office:value="54"/>
          <table:table-cell office:value-type="float" office:value="0"/>
          <table:table-cell office:value-type="string" office:string-value="SU003845"/>
          <table:table-cell office:value-type="string" office:string-value="P004909"/>
          <table:table-cell office:value-type="float" office:value="4301071094"/>
          <table:table-cell office:value-type="float" office:value="4620207491140"/>
          <table:table-cell office:value-type="string" office:string-value="Пельмени ПГП «Пельмени Бульмени Нейробуст с мясом» Фикс.вес 0,6 сфера ТМ «Горячая штучка»"/>
          <table:table-cell office:value-type="float" office:value="0.6"/>
          <table:table-cell office:value-type="float" office:value="10"/>
          <table:table-cell office:value-type="float" office:value="12"/>
          <table:table-cell office:value-type="float" office:value="84"/>
          <table:table-cell table:number-columns-repeated="16367"/>
        </table:table-row>
        <table:table-row>
          <table:table-cell table:number-columns-repeated="2"/>
          <table:table-cell office:value-type="string" office:string-value="Бульмени хрустящие с мясом ТМ Горячая штучка ТС Бульмени ГШ сфера ф/в 0,22 кг ПГП2 МГ"/>
          <table:table-cell office:value-type="string" office:string-value="150 шт"/>
          <table:table-cell office:value-type="float" office:value="33"/>
          <table:table-cell office:value-type="float" office:value="150"/>
          <table:table-cell office:value-type="float" office:value="33"/>
          <table:table-cell office:value-type="float" office:value="0"/>
          <table:table-cell office:value-type="string" office:string-value="SU003945"/>
          <table:table-cell office:value-type="string" office:string-value="P005065"/>
          <table:table-cell office:value-type="float" office:value="4301135826"/>
          <table:table-cell office:value-type="float" office:value="4620207490983"/>
          <table:table-cell office:value-type="string" office:string-value="Снеки «Бульмени хрустящие с мясом» Фикс.вес 0,22 сфера ТМ «Горячая штучка»"/>
          <table:table-cell office:value-type="float" office:value="0.22"/>
          <table:table-cell office:value-type="float" office:value="12"/>
          <table:table-cell office:value-type="float" office:value="14"/>
          <table:table-cell office:value-type="float" office:value="70"/>
          <table:table-cell table:number-columns-repeated="16367"/>
        </table:table-row>
        <table:table-row>
          <table:table-cell table:number-columns-repeated="2"/>
          <table:table-cell office:value-type="string" office:string-value="Готовые бельмеши сочные с мясом ТМ Горячая штучка ф/п ф/в 0,3 кг НД3 ПГП2 МГ"/>
          <table:table-cell office:value-type="string" office:string-value="195 шт"/>
          <table:table-cell office:value-type="float" office:value="58.5"/>
          <table:table-cell office:value-type="float" office:value="195"/>
          <table:table-cell office:value-type="float" office:value="58.5"/>
          <table:table-cell office:value-type="float" office:value="0"/>
          <table:table-cell office:value-type="string" office:string-value="SU003593"/>
          <table:table-cell office:value-type="string" office:string-value="P004598"/>
          <table:table-cell office:value-type="float" office:value="4301135574"/>
          <table:table-cell office:value-type="float" office:value="4607111033659"/>
          <table:table-cell office:value-type="string" office:string-value="Снеки «Бельмеши сочные с мясом» Фикс.вес 0,3 Пакет ТМ «Горячая штучка»"/>
          <table:table-cell office:value-type="float" office:value="0.3"/>
          <table:table-cell office:value-type="float" office:value="12"/>
          <table:table-cell office:value-type="float" office:value="14"/>
          <table:table-cell office:value-type="float" office:value="70"/>
          <table:table-cell table:number-columns-repeated="16367"/>
        </table:table-row>
        <table:table-row>
          <table:table-cell table:number-columns-repeated="2"/>
          <table:table-cell office:value-type="string" office:string-value="Готовые чебупели острые с мясом ТМ Горячая штучка ф/п ф/в 0,24 кг МГ"/>
          <table:table-cell office:value-type="string" office:string-value="1500 шт"/>
          <table:table-cell office:value-type="float" office:value="360"/>
          <table:table-cell office:value-type="float" office:value="1500"/>
          <table:table-cell office:value-type="float" office:value="360"/>
          <table:table-cell office:value-type="float" office:value="0"/>
          <table:table-cell office:value-type="string" office:string-value="SU003887"/>
          <table:table-cell office:value-type="string" office:string-value="P004969"/>
          <table:table-cell office:value-type="float" office:value="4301135763"/>
          <table:table-cell office:value-type="float" office:value="4620207491027"/>
          <table:table-cell office:value-type="string" office:string-value="Снеки «Готовые чебупели острые с мясом» Фикс.вес 0,24 ТМ «Горячая штучка»"/>
          <table:table-cell office:value-type="float" office:value="0.24"/>
          <table:table-cell office:value-type="float" office:value="12"/>
          <table:table-cell office:value-type="float" office:value="14"/>
          <table:table-cell office:value-type="float" office:value="70"/>
          <table:table-cell table:number-columns-repeated="16367"/>
        </table:table-row>
        <table:table-row>
          <table:table-cell table:number-columns-repeated="2"/>
          <table:table-cell office:value-type="string" office:string-value="Готовые чебупели с ветчиной и сыром ТМ Горячая штучка ф/п ф/в 0,24 кг ПГП2 МГ"/>
          <table:table-cell office:value-type="string" office:string-value="1600  шт"/>
          <table:table-cell office:value-type="float" office:value="384"/>
          <table:table-cell office:value-type="float" office:value="1600"/>
          <table:table-cell office:value-type="float" office:value="384"/>
          <table:table-cell office:value-type="float" office:value="0"/>
          <table:table-cell office:value-type="string" office:string-value="SU003889"/>
          <table:table-cell office:value-type="string" office:string-value="P004971"/>
          <table:table-cell office:value-type="float" office:value="4301135793"/>
          <table:table-cell office:value-type="float" office:value="4620207491003"/>
          <table:table-cell office:value-type="string" office:string-value="Снеки «Готовые чебупели с ветчиной и сыром» Фикс.вес 0,24 ТМ «Горячая штучка»"/>
          <table:table-cell office:value-type="float" office:value="0.24"/>
          <table:table-cell office:value-type="float" office:value="12"/>
          <table:table-cell office:value-type="float" office:value="14"/>
          <table:table-cell office:value-type="float" office:value="70"/>
          <table:table-cell table:number-columns-repeated="16367"/>
        </table:table-row>
        <table:table-row>
          <table:table-cell table:number-columns-repeated="2"/>
          <table:table-cell office:value-type="string" office:string-value="Готовые чебупели сочные с мясом ТМ Горячая штучка ф/п ф/в 0,24 кг НКК, Топ-ЛКК, Дистр МГ"/>
          <table:table-cell office:value-type="string" office:string-value="2250 шт"/>
          <table:table-cell office:value-type="float" office:value="1080"/>
          <table:table-cell office:value-type="float" office:value="2250"/>
          <table:table-cell office:value-type="float" office:value="540"/>
          <table:table-cell office:value-type="float" office:value="-540"/>
          <table:table-cell office:value-type="string" office:string-value="SU003884"/>
          <table:table-cell office:value-type="string" office:string-value="P004966"/>
          <table:table-cell office:value-type="float" office:value="4301135760"/>
          <table:table-cell office:value-type="float" office:value="4620207491010"/>
          <table:table-cell office:value-type="string" office:string-value="Снеки «Готовые чебупели сочные с мясом» Фикс.вес 0,24 ТМ «Горячая штучка»"/>
          <table:table-cell office:value-type="float" office:value="0.24"/>
          <table:table-cell office:value-type="float" office:value="12"/>
          <table:table-cell office:value-type="float" office:value="14"/>
          <table:table-cell office:value-type="float" office:value="70"/>
          <table:table-cell table:number-columns-repeated="16367"/>
        </table:table-row>
        <table:table-row>
          <table:table-cell table:number-columns-repeated="2"/>
          <table:table-cell office:value-type="string" office:string-value="Готовые чебупели сочные с мясом ТМ Горячая штучка ф/п ф/в 0,48 кг XXL НД МГ"/>
          <table:table-cell office:value-type="string" office:string-value="45 шт"/>
          <table:table-cell office:value-type="float" office:value="21.6"/>
          <table:table-cell office:value-type="float" office:value="45"/>
          <table:table-cell office:value-type="float" office:value="21.599999999999998"/>
          <table:table-cell office:value-type="float" office:value="0"/>
          <table:table-cell office:value-type="string" office:string-value="SU003605"/>
          <table:table-cell office:value-type="string" office:string-value="P004595"/>
          <table:table-cell office:value-type="float" office:value="4301135571"/>
          <table:table-cell office:value-type="float" office:value="4607111035028"/>
          <table:table-cell office:value-type="string" office:string-value="Снеки «Готовые чебупели сочные с мясом» Фикс.вес 0,48 ТМ «Горячая штучка»"/>
          <table:table-cell office:value-type="float" office:value="0.48"/>
          <table:table-cell office:value-type="float" office:value="8"/>
          <table:table-cell office:value-type="float" office:value="14"/>
          <table:table-cell office:value-type="float" office:value="70"/>
          <table:table-cell table:number-columns-repeated="16367"/>
        </table:table-row>
        <table:table-row>
          <table:table-cell table:number-columns-repeated="2"/>
          <table:table-cell office:value-type="string" office:string-value="ЖАР-ладушки с мясом ТМ Стародворье ф/в 0,2 кг МГ"/>
          <table:table-cell office:value-type="string" office:string-value="480 шт"/>
          <table:table-cell office:value-type="float" office:value="96"/>
          <table:table-cell office:value-type="float" office:value="480"/>
          <table:table-cell office:value-type="float" office:value="96"/>
          <table:table-cell office:value-type="float" office:value="0"/>
          <table:table-cell office:value-type="string" office:string-value="SU003963"/>
          <table:table-cell office:value-type="string" office:string-value="P005095"/>
          <table:table-cell office:value-type="float" office:value="4301135829"/>
          <table:table-cell office:value-type="float" office:value="4620207490235"/>
          <table:table-cell office:value-type="string" office:string-value="Снеки «ЖАР-ладушки с мясом» Фикс.вес 0,2 ТМ «Стародворье»"/>
          <table:table-cell office:value-type="float" office:value="0.2"/>
          <table:table-cell office:value-type="float" office:value="12"/>
          <table:table-cell office:value-type="float" office:value="14"/>
          <table:table-cell office:value-type="float" office:value="70"/>
          <table:table-cell table:number-columns-repeated="16367"/>
        </table:table-row>
        <table:table-row>
          <table:table-cell table:number-columns-repeated="2"/>
          <table:table-cell office:value-type="string" office:string-value="Круггетсы с сырным соусом ТМ Горячая штучка ТС Круггетсы ф/п ф/в 0,2 кг ПГП2 МГ"/>
          <table:table-cell office:value-type="string" office:string-value="1450 шт"/>
          <table:table-cell office:value-type="float" office:value="290"/>
          <table:table-cell office:value-type="float" office:value="1450"/>
          <table:table-cell office:value-type="float" office:value="290"/>
          <table:table-cell office:value-type="float" office:value="0"/>
          <table:table-cell office:value-type="string" office:string-value="SU003872"/>
          <table:table-cell office:value-type="string" office:string-value="P004956"/>
          <table:table-cell office:value-type="float" office:value="4301135753"/>
          <table:table-cell office:value-type="float" office:value="4620207490914"/>
          <table:table-cell office:value-type="string" office:string-value="Снеки «Круггетсы с сырным соусом» Фикс.вес 0,2 ТМ «Горячая штучка»"/>
          <table:table-cell office:value-type="float" office:value="0.2"/>
          <table:table-cell office:value-type="float" office:value="12"/>
          <table:table-cell office:value-type="float" office:value="14"/>
          <table:table-cell office:value-type="float" office:value="70"/>
          <table:table-cell table:number-columns-repeated="16367"/>
        </table:table-row>
        <table:table-row>
          <table:table-cell table:number-columns-repeated="2"/>
          <table:table-cell office:value-type="string" office:string-value="Круггетсы сочные ТМ Горячая штучка ТС Круггетсы ф/п ф/в 0,2 кг ПГП2 МГ"/>
          <table:table-cell office:value-type="string" office:string-value="1450  шт"/>
          <table:table-cell office:value-type="float" office:value="290"/>
          <table:table-cell office:value-type="float" office:value="1450"/>
          <table:table-cell office:value-type="float" office:value="290"/>
          <table:table-cell office:value-type="float" office:value="0"/>
          <table:table-cell office:value-type="string" office:string-value="SU003870"/>
          <table:table-cell office:value-type="string" office:string-value="P004953"/>
          <table:table-cell office:value-type="float" office:value="4301135778"/>
          <table:table-cell office:value-type="float" office:value="4620207490853"/>
          <table:table-cell office:value-type="string" office:string-value="Снеки «Круггетсы сочные» Фикс.вес 0,2 ТМ «Горячая штучка»"/>
          <table:table-cell office:value-type="float" office:value="0.2"/>
          <table:table-cell office:value-type="float" office:value="12"/>
          <table:table-cell office:value-type="float" office:value="14"/>
          <table:table-cell office:value-type="float" office:value="70"/>
          <table:table-cell table:number-columns-repeated="16367"/>
        </table:table-row>
        <table:table-row>
          <table:table-cell table:number-columns-repeated="2"/>
          <table:table-cell office:value-type="string" office:string-value="Мини-сосиски в тесте ТМ Зареченские ТС Зареченские продукты вес 3,7 кг ПГП2 МГ"/>
          <table:table-cell office:value-type="string" office:string-value="185 кг"/>
          <table:table-cell office:value-type="float" office:value="185"/>
          <table:table-cell office:value-type="float" office:value="185"/>
          <table:table-cell office:value-type="float" office:value="185"/>
          <table:table-cell office:value-type="float" office:value="0"/>
          <table:table-cell office:value-type="string" office:string-value="SU003454"/>
          <table:table-cell office:value-type="string" office:string-value="P004364"/>
          <table:table-cell office:value-type="float" office:value="4301135518"/>
          <table:table-cell office:value-type="float" office:value="4640242181561"/>
          <table:table-cell office:value-type="string" office:string-value="Снеки «Мини-сосиски в тесте» Весовые ТМ «Зареченские» 3,7 кг"/>
          <table:table-cell office:value-type="float" office:value="1"/>
          <table:table-cell office:value-type="float" office:value="3.7"/>
          <table:table-cell office:value-type="float" office:value="14"/>
          <table:table-cell office:value-type="float" office:value="126"/>
          <table:table-cell table:number-columns-repeated="16367"/>
        </table:table-row>
        <table:table-row>
          <table:table-cell table:number-columns-repeated="2"/>
          <table:table-cell office:value-type="string" office:string-value="Мини-чебуречки с мясом ТМ Зареченские ТС Зареченские продукты вес 5,5 кг МГ"/>
          <table:table-cell office:value-type="string" office:string-value="55 кг"/>
          <table:table-cell office:value-type="float" office:value="55"/>
          <table:table-cell office:value-type="float" office:value="55"/>
          <table:table-cell office:value-type="float" office:value="55"/>
          <table:table-cell office:value-type="float" office:value="0"/>
          <table:table-cell office:value-type="string" office:string-value="SU003434"/>
          <table:table-cell office:value-type="string" office:string-value="P004358"/>
          <table:table-cell office:value-type="float" office:value="4301135374"/>
          <table:table-cell office:value-type="float" office:value="4640242181424"/>
          <table:table-cell office:value-type="string" office:string-value="Снеки «Мини-чебуречки с мясом» Весовой ТМ «Зареченские» 5,5 кг"/>
          <table:table-cell office:value-type="float" office:value="1"/>
          <table:table-cell office:value-type="float" office:value="5.5"/>
          <table:table-cell office:value-type="float" office:value="12"/>
          <table:table-cell office:value-type="float" office:value="84"/>
          <table:table-cell table:number-columns-repeated="16367"/>
        </table:table-row>
        <table:table-row>
          <table:table-cell table:number-columns-repeated="2"/>
          <table:table-cell office:value-type="string" office:string-value="Мини-шарики с курочкой и сыром ТМ Зареченские ТС Зареченские продукты вес 3 кг МГ"/>
          <table:table-cell office:value-type="string" office:string-value="90 кг"/>
          <table:table-cell office:value-type="float" office:value="90"/>
          <table:table-cell office:value-type="float" office:value="90"/>
          <table:table-cell office:value-type="float" office:value="90"/>
          <table:table-cell office:value-type="float" office:value="0"/>
          <table:table-cell office:value-type="string" office:string-value="SU003448"/>
          <table:table-cell office:value-type="string" office:string-value="P004394"/>
          <table:table-cell office:value-type="float" office:value="4301135405"/>
          <table:table-cell office:value-type="float" office:value="4640242181523"/>
          <table:table-cell office:value-type="string" office:string-value="Снеки «Мини-шарики с курочкой и сыром» Весовой ТМ «Зареченские» 3 кг"/>
          <table:table-cell office:value-type="float" office:value="1"/>
          <table:table-cell office:value-type="float" office:value="3"/>
          <table:table-cell office:value-type="float" office:value="14"/>
          <table:table-cell office:value-type="float" office:value="126"/>
          <table:table-cell table:number-columns-repeated="16367"/>
        </table:table-row>
        <table:table-row>
          <table:table-cell table:number-columns-repeated="2"/>
          <table:table-cell office:value-type="string" office:string-value="Пекерсы с индейкой в сливочном соусе ТМ Горячая штучка ТС Пекерсы ф/п ф/в 0,25 кг НД4 МГ"/>
          <table:table-cell office:value-type="string" office:string-value="240  шт"/>
          <table:table-cell office:value-type="float" office:value="60"/>
          <table:table-cell office:value-type="float" office:value="240"/>
          <table:table-cell office:value-type="float" office:value="60"/>
          <table:table-cell office:value-type="float" office:value="0"/>
          <table:table-cell office:value-type="string" office:string-value="SU003596"/>
          <table:table-cell office:value-type="string" office:string-value="P004594"/>
          <table:table-cell office:value-type="float" office:value="4301135570"/>
          <table:table-cell office:value-type="float" office:value="4607111035806"/>
          <table:table-cell office:value-type="string" office:string-value="Снеки «Пекерсы с индейкой в сливочном соусе» Фикс.вес 0,25 Пакет ТМ «Горячая штучка»"/>
          <table:table-cell office:value-type="float" office:value="0.25"/>
          <table:table-cell office:value-type="float" office:value="12"/>
          <table:table-cell office:value-type="float" office:value="14"/>
          <table:table-cell office:value-type="float" office:value="70"/>
          <table:table-cell table:number-columns-repeated="16367"/>
        </table:table-row>
        <table:table-row>
          <table:table-cell table:number-columns-repeated="2"/>
          <table:table-cell office:value-type="string" office:string-value="Пирожки с мясом ТМ Зареченские ТС Зареченские продукты вес 3,7 кг МГ"/>
          <table:table-cell office:value-type="string" office:string-value="148 кг"/>
          <table:table-cell office:value-type="float" office:value="148"/>
          <table:table-cell office:value-type="float" office:value="148"/>
          <table:table-cell office:value-type="float" office:value="148"/>
          <table:table-cell office:value-type="float" office:value="0"/>
          <table:table-cell office:value-type="string" office:string-value="SU003439"/>
          <table:table-cell office:value-type="string" office:string-value="P004359"/>
          <table:table-cell office:value-type="float" office:value="4301135375"/>
          <table:table-cell office:value-type="float" office:value="4640242181486"/>
          <table:table-cell office:value-type="string" office:string-value="«Пирожки с мясом» Весовые ТМ «Зареченские» 3,7 кг"/>
          <table:table-cell office:value-type="float" office:value="1"/>
          <table:table-cell office:value-type="float" office:value="3.7"/>
          <table:table-cell office:value-type="float" office:value="14"/>
          <table:table-cell office:value-type="float" office:value="126"/>
          <table:table-cell table:number-columns-repeated="16367"/>
        </table:table-row>
        <table:table-row>
          <table:table-cell table:number-columns-repeated="2"/>
          <table:table-cell office:value-type="string" office:string-value="Пирожки с мясом, картофелем и грибами ТМ Зареченские ТС Зареченские продукты вес 3,7 кг МГ"/>
          <table:table-cell office:value-type="string" office:string-value="88,8 кг"/>
          <table:table-cell office:value-type="float" office:value="88.8"/>
          <table:table-cell office:value-type="float" office:value="88.8"/>
          <table:table-cell office:value-type="float" office:value="88.8"/>
          <table:table-cell office:value-type="float" office:value="0"/>
          <table:table-cell office:value-type="string" office:string-value="SU003442"/>
          <table:table-cell office:value-type="string" office:string-value="P004391"/>
          <table:table-cell office:value-type="float" office:value="4301135402"/>
          <table:table-cell office:value-type="float" office:value="4640242181493"/>
          <table:table-cell office:value-type="string" office:string-value="Снеки «Пирожки с мясом, картофелем и грибами» Весовые ТМ «Зареченские» 3,7 кг"/>
          <table:table-cell office:value-type="float" office:value="1"/>
          <table:table-cell office:value-type="float" office:value="3.7"/>
          <table:table-cell office:value-type="float" office:value="14"/>
          <table:table-cell office:value-type="float" office:value="126"/>
          <table:table-cell table:number-columns-repeated="16367"/>
        </table:table-row>
        <table:table-row>
          <table:table-cell table:number-columns-repeated="2"/>
          <table:table-cell office:value-type="string" office:string-value="Хотстеры с сыром ТМ Горячая штучка ТС Хотстеры ф/в 0,25 кг ПГП2 МГ"/>
          <table:table-cell office:value-type="string" office:string-value="1480  шт"/>
          <table:table-cell office:value-type="float" office:value="370"/>
          <table:table-cell office:value-type="float" office:value="1480"/>
          <table:table-cell office:value-type="float" office:value="370"/>
          <table:table-cell office:value-type="float" office:value="0"/>
          <table:table-cell office:value-type="string" office:string-value="SU003944"/>
          <table:table-cell office:value-type="string" office:string-value="P005058"/>
          <table:table-cell office:value-type="float" office:value="4301135824"/>
          <table:table-cell office:value-type="float" office:value="4607111039095"/>
          <table:table-cell office:value-type="string" office:string-value="Снеки «Хотстеры с сыром» Фикс.вес 0,25 ТМ «Горячая штучка»"/>
          <table:table-cell office:value-type="float" office:value="0.25"/>
          <table:table-cell office:value-type="float" office:value="12"/>
          <table:table-cell office:value-type="float" office:value="14"/>
          <table:table-cell office:value-type="float" office:value="70"/>
          <table:table-cell table:number-columns-repeated="16367"/>
        </table:table-row>
        <table:table-row>
          <table:table-cell table:number-columns-repeated="2"/>
          <table:table-cell office:value-type="string" office:string-value="Хотстеры ТМ Горячая штучка ТС Хотстеры ф/п ф/в 0,25 кг НД2 ПГП2 МГ"/>
          <table:table-cell office:value-type="string" office:string-value="1800  шт"/>
          <table:table-cell office:value-type="float" office:value="450"/>
          <table:table-cell office:value-type="float" office:value="1800"/>
          <table:table-cell office:value-type="float" office:value="450"/>
          <table:table-cell office:value-type="float" office:value="0"/>
          <table:table-cell office:value-type="string" office:string-value="SU003576"/>
          <table:table-cell office:value-type="string" office:string-value="P004489"/>
          <table:table-cell office:value-type="float" office:value="4301135550"/>
          <table:table-cell office:value-type="float" office:value="4607111034199"/>
          <table:table-cell office:value-type="string" office:string-value="Снеки «Хотстеры» Фикс.вес 0,25 Пакет ТМ «Горячая штучка»"/>
          <table:table-cell office:value-type="float" office:value="0.25"/>
          <table:table-cell office:value-type="float" office:value="12"/>
          <table:table-cell office:value-type="float" office:value="14"/>
          <table:table-cell office:value-type="float" office:value="70"/>
          <table:table-cell table:number-columns-repeated="16367"/>
        </table:table-row>
        <table:table-row>
          <table:table-cell table:number-columns-repeated="2"/>
          <table:table-cell office:value-type="string" office:string-value="Чебупели Курочка гриль ТМ Горячая штучка ф/п ф/в 0,3 кг НД МГ"/>
          <table:table-cell office:value-type="string" office:string-value="5000 шт"/>
          <table:table-cell office:value-type="float" office:value="1500"/>
          <table:table-cell office:value-type="float" office:value="5000"/>
          <table:table-cell office:value-type="float" office:value="1500"/>
          <table:table-cell office:value-type="float" office:value="0"/>
          <table:table-cell office:value-type="string" office:string-value="SU002293"/>
          <table:table-cell office:value-type="string" office:string-value="P004113"/>
          <table:table-cell office:value-type="float" office:value="4301135285"/>
          <table:table-cell office:value-type="float" office:value="4607111036407"/>
          <table:table-cell office:value-type="string" office:string-value="Чебупели Курочка гриль Базовый ассортимент Фикс.вес 0,3 Пакет Горячая штучка"/>
          <table:table-cell office:value-type="float" office:value="0.3"/>
          <table:table-cell office:value-type="float" office:value="14"/>
          <table:table-cell office:value-type="float" office:value="14"/>
          <table:table-cell office:value-type="float" office:value="70"/>
          <table:table-cell table:number-columns-repeated="16367"/>
        </table:table-row>
        <table:table-row>
          <table:table-cell table:number-columns-repeated="2"/>
          <table:table-cell office:value-type="string" office:string-value="Чебупицца курочка по-итальянски ТМ Горячая штучка ТС Чебупицца ф/п ф/в 0,25 кг НД ПГП2 МГ"/>
          <table:table-cell office:value-type="string" office:string-value="3200 шт"/>
          <table:table-cell office:value-type="float" office:value="800"/>
          <table:table-cell office:value-type="float" office:value="3200"/>
          <table:table-cell office:value-type="float" office:value="800"/>
          <table:table-cell office:value-type="float" office:value="0"/>
          <table:table-cell office:value-type="string" office:string-value="SU003578"/>
          <table:table-cell office:value-type="string" office:string-value="P004484"/>
          <table:table-cell office:value-type="float" office:value="4301135555"/>
          <table:table-cell office:value-type="float" office:value="4607111034014"/>
          <table:table-cell office:value-type="string" office:string-value="Снеки «Чебупицца курочка По-итальянски» Фикс.вес 0,25 Пакет ТМ «Горячая штучка»"/>
          <table:table-cell office:value-type="float" office:value="0.25"/>
          <table:table-cell office:value-type="float" office:value="12"/>
          <table:table-cell office:value-type="float" office:value="14"/>
          <table:table-cell office:value-type="float" office:value="70"/>
          <table:table-cell table:number-columns-repeated="16367"/>
        </table:table-row>
        <table:table-row>
          <table:table-cell table:number-columns-repeated="2"/>
          <table:table-cell office:value-type="string" office:string-value="Чебупицца Пепперони ТМ Горячая штучка ТС Чебупицца ф/п ф/в 0,25 кг НД МГ"/>
          <table:table-cell office:value-type="string" office:string-value="3600  шт"/>
          <table:table-cell office:value-type="float" office:value="900"/>
          <table:table-cell office:value-type="float" office:value="3600"/>
          <table:table-cell office:value-type="float" office:value="900"/>
          <table:table-cell office:value-type="float" office:value="0"/>
          <table:table-cell office:value-type="string" office:string-value="SU003580"/>
          <table:table-cell office:value-type="string" office:string-value="P004486"/>
          <table:table-cell office:value-type="float" office:value="4301135532"/>
          <table:table-cell office:value-type="float" office:value="4607111033994"/>
          <table:table-cell office:value-type="string" office:string-value="Снеки «Чебупицца Пепперони» Фикс.вес 0,25 Пакет ТМ «Горячая штучка»"/>
          <table:table-cell office:value-type="float" office:value="0.25"/>
          <table:table-cell office:value-type="float" office:value="12"/>
          <table:table-cell office:value-type="float" office:value="14"/>
          <table:table-cell office:value-type="float" office:value="70"/>
          <table:table-cell table:number-columns-repeated="16367"/>
        </table:table-row>
        <table:table-row>
          <table:table-cell table:number-columns-repeated="2"/>
          <table:table-cell office:value-type="string" office:string-value="Готовые чебуреки с мясом ТМ Горячая штучка ф/п шт 0,09 кг НД3 ПГП2 МГ"/>
          <table:table-cell office:value-type="string" office:string-value="450 шт"/>
          <table:table-cell office:value-type="float" office:value="40.5"/>
          <table:table-cell office:value-type="float" office:value="450"/>
          <table:table-cell office:value-type="float" office:value="40.5"/>
          <table:table-cell office:value-type="float" office:value="0"/>
          <table:table-cell office:value-type="string" office:string-value="SU002573"/>
          <table:table-cell office:value-type="string" office:string-value="P004138"/>
          <table:table-cell office:value-type="float" office:value="4301136070"/>
          <table:table-cell office:value-type="float" office:value="4607025784012"/>
          <table:table-cell office:value-type="string" office:string-value="Чебуреки с мясом Базовый ассортимент Штучка 0,09 Пленка Горячая штучка"/>
          <table:table-cell office:value-type="float" office:value="0.09"/>
          <table:table-cell office:value-type="float" office:value="24"/>
          <table:table-cell office:value-type="float" office:value="14"/>
          <table:table-cell office:value-type="float" office:value="126"/>
          <table:table-cell table:number-columns-repeated="16367"/>
        </table:table-row>
        <table:table-row>
          <table:table-cell table:number-columns-repeated="2"/>
          <table:table-cell office:value-type="string" office:string-value="Готовые чебуреки со свининой и говядиной ТМ Горячая штучка ф/п ф/в 0,36 кг НД4 ПГП2 МГ"/>
          <table:table-cell office:value-type="string" office:string-value="180 шт"/>
          <table:table-cell office:value-type="float" office:value="64.8"/>
          <table:table-cell office:value-type="float" office:value="180"/>
          <table:table-cell office:value-type="float" office:value="64.8"/>
          <table:table-cell office:value-type="float" office:value="0"/>
          <table:table-cell office:value-type="string" office:string-value="SU003613"/>
          <table:table-cell office:value-type="string" office:string-value="P004583"/>
          <table:table-cell office:value-type="float" office:value="4301136079"/>
          <table:table-cell office:value-type="float" office:value="4607025784319"/>
          <table:table-cell office:value-type="string" office:string-value="Чебуреки «Чебуреки со свининой и говядиной» Фикс.вес 0,36 Пакет ТМ «Горячая штучка»"/>
          <table:table-cell office:value-type="float" office:value="0.36"/>
          <table:table-cell office:value-type="float" office:value="10"/>
          <table:table-cell office:value-type="float" office:value="14"/>
          <table:table-cell office:value-type="float" office:value="70"/>
          <table:table-cell table:number-columns-repeated="16367"/>
        </table:table-row>
        <table:table-row>
          <table:table-cell table:number-columns-repeated="2"/>
          <table:table-cell office:value-type="string" office:string-value="Сочный мегачебурек ТМ Зареченские ТС Зареченские продукты вес 2,24 кг ПГП2 МГ"/>
          <table:table-cell office:value-type="string" office:string-value="67,2 кг"/>
          <table:table-cell office:value-type="float" office:value="67.2"/>
          <table:table-cell office:value-type="float" office:value="67.2"/>
          <table:table-cell office:value-type="float" office:value="67.2"/>
          <table:table-cell office:value-type="float" office:value="0"/>
          <table:table-cell office:value-type="string" office:string-value="SU003025"/>
          <table:table-cell office:value-type="string" office:string-value="P003495"/>
          <table:table-cell office:value-type="float" office:value="4301136052"/>
          <table:table-cell office:value-type="float" office:value="4640242180410"/>
          <table:table-cell office:value-type="string" office:string-value="Чебуреки «Сочный мегачебурек» Весовой ТМ «Зареченские» 2,24 кг"/>
          <table:table-cell office:value-type="float" office:value="1"/>
          <table:table-cell office:value-type="float" office:value="2.2400000000000002"/>
          <table:table-cell office:value-type="float" office:value="14"/>
          <table:table-cell office:value-type="float" office:value="126"/>
          <table:table-cell table:number-columns-repeated="16367"/>
        </table:table-row>
        <table:table-row>
          <table:table-cell table:number-columns-repeated="2"/>
          <table:table-cell office:value-type="string" office:string-value="Чебуреки Мясные ТМ Зареченские ТС Зареченские продукты вес 2,7 кг ПГП2 МГ"/>
          <table:table-cell office:value-type="string" office:string-value="97,2 кг"/>
          <table:table-cell office:value-type="float" office:value="97.2"/>
          <table:table-cell office:value-type="float" office:value="97.2"/>
          <table:table-cell office:value-type="float" office:value="97.2"/>
          <table:table-cell office:value-type="float" office:value="0"/>
          <table:table-cell office:value-type="string" office:string-value="SU003012"/>
          <table:table-cell office:value-type="string" office:string-value="P003478"/>
          <table:table-cell office:value-type="float" office:value="4301136051"/>
          <table:table-cell office:value-type="float" office:value="4640242180304"/>
          <table:table-cell office:value-type="string" office:string-value="Чебуреки «Мясные» Весовые ТМ «Зареченские» 2,7 кг"/>
          <table:table-cell office:value-type="float" office:value="1"/>
          <table:table-cell office:value-type="float" office:value="2.7"/>
          <table:table-cell office:value-type="float" office:value="14"/>
          <table:table-cell office:value-type="float" office:value="126"/>
          <table:table-cell table:number-columns-repeated="16367"/>
        </table:table-row>
        <table:table-row>
          <table:table-cell table:number-columns-repeated="2"/>
          <table:table-cell office:value-type="string" office:string-value="Чебуреки Сочные ТМ Зареченские ТС Зареченские продукты вес 5 кг ПГП2 МГ"/>
          <table:table-cell office:value-type="string" office:string-value="180  кг"/>
          <table:table-cell office:value-type="float" office:value="180"/>
          <table:table-cell office:value-type="float" office:value="180"/>
          <table:table-cell office:value-type="float" office:value="180"/>
          <table:table-cell office:value-type="float" office:value="0"/>
          <table:table-cell office:value-type="string" office:string-value="SU003010"/>
          <table:table-cell office:value-type="string" office:string-value="P003476"/>
          <table:table-cell office:value-type="float" office:value="4301136053"/>
          <table:table-cell office:value-type="float" office:value="4640242180236"/>
          <table:table-cell office:value-type="string" office:string-value="Чебуреки «Сочные» Весовые ТМ «Зареченские» 5 кг"/>
          <table:table-cell office:value-type="float" office:value="1"/>
          <table:table-cell office:value-type="float" office:value="5"/>
          <table:table-cell office:value-type="float" office:value="12"/>
          <table:table-cell office:value-type="float" office:value="84"/>
          <table:table-cell table:number-columns-repeated="16367"/>
        </table:table-row>
        <table:table-row>
          <table:table-cell table:number-columns-repeated="2"/>
          <table:table-cell office:value-type="string" office:string-value="итого в кг"/>
          <table:table-cell/>
          <table:table-cell office:value-type="float" office:value="12484.5"/>
          <table:table-cell/>
          <table:table-cell office:value-type="float" office:value="11944.5"/>
          <table:table-cell table:number-columns-repeated="16377"/>
        </table:table-row>
        <table:table-row table:number-rows-repeated="1048522">
          <table:table-cell table:number-columns-repeated="16377"/>
        </table:table-row>
      </table:table>
      <table:table table:name="'file:///D:/Father/Work/2025_05/РАБОЧИЙ%20СТОЛ/16,01,26%20ПОКОМ%20ЗПФ%20Коныгин/(отмена)рассчет%20заказ%20СТВ%20ПГП%20и%20ЗПФ.ods'#Лист2" table:style-name="ta2">
        <table:table-source xlink:href="file:///D:/Father/Work/2025_05/РАБОЧИЙ%20СТОЛ/16,01,26%20ПОКОМ%20ЗПФ%20Коныгин/(отмена)рассчет%20заказ%20СТВ%20ПГП%20и%20ЗПФ.ods" table:table-name="Лист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Father/Work/2025_05/РАБОЧИЙ%20СТОЛ/16,01,26%20ПОКОМ%20ЗПФ%20Коныгин/(отмена)рассчет%20заказ%20СТВ%20ПГП%20и%20ЗПФ.ods'#Лист3" table:style-name="ta2">
        <table:table-source xlink:href="file:///D:/Father/Work/2025_05/РАБОЧИЙ%20СТОЛ/16,01,26%20ПОКОМ%20ЗПФ%20Коныгин/(отмена)рассчет%20заказ%20СТВ%20ПГП%20и%20ЗПФ.ods" table:table-name="Лист3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6P0">
      <number:number number:decimal-places="0" number:min-integer-digits="1">
        <number:embedded-text number:position="0"> </number:embedded-text>
      </number:number>
    </number:number-style>
    <number:number-style style:name="N36">
      <style:text-properties fo:color="#FF0000"/>
      <number:text>-</number:text>
      <number:number number:decimal-places="0" number:min-integer-digits="1">
        <number:embedded-text number:position="0"> </number:embedded-text>
      </number:number>
      <style:map style:condition="value()&gt;=0" style:apply-style-name="N36P0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127</meta:generator>
    <meta:initial-creator>Андрей </meta:initial-creator>
    <dc:creator>User</dc:creator>
    <meta:creation-date>2026-01-15T10:23:26Z</meta:creation-date>
    <dc:date>2026-01-16T15:59:34Z</dc:date>
    <meta:editing-cycles>5</meta:editing-cycles>
    <meta:editing-duration>PT11814S</meta:editing-duration>
  </office:meta>
</office:document-meta>
</file>
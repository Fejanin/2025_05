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yr" svg:font-family="&quot;Arial Cyr&quot;"/>
    <style:font-face style:name="Arial Cyr1" svg:font-family="&quot;Arial Cyr1&quot;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1">
      <style:table-cell-properties fo:border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Cyr1" style:font-name-asian="Arial Cyr1" style:font-name-complex="Arial Cyr1" fo:font-size="7pt" style:font-size-asian="7pt" style:font-size-complex="7pt" fo:font-weight="bold" style:font-weight-asian="bold" style:font-weight-complex="bold"/>
    </style:style>
    <style:style style:name="ce3" style:family="table-cell" style:parent-style-name="Excel_32_Built-in_32_Normal" style:data-style-name="N41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41">
      <style:table-cell-properties style:vertical-align="automatic" fo:background-color="transparent" style:cell-protect="hidden-and-protected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hidden-and-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41">
      <style:table-cell-properties style:vertical-align="automatic" fo:background-color="transparent" style:cell-protect="hidden-and-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41">
      <style:table-cell-properties style:vertical-align="automatic" fo:background-color="transparent" style:cell-protect="hidden-and-protected" style:repeat-content="false"/>
      <style:paragraph-properties fo:text-align="center"/>
      <style:text-properties fo:color="#000000" style:font-name="Arial Cyr" style:font-name-asian="Arial Cyr" style:font-name-complex="Arial Cyr" fo:font-size="8pt" style:font-size-asian="8pt" style:font-size-complex="8pt" fo:font-weight="bold" style:font-weight-asian="bold" style:font-weight-complex="bold"/>
    </style:style>
    <style:style style:name="ce8" style:family="table-cell" style:parent-style-name="Excel_32_Built-in_32_Normal" style:data-style-name="N41">
      <style:table-cell-properties style:vertical-align="automatic" fo:background-color="transparent" style:cell-protect="formula-hidden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8">
      <style:table-cell-properties fo:border-top="thin solid #651C32" fo:border-bottom="thin solid #651C32" fo:border-left="none" fo:border-right="thin solid #651C32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/>
    </style:style>
    <style:style style:name="ce10" style:family="table-cell" style:parent-style-name="_1054__1073__1099__1095__1085__1099__1081__32_2" style:data-style-name="N38">
      <style:table-cell-properties fo:border="thin solid #651C32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11" style:family="table-cell" style:parent-style-name="Excel_32_Built-in_32_Normal" style:data-style-name="N39">
      <style:table-cell-properties fo:border="thin solid #651C32" style:vertical-align="middle" fo:background-color="transparent" style:cell-protect="hidden-and-protected" style:repeat-content="false"/>
      <style:paragraph-properties fo:text-align="center"/>
      <style:text-properties fo:color="#000000" style:font-name="Arial Cyr" style:font-name-asian="Arial Cyr" style:font-name-complex="Arial Cyr" fo:font-size="8pt" style:font-size-asian="8pt" style:font-size-complex="8pt"/>
    </style:style>
    <style:style style:name="ce12" style:family="table-cell" style:parent-style-name="Excel_32_Built-in_32_Normal" style:data-style-name="N41">
      <style:table-cell-properties fo:border="thin solid #651C32" style:vertical-align="middle" fo:background-color="transparent" style:cell-protect="hidden-and-protected" style:repeat-content="false"/>
      <style:paragraph-properties fo:text-align="center"/>
      <style:text-properties fo:color="#000000" style:font-name="Arial Cyr" style:font-name-asian="Arial Cyr" style:font-name-complex="Arial Cyr" fo:font-size="8pt" style:font-size-asian="8pt" style:font-size-complex="8pt"/>
    </style:style>
    <style:style style:name="ce13" style:family="table-cell" style:parent-style-name="Excel_32_Built-in_32_Normal" style:data-style-name="N38">
      <style:table-cell-properties fo:border="thin solid #651C32" style:vertical-align="middle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8pt" style:font-size-asian="8pt" style:font-size-complex="8pt"/>
    </style:style>
    <style:style style:name="ce14" style:family="table-cell" style:parent-style-name="Excel_32_Built-in_32_Normal" style:data-style-name="N41">
      <style:table-cell-properties fo:border="thin solid #651C32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8pt" style:font-size-asian="8pt" style:font-size-complex="8pt"/>
    </style:style>
    <style:style style:name="ce15" style:family="table-cell" style:parent-style-name="Excel_32_Built-in_32_Normal" style:data-style-name="N41">
      <style:table-cell-properties fo:border="thin solid #651C32" style:vertical-align="automatic" fo:background-color="transparent" style:cell-protect="hidden-and-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6" style:family="table-cell" style:parent-style-name="Excel_32_Built-in_32_Normal" style:data-style-name="N40">
      <style:table-cell-properties fo:border="thin solid #651C32" style:vertical-align="automatic" fo:background-color="transparent" style:cell-protect="protected" style:repeat-content="false"/>
      <style:paragraph-properties fo:text-align="end" fo:margin-right="0cm"/>
      <style:text-properties fo:color="#000000" style:font-name="Arial Cyr1" style:font-name-asian="Arial Cyr1" style:font-name-complex="Arial Cyr1" fo:font-size="10pt" style:font-size-asian="10pt" style:font-size-complex="10pt"/>
    </style:style>
    <style:style style:name="ce17" style:family="table-cell" style:parent-style-name="Excel_32_Built-in_32_Normal" style:data-style-name="N41">
      <style:table-cell-properties fo:border="thin solid #651C32" style:vertical-align="automatic" fo:background-color="#FFA100" style:cell-protect="hidden-and-protected" style:repeat-content="false"/>
      <style:paragraph-properties fo:text-align="center"/>
      <style:text-properties fo:color="#651C32" style:font-name="Arial Cyr" style:font-name-asian="Arial Cyr" style:font-name-complex="Arial Cyr" fo:font-size="10pt" style:font-size-asian="10pt" style:font-size-complex="10pt"/>
    </style:style>
    <style:style style:name="ce18" style:family="table-cell" style:parent-style-name="Excel_32_Built-in_32_Normal" style:data-style-name="N40">
      <style:table-cell-properties fo:border="thin solid #651C32" style:vertical-align="automatic" fo:background-color="#FFA100" style:cell-protect="protected" style:repeat-content="false"/>
      <style:paragraph-properties fo:text-align="end" fo:margin-right="0cm"/>
      <style:text-properties fo:color="#651C32" style:font-name="Arial Cyr" style:font-name-asian="Arial Cyr" style:font-name-complex="Arial Cyr" fo:font-size="8pt" style:font-size-asian="8pt" style:font-size-complex="8pt" fo:font-weight="bold" style:font-weight-asian="bold" style:font-weight-complex="bold"/>
    </style:style>
    <style:style style:name="ce19" style:family="table-cell" style:parent-style-name="Excel_32_Built-in_32_Normal" style:data-style-name="N36">
      <style:table-cell-properties fo:border="thin solid #651C32" style:vertical-align="automatic" fo:background-color="#FFA100" style:cell-protect="protected" style:repeat-content="false"/>
      <style:paragraph-properties fo:text-align="end" fo:margin-right="0cm"/>
      <style:text-properties fo:color="#651C32" style:font-name="Arial Cyr" style:font-name-asian="Arial Cyr" style:font-name-complex="Arial Cyr" fo:font-size="8pt" style:font-size-asian="8pt" style:font-size-complex="8pt" fo:font-weight="bold" style:font-weight-asian="bold" style:font-weight-complex="bold"/>
    </style:style>
    <style:style style:name="ce20" style:family="table-cell" style:parent-style-name="Excel_32_Built-in_32_Normal" style:data-style-name="N41">
      <style:table-cell-properties fo:border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32_Built-in_32_Normal" style:data-style-name="N41">
      <style:table-cell-properties fo:border-top="thin solid #808080" fo:border-bottom="none" fo:border-left="thin solid #651C32" fo:border-right="thin solid #808080" style:vertical-align="middle" fo:wrap-option="wrap" fo:background-color="transparent" style:cell-protect="hidden-and-protected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22" style:family="table-cell" style:parent-style-name="_1054__1073__1099__1095__1085__1099__1081__32_2" style:data-style-name="N37">
      <style:table-cell-properties fo:border="thin solid #808080" style:vertical-align="middle" fo:background-color="transparent" style:cell-protect="hidden-and-protected" style:repeat-content="false"/>
      <style:paragraph-properties fo:text-align="center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41">
      <style:table-cell-properties fo:border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Cyr1" style:font-name-asian="Arial Cyr1" style:font-name-complex="Arial Cyr1" fo:font-size="8pt" style:font-size-asian="8pt" style:font-size-complex="8pt" fo:font-weight="bold" style:font-weight-asian="bold" style:font-weight-complex="bold"/>
    </style:style>
    <style:style style:name="ce24" style:family="table-cell" style:parent-style-name="Excel_32_Built-in_32_Normal" style:data-style-name="N41">
      <style:table-cell-properties fo:border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Cyr1" style:font-name-asian="Arial Cyr1" style:font-name-complex="Arial Cyr1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32_Built-in_32_Normal" style:data-style-name="N41">
      <style:table-cell-properties fo:border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Cyr1" style:font-name-asian="Arial Cyr1" style:font-name-complex="Arial Cyr1" fo:font-size="7pt" style:font-size-asian="7pt" style:font-size-complex="7pt" fo:font-weight="bold" style:font-weight-asian="bold" style:font-weight-complex="bold"/>
    </style:style>
    <style:style style:name="ce26" style:family="table-cell" style:parent-style-name="_1054__1073__1099__1095__1085__1099__1081__32_2" style:data-style-name="N41">
      <style:table-cell-properties fo:border="thin solid #651C32" style:vertical-align="middle" fo:wrap-option="wrap" fo:background-color="#FFA100" style:cell-protect="formula-hidden" style:repeat-content="false"/>
      <style:paragraph-properties fo:text-align="center"/>
      <style:text-properties fo:color="#651C32" style:font-name="Arial Cyr1" style:font-name-asian="Arial Cyr1" style:font-name-complex="Arial Cyr1" fo:font-size="8pt" style:font-size-asian="8pt" style:font-size-complex="8pt" fo:font-weight="bold" style:font-weight-asian="bold" style:font-weight-complex="bold"/>
    </style:style>
    <style:style style:name="ce27" style:family="table-cell" style:parent-style-name="Excel_32_Built-in_32_Normal" style:data-style-name="N38">
      <style:table-cell-properties fo:border="thin solid #651C32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/>
    </style:style>
    <style:style style:name="ce28" style:family="table-cell" style:parent-style-name="Excel_32_Built-in_32_Normal" style:data-style-name="N41">
      <style:table-cell-properties fo:border-top="thin solid #651C32" fo:border-bottom="thin solid #000000" fo:border-left="thin solid #651C32" fo:border-right="thin solid #651C32" style:vertical-align="middle" fo:wrap-option="wrap" fo:background-color="transparent" style:cell-protect="protected" style:repeat-content="false"/>
      <style:paragraph-properties fo:text-align="start" fo:margin-left="0cm"/>
      <style:text-properties fo:color="#0000FF" style:font-name="Arial Cyr" style:font-name-asian="Arial Cyr" style:font-name-complex="Arial Cyr" fo:font-size="8pt" style:font-size-asian="8pt" style:font-size-complex="8pt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fo:background-color="#FFA100"/>
    </style:style>
    <style:style style:name="ce30" style:family="table-cell" style:parent-style-name="Excel_32_Built-in_32_Normal" style:data-style-name="N41">
      <style:table-cell-properties fo:border="thin solid #000000" style:vertical-align="automatic" fo:background-color="#FFA100" style:cell-protect="hidden-and-protected" style:repeat-content="false"/>
      <style:paragraph-properties fo:text-align="end" fo:margin-right="0cm"/>
      <style:text-properties fo:color="#651C32" style:font-name="Arial Cyr" style:font-name-asian="Arial Cyr" style:font-name-complex="Arial Cyr" fo:font-size="8pt" style:font-size-asian="8pt" style:font-size-complex="8pt" fo:font-weight="bold" style:font-weight-asian="bold" style:font-weight-complex="bold"/>
    </style:style>
    <style:style style:name="ce31" style:family="table-cell" style:parent-style-name="Excel_32_Built-in_32_Normal" style:data-style-name="N41">
      <style:table-cell-properties fo:border-top="thin solid #651C32" fo:border-bottom="thin solid #000000" fo:border-left="thin solid #651C32" fo:border-right="thin solid #651C32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8pt" style:font-size-asian="8pt" style:font-size-complex="8pt"/>
    </style:style>
    <style:style style:name="ce32" style:family="table-cell" style:parent-style-name="Default" style:data-style-name="N0">
      <style:table-cell-properties fo:border-top="none" fo:border-bottom="none" fo:border-left="none" fo:border-right="thin solid #651C32" fo:background-color="#FFA100"/>
    </style:style>
    <style:style style:name="ce33" style:family="table-cell" style:parent-style-name="Excel_32_Built-in_32_Normal" style:data-style-name="N41">
      <style:table-cell-properties fo:border="thin solid #651C32" style:vertical-align="automatic" fo:background-color="#FFA100" style:cell-protect="hidden-and-protected" style:repeat-content="false"/>
      <style:paragraph-properties fo:text-align="start" fo:margin-left="0cm"/>
      <style:text-properties fo:color="#651C32" style:font-name="Arial Cyr" style:font-name-asian="Arial Cyr" style:font-name-complex="Arial Cyr" fo:font-size="8pt" style:font-size-asian="8pt" style:font-size-complex="8pt" fo:font-weight="bold" style:font-weight-asian="bold" style:font-weight-complex="bold"/>
    </style:style>
    <style:style style:name="ce34" style:family="table-cell" style:parent-style-name="Excel_32_Built-in_32_Normal" style:data-style-name="N41">
      <style:table-cell-properties fo:border-top="thin solid #808080" fo:border-bottom="none" fo:border-left="thin solid #651C32" fo:border-right="thin solid #808080" style:vertical-align="middle" fo:wrap-option="wrap" fo:background-color="transparent" style:cell-protect="hidden-and-protected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35" style:family="table-cell" style:parent-style-name="Excel_32_Built-in_32_Normal" style:data-style-name="N41">
      <style:table-cell-properties fo:border-top="thin solid #651C32" fo:border-bottom="none" fo:border-left="thin solid #651C32" fo:border-right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808080" fo:border-bottom="none" fo:border-left="thin solid #651C32" fo:border-right="thin solid #651C32" fo:background-color="transparent"/>
    </style:style>
    <style:style style:name="ce37" style:family="table-cell" style:parent-style-name="Excel_32_Built-in_32_Normal" style:data-style-name="N41">
      <style:table-cell-properties fo:border-top="thin solid #808080" fo:border-bottom="thin solid #808080" fo:border-left="thin solid #651C32" fo:border-right="thin solid #651C32" style:vertical-align="middle" fo:wrap-option="wrap" fo:background-color="transparent" style:cell-protect="hidden-and-protected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38" style:family="table-cell" style:parent-style-name="Default" style:data-style-name="N0">
      <style:table-cell-properties fo:border-top="thin solid #808080" fo:border-bottom="thin solid #808080" fo:border-left="thin solid #651C32" fo:border-right="thin solid #651C32" fo:background-color="transparent"/>
    </style:style>
    <style:style style:name="ce39" style:family="table-cell" style:parent-style-name="Excel_32_Built-in_32_Normal" style:data-style-name="N41">
      <style:table-cell-properties fo:border-top="thin solid #808080" fo:border-bottom="thin solid #808080" fo:border-left="thin solid #651C32" fo:border-right="thin solid #808080" style:vertical-align="middle" fo:wrap-option="wrap" fo:background-color="transparent" style:cell-protect="hidden-and-protected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40" style:family="table-cell" style:parent-style-name="Excel_32_Built-in_32_Normal" style:data-style-name="N41">
      <style:table-cell-properties fo:border="thin solid #651C32" style:vertical-align="middle" fo:wrap-option="wrap" fo:background-color="#FFA100" style:cell-protect="hidden-and-protected" style:repeat-content="false"/>
      <style:paragraph-properties fo:text-align="center"/>
      <style:text-properties fo:color="#651C32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41" style:family="table-cell" style:parent-style-name="Excel_32_Built-in_32_Normal" style:data-style-name="N41">
      <style:table-cell-properties fo:border-top="thin solid #808080" fo:border-bottom="none" fo:border-left="thin solid #651C32" fo:border-right="thin solid #651C32" style:vertical-align="middle" fo:wrap-option="wrap" fo:background-color="transparent" style:cell-protect="hidden-and-protected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42" style:family="table-cell" style:parent-style-name="Default" style:data-style-name="N0">
      <style:table-cell-properties fo:border-top="thin solid #651C32" fo:border-bottom="none" fo:border-left="none" fo:border-right="thin solid #000000" fo:background-color="#FFA100"/>
    </style:style>
    <style:style style:name="ce43" style:family="table-cell" style:parent-style-name="Excel_32_Built-in_32_Normal" style:data-style-name="N41">
      <style:table-cell-properties fo:border-top="thin solid #000000" fo:border-bottom="thin solid #651C32" fo:border-left="thin solid #651C32" fo:border-right="thin solid #651C32" style:vertical-align="automatic" fo:background-color="#FFA100" style:cell-protect="hidden-and-protected" style:repeat-content="false"/>
      <style:paragraph-properties fo:text-align="start" fo:margin-left="0cm"/>
      <style:text-properties fo:color="#651C32" style:font-name="Arial Cyr" style:font-name-asian="Arial Cyr" style:font-name-complex="Arial Cyr" fo:font-size="8pt" style:font-size-asian="8pt" style:font-size-complex="8pt" fo:font-weight="bold" style:font-weight-asian="bold" style:font-weight-complex="bold"/>
    </style:style>
    <style:style style:name="ce44" style:family="table-cell" style:parent-style-name="Excel_32_Built-in_32_Normal" style:data-style-name="N41">
      <style:table-cell-properties fo:border-top="thin solid #000000" fo:border-bottom="thin solid #000000" fo:border-left="thin solid #651C32" fo:border-right="thin solid #651C32" style:vertical-align="middle" fo:wrap-option="wrap" fo:background-color="transparent" style:cell-protect="protected" style:repeat-content="false"/>
      <style:paragraph-properties fo:text-align="start" fo:margin-left="0cm"/>
      <style:text-properties fo:color="#0000FF" style:font-name="Arial Cyr" style:font-name-asian="Arial Cyr" style:font-name-complex="Arial Cyr" fo:font-size="8pt" style:font-size-asian="8pt" style:font-size-complex="8pt"/>
    </style:style>
    <style:style style:name="ce45" style:family="table-cell" style:parent-style-name="Excel_32_Built-in_32_Normal" style:data-style-name="N41">
      <style:table-cell-properties fo:border-top="thin solid #000000" fo:border-bottom="thin solid #000000" fo:border-left="thin solid #651C32" fo:border-right="thin solid #651C32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8pt" style:font-size-asian="8pt" style:font-size-complex="8pt"/>
    </style:style>
    <style:style style:name="T1" style:family="text" style:parent-style-name="Default">
      <style:text-properties fo:color="#651C32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charset="x-symbol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45520833333333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21708333333333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1.71979166666667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1" table:default-cell-style-name="ce6"/>
        <table:table-column table:style-name="co9" table:number-columns-repeated="2" table:default-cell-style-name="ce6"/>
        <table:table-column table:style-name="co7" table:default-cell-style-name="ce6"/>
        <table:table-column table:style-name="co10" table:default-cell-style-name="ce6" table:visibility="collapse"/>
        <table:table-column table:style-name="co11" table:default-cell-style-name="ce5"/>
        <table:table-column table:style-name="co12" table:default-cell-style-name="ce7"/>
        <table:table-column table:style-name="co13" table:default-cell-style-name="ce7"/>
        <table:table-column table:style-name="co14" table:default-cell-style-name="ce4"/>
        <table:table-column table:style-name="co15" table:default-cell-style-name="ce4"/>
        <table:table-column table:style-name="co2" table:default-cell-style-name="ce8"/>
        <table:table-column table:style-name="co11" table:default-cell-style-name="ce8"/>
        <table:table-column table:style-name="co7" table:default-cell-style-name="ce8"/>
        <table:table-column table:style-name="co6" table:default-cell-style-name="ce8"/>
        <table:table-column table:style-name="co16" table:number-columns-repeated="2" table:default-cell-style-name="ce4"/>
        <table:table-column table:style-name="co17" table:number-columns-repeated="999" table:default-cell-style-name="ce3"/>
        <table:table-column table:style-name="co18" table:number-columns-repeated="15360" table:default-cell-style-name="ce1"/>
        <table:table-row table:style-name="ro1">
          <table:table-cell office:value-type="string" table:number-columns-spanned="1" table:number-rows-spanned="2" table:style-name="ce23">
            <text:p>Код единицы продаж</text:p>
          </table:table-cell>
          <table:table-cell office:value-type="string" table:number-columns-spanned="1" table:number-rows-spanned="2" table:style-name="ce23">
            <text:p>Код продукта</text:p>
          </table:table-cell>
          <table:table-cell office:value-type="string" table:number-columns-spanned="1" table:number-rows-spanned="2" table:style-name="ce24">
            <text:p>Номер варианта</text:p>
          </table:table-cell>
          <table:table-cell office:value-type="string" table:number-columns-spanned="2" table:number-rows-spanned="2" table:style-name="ce23">
            <text:p>Штрих-код</text:p>
          </table:table-cell>
          <table:covered-table-cell/>
          <table:table-cell office:value-type="string" table:number-columns-spanned="1" table:number-rows-spanned="2" table:style-name="ce23">
            <text:p>Вес нетто штуки, кг</text:p>
          </table:table-cell>
          <table:table-cell office:value-type="string" table:number-columns-spanned="1" table:number-rows-spanned="2" table:style-name="ce23">
            <text:p>Кол-во штук в коробе, шт</text:p>
          </table:table-cell>
          <table:table-cell office:value-type="string" table:number-columns-spanned="1" table:number-rows-spanned="2" table:style-name="ce23">
            <text:p>Вес нетто короба, кг</text:p>
          </table:table-cell>
          <table:table-cell office:value-type="string" table:number-columns-spanned="1" table:number-rows-spanned="2" table:style-name="ce23">
            <text:p>Вес брутто короба, кг</text:p>
          </table:table-cell>
          <table:table-cell office:value-type="string" table:number-columns-spanned="1" table:number-rows-spanned="2" table:style-name="ce23">
            <text:p>Кол-во кор. на паллте, шт</text:p>
          </table:table-cell>
          <table:table-cell office:value-type="string" table:number-columns-spanned="1" table:number-rows-spanned="2" table:style-name="ce23">
            <text:p>Коробов в слое</text:p>
          </table:table-cell>
          <table:table-cell office:value-type="string" table:number-columns-spanned="1" table:number-rows-spanned="2" table:style-name="ce23">
            <text:p>Квант заказа</text:p>
          </table:table-cell>
          <table:table-cell office:value-type="string" table:number-columns-spanned="1" table:number-rows-spanned="2" table:style-name="ce23">
            <text:p>Завод</text:p>
          </table:table-cell>
          <table:table-cell office:value-type="string" table:number-columns-spanned="1" table:number-rows-spanned="2" table:style-name="ce23">
            <text:p>Внешний код номенклатуры</text:p>
          </table:table-cell>
          <table:table-cell office:value-type="string" table:number-columns-spanned="1" table:number-rows-spanned="2" table:style-name="ce23">
            <text:p>Срок годности, сут.</text:p>
          </table:table-cell>
          <table:table-cell office:value-type="string" table:number-columns-spanned="5" table:number-rows-spanned="2" table:style-name="ce23">
            <text:p>Наименование</text:p>
          </table:table-cell>
          <table:covered-table-cell table:number-columns-repeated="4"/>
          <table:table-cell office:value-type="string" table:number-columns-spanned="2" table:number-rows-spanned="1" table:style-name="ce25">
            <text:p>Доступно к отгрузке</text:p>
          </table:table-cell>
          <table:covered-table-cell/>
          <table:table-cell office:value-type="string" table:number-columns-spanned="1" table:number-rows-spanned="2" table:style-name="ce23">
            <text:p>Ед. изм.</text:p>
          </table:table-cell>
          <table:table-cell office:value-type="string" table:number-columns-spanned="1" table:number-rows-spanned="2" table:style-name="ce26">
            <text:p>Заказ, кг</text:p>
          </table:table-cell>
          <table:table-cell office:value-type="string" table:number-columns-spanned="1" table:number-rows-spanned="2" table:style-name="ce26">
            <text:p>Заказ с округлением до короба</text:p>
          </table:table-cell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2">
            <text:p>начиная с</text:p>
          </table:table-cell>
          <table:table-cell office:value-type="string" table:style-name="ce2">
            <text:p>до</text:p>
          </table:table-cell>
          <table:covered-table-cell/>
          <table:covered-table-cell/>
          <table:covered-table-cell/>
          <table:table-cell table:number-columns-repeated="16359"/>
        </table:table-row>
        <table:table-row table:number-rows-repeated="2" table:style-name="ro1">
          <table:table-cell office:value-type="string" table:style-name="ce4">
            <text:p>Ядрена копоть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4004</text:p>
          </table:table-cell>
          <table:table-cell office:value-type="string" table:style-name="ce9">
            <text:p>P005154</text:p>
          </table:table-cell>
          <table:table-cell office:value-type="float" office:value="4301031446" table:style-name="ce10">
            <text:p>4301031446</text:p>
          </table:table-cell>
          <table:table-cell office:value-type="float" office:value="4680115887510" table:number-columns-spanned="2" table:number-rows-spanned="1" table:style-name="ce27">
            <text:p>4680115887510</text:p>
          </table:table-cell>
          <table:covered-table-cell/>
          <table:table-cell office:value-type="float" office:value="0.2" table:style-name="ce11">
            <text:p>0,200</text:p>
          </table:table-cell>
          <table:table-cell office:value-type="float" office:value="6" table:style-name="ce12">
            <text:p>6</text:p>
          </table:table-cell>
          <table:table-cell office:value-type="float" office:value="1.2" table:style-name="ce11">
            <text:p>1,200</text:p>
          </table:table-cell>
          <table:table-cell office:value-type="float" office:value="1.38" table:style-name="ce11">
            <text:p>1,3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Копченые колбасы «Колбаски Мини-колбаски со вкусом Мясо на углях» Фикс.вес 0,2 б/о ТМ «Ядрена копоть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6]=&quot;&quot;;0;CEILING(([.X6]/[.$H6]);1;1)*[.$H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188</text:p>
          </table:table-cell>
          <table:table-cell office:value-type="string" table:style-name="ce9">
            <text:p>P003827</text:p>
          </table:table-cell>
          <table:table-cell office:value-type="float" office:value="4301031278" table:style-name="ce10">
            <text:p>4301031278</text:p>
          </table:table-cell>
          <table:table-cell office:value-type="float" office:value="4680115886643" table:number-columns-spanned="2" table:number-rows-spanned="1" table:style-name="ce27">
            <text:p>4680115886643</text:p>
          </table:table-cell>
          <table:covered-table-cell/>
          <table:table-cell office:value-type="float" office:value="0.19" table:style-name="ce11">
            <text:p>0,190</text:p>
          </table:table-cell>
          <table:table-cell office:value-type="float" office:value="10" table:style-name="ce12">
            <text:p>10</text:p>
          </table:table-cell>
          <table:table-cell office:value-type="float" office:value="1.9" table:style-name="ce11">
            <text:p>1,900</text:p>
          </table:table-cell>
          <table:table-cell office:value-type="float" office:value="2" table:style-name="ce11">
            <text:p>2,0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Копченые колбасы «Рубленая» Фикс.вес 0,19 целлофан ТМ «Ядрена копоть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7]=&quot;&quot;;0;CEILING(([.X7]/[.$H7]);1;1)*[.$H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6]/[.H6];&quot;0&quot;)+IFERROR([.Y7]/[.H7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6:.Y7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664</text:p>
          </table:table-cell>
          <table:table-cell office:value-type="string" table:style-name="ce9">
            <text:p>P004653</text:p>
          </table:table-cell>
          <table:table-cell office:value-type="float" office:value="4301051866" table:style-name="ce10">
            <text:p>4301051866</text:p>
          </table:table-cell>
          <table:table-cell office:value-type="float" office:value="4680115885912" table:number-columns-spanned="2" table:number-rows-spanned="1" table:style-name="ce27">
            <text:p>4680115885912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3.18" table:style-name="ce11">
            <text:p>3,1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осиски «Классические» Фикс.вес 0,3 ц/о мгс ТМ «Ядрена копоть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1]=&quot;&quot;;0;CEILING(([.X11]/[.$H11]);1;1)*[.$H1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341</text:p>
          </table:table-cell>
          <table:table-cell office:value-type="string" table:style-name="ce9">
            <text:p>P003752</text:p>
          </table:table-cell>
          <table:table-cell office:value-type="float" office:value="4301051776" table:style-name="ce10">
            <text:p>4301051776</text:p>
          </table:table-cell>
          <table:table-cell office:value-type="float" office:value="4607091388237" table:number-columns-spanned="2" table:number-rows-spanned="1" table:style-name="ce27">
            <text:p>4607091388237</text:p>
          </table:table-cell>
          <table:covered-table-cell/>
          <table:table-cell office:value-type="float" office:value="0.42" table:style-name="ce11">
            <text:p>0,420</text:p>
          </table:table-cell>
          <table:table-cell office:value-type="float" office:value="6" table:style-name="ce12">
            <text:p>6</text:p>
          </table:table-cell>
          <table:table-cell office:value-type="float" office:value="2.52" table:style-name="ce11">
            <text:p>2,520</text:p>
          </table:table-cell>
          <table:table-cell office:value-type="float" office:value="2.766" table:style-name="ce11">
            <text:p>2,766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Классические Ядрена копоть Фикс.вес 0,42 ц/о мгс Ядрена копоть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2]=&quot;&quot;;0;CEILING(([.X12]/[.$H12]);1;1)*[.$H1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16</text:p>
          </table:table-cell>
          <table:table-cell office:value-type="string" table:style-name="ce9">
            <text:p>P005150</text:p>
          </table:table-cell>
          <table:table-cell office:value-type="float" office:value="4301052063" table:style-name="ce10">
            <text:p>4301052063</text:p>
          </table:table-cell>
          <table:table-cell office:value-type="float" office:value="4680115887350" table:number-columns-spanned="2" table:number-rows-spanned="1" table:style-name="ce27">
            <text:p>4680115887350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3.18" table:style-name="ce11">
            <text:p>3,1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Мясные для гриля» Фикс.вес 0,3 целлофан ТМ «Ядрена копоть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3]=&quot;&quot;;0;CEILING(([.X13]/[.$H13]);1;1)*[.$H1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665</text:p>
          </table:table-cell>
          <table:table-cell office:value-type="string" table:style-name="ce9">
            <text:p>P004642</text:p>
          </table:table-cell>
          <table:table-cell office:value-type="float" office:value="4301051863" table:style-name="ce10">
            <text:p>4301051863</text:p>
          </table:table-cell>
          <table:table-cell office:value-type="float" office:value="4680115885905" table:number-columns-spanned="2" table:number-rows-spanned="1" table:style-name="ce27">
            <text:p>4680115885905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3.18" table:style-name="ce11">
            <text:p>3,1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Сосиски с сыром» Фикс.вес 0,3 вискофан ТМ «Ядрена копоть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4]=&quot;&quot;;0;CEILING(([.X14]/[.$H14]);1;1)*[.$H1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152</text:p>
          </table:table-cell>
          <table:table-cell office:value-type="string" table:style-name="ce9">
            <text:p>P003878</text:p>
          </table:table-cell>
          <table:table-cell office:value-type="float" office:value="4301051851" table:style-name="ce10">
            <text:p>4301051851</text:p>
          </table:table-cell>
          <table:table-cell office:value-type="float" office:value="4607091388244" table:number-columns-spanned="2" table:number-rows-spanned="1" table:style-name="ce27">
            <text:p>4607091388244</text:p>
          </table:table-cell>
          <table:covered-table-cell/>
          <table:table-cell office:value-type="float" office:value="0.42" table:style-name="ce11">
            <text:p>0,420</text:p>
          </table:table-cell>
          <table:table-cell office:value-type="float" office:value="6" table:style-name="ce12">
            <text:p>6</text:p>
          </table:table-cell>
          <table:table-cell office:value-type="float" office:value="2.52" table:style-name="ce11">
            <text:p>2,520</text:p>
          </table:table-cell>
          <table:table-cell office:value-type="float" office:value="2.766" table:style-name="ce11">
            <text:p>2,766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Сосиски с сыром» Фикс.вес 0,42 ц/о мгс ТМ Ядрена копоть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]=&quot;&quot;;0;CEILING(([.X15]/[.$H15]);1;1)*[.$H1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1]/[.H11];&quot;0&quot;)+IFERROR([.Y12]/[.H12];&quot;0&quot;)+IFERROR([.Y13]/[.H13];&quot;0&quot;)+IFERROR([.Y14]/[.H14];&quot;0&quot;)+IFERROR([.Y15]/[.H15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1:.Y15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ыро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050</text:p>
          </table:table-cell>
          <table:table-cell office:value-type="string" table:style-name="ce9">
            <text:p>P002188</text:p>
          </table:table-cell>
          <table:table-cell office:value-type="float" office:value="4301032013" table:style-name="ce10">
            <text:p>4301032013</text:p>
          </table:table-cell>
          <table:table-cell office:value-type="float" office:value="4607091388503" table:number-columns-spanned="2" table:number-rows-spanned="1" table:style-name="ce27">
            <text:p>4607091388503</text:p>
          </table:table-cell>
          <table:covered-table-cell/>
          <table:table-cell office:value-type="float" office:value="0.05" table:style-name="ce11">
            <text:p>0,050</text:p>
          </table:table-cell>
          <table:table-cell office:value-type="float" office:value="12" table:style-name="ce12">
            <text:p>12</text:p>
          </table:table-cell>
          <table:table-cell office:value-type="float" office:value="0.6" table:style-name="ce11">
            <text:p>0,600</text:p>
          </table:table-cell>
          <table:table-cell office:value-type="float" office:value="0.82199999999999995" table:style-name="ce11">
            <text:p>0,82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АК</text:p>
          </table:table-cell>
          <table:table-cell table:style-name="ce13"/>
          <table:table-cell office:value-type="float" office:value="120" table:style-name="ce12">
            <text:p>120</text:p>
          </table:table-cell>
          <table:table-cell office:value-type="string" table:number-columns-spanned="5" table:number-rows-spanned="1" table:style-name="ce28">
            <text:p>С/к колбасы Мини-салями во вкусом бекона Ядрена копоть Фикс.вес 0,05 б/о Ядрена копоть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9]=&quot;&quot;;0;CEILING(([.X19]/[.$H19]);1;1)*[.$H1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9]/[.H19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9:.Y19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язанк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ГОСТ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0722</text:p>
          </table:table-cell>
          <table:table-cell office:value-type="string" table:style-name="ce9">
            <text:p>P003011</text:p>
          </table:table-cell>
          <table:table-cell office:value-type="float" office:value="4301011380" table:style-name="ce10">
            <text:p>4301011380</text:p>
          </table:table-cell>
          <table:table-cell office:value-type="float" office:value="4607091385670" table:number-columns-spanned="2" table:number-rows-spanned="1" table:style-name="ce27">
            <text:p>4607091385670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ареные колбасы Докторская ГОСТ Вязанка Весовые Вектор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00" table:style-name="ce16">
            <text:p>400,00<text:s/></text:p>
          </table:table-cell>
          <table:table-cell office:value-type="float" office:value="410.40000000000003" table:formula="of:=IFERROR(IF([.X25]=&quot;&quot;;0;CEILING(([.X25]/[.$H25]);1;1)*[.$H25]);&quot;&quot;)" table:style-name="ce16">
            <text:p>410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86</text:p>
          </table:table-cell>
          <table:table-cell office:value-type="string" table:style-name="ce9">
            <text:p>P003429</text:p>
          </table:table-cell>
          <table:table-cell office:value-type="float" office:value="4301011565" table:style-name="ce10">
            <text:p>4301011565</text:p>
          </table:table-cell>
          <table:table-cell office:value-type="float" office:value="4680115882539" table:number-columns-spanned="2" table:number-rows-spanned="1" table:style-name="ce27">
            <text:p>4680115882539</text:p>
          </table:table-cell>
          <table:covered-table-cell/>
          <table:table-cell office:value-type="float" office:value="0.37" table:style-name="ce11">
            <text:p>0,370</text:p>
          </table:table-cell>
          <table:table-cell office:value-type="float" office:value="10" table:style-name="ce12">
            <text:p>10</text:p>
          </table:table-cell>
          <table:table-cell office:value-type="float" office:value="3.7" table:style-name="ce11">
            <text:p>3,700</text:p>
          </table:table-cell>
          <table:table-cell office:value-type="float" office:value="3.89" table:style-name="ce11">
            <text:p>3,8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«Докторская ГОСТ» Фикс.вес 0,37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6]=&quot;&quot;;0;CEILING(([.X26]/[.$H26]);1;1)*[.$H2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485</text:p>
          </table:table-cell>
          <table:table-cell office:value-type="string" table:style-name="ce9">
            <text:p>P003008</text:p>
          </table:table-cell>
          <table:table-cell office:value-type="float" office:value="4301011382" table:style-name="ce10">
            <text:p>4301011382</text:p>
          </table:table-cell>
          <table:table-cell office:value-type="float" office:value="4607091385687" table:number-columns-spanned="2" table:number-rows-spanned="1" table:style-name="ce27">
            <text:p>4607091385687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Докторская ГОСТ Вязанка Фикс.вес 0,4 Вектор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60" table:style-name="ce16">
            <text:p>160,00<text:s/></text:p>
          </table:table-cell>
          <table:table-cell office:value-type="float" office:value="160" table:formula="of:=IFERROR(IF([.X27]=&quot;&quot;;0;CEILING(([.X27]/[.$H27]);1;1)*[.$H27]);&quot;&quot;)" table:style-name="ce16">
            <text:p>16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78" table:formula="of:=IFERROR([.Y25]/[.H25];&quot;0&quot;)+IFERROR([.Y26]/[.H26];&quot;0&quot;)+IFERROR([.Y27]/[.H27];&quot;0&quot;)" table:style-name="ce18">
            <text:p>78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570.40000000000009" table:formula="of:=IFERROR(SUM([.Y25:.Y27]);&quot;0&quot;)" table:style-name="ce18">
            <text:p>570,4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313</text:p>
          </table:table-cell>
          <table:table-cell office:value-type="string" table:style-name="ce9">
            <text:p>P004551</text:p>
          </table:table-cell>
          <table:table-cell office:value-type="float" office:value="4301051820" table:style-name="ce10">
            <text:p>4301051820</text:p>
          </table:table-cell>
          <table:table-cell office:value-type="float" office:value="4680115884915" table:number-columns-spanned="2" table:number-rows-spanned="1" table:style-name="ce27">
            <text:p>4680115884915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8" table:style-name="ce11">
            <text:p>1,9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осиски «Молочные ГОСТ» ф/в 0,3 ц/о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1]=&quot;&quot;;0;CEILING(([.X31]/[.$H31]);1;1)*[.$H3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31]/[.H31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31:.Y31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Филейска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642</text:p>
          </table:table-cell>
          <table:table-cell office:value-type="string" table:style-name="ce9">
            <text:p>P004621</text:p>
          </table:table-cell>
          <table:table-cell office:value-type="float" office:value="4301012030" table:style-name="ce10">
            <text:p>4301012030</text:p>
          </table:table-cell>
          <table:table-cell office:value-type="float" office:value="4680115885882" table:number-columns-spanned="2" table:number-rows-spanned="1" table:style-name="ce27">
            <text:p>4680115885882</text:p>
          </table:table-cell>
          <table:covered-table-cell/>
          <table:table-cell office:value-type="float" office:value="1.4" table:style-name="ce11">
            <text:p>1,400</text:p>
          </table:table-cell>
          <table:table-cell office:value-type="float" office:value="8" table:style-name="ce12">
            <text:p>8</text:p>
          </table:table-cell>
          <table:table-cell office:value-type="float" office:value="11.2" table:style-name="ce11">
            <text:p>11,200</text:p>
          </table:table-cell>
          <table:table-cell office:value-type="float" office:value="11.61" table:style-name="ce11">
            <text:p>11,6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ареные колбасы «Филейская со шпиком» Весовые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6]=&quot;&quot;;0;CEILING(([.X36]/[.$H36]);1;1)*[.$H3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29</text:p>
          </table:table-cell>
          <table:table-cell office:value-type="string" table:style-name="ce9">
            <text:p>P003235</text:p>
          </table:table-cell>
          <table:table-cell office:value-type="float" office:value="4301011816" table:style-name="ce10">
            <text:p>4301011816</text:p>
          </table:table-cell>
          <table:table-cell office:value-type="float" office:value="4680115881426" table:number-columns-spanned="2" table:number-rows-spanned="1" table:style-name="ce27">
            <text:p>4680115881426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«Филейская» Весовые Вектор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00" table:style-name="ce16">
            <text:p>200,00<text:s/></text:p>
          </table:table-cell>
          <table:table-cell office:value-type="float" office:value="205.20000000000002" table:formula="of:=IFERROR(IF([.X37]=&quot;&quot;;0;CEILING(([.X37]/[.$H37]);1;1)*[.$H37]);&quot;&quot;)" table:style-name="ce16">
            <text:p>205,2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74</text:p>
          </table:table-cell>
          <table:table-cell office:value-type="string" table:style-name="ce9">
            <text:p>P003045</text:p>
          </table:table-cell>
          <table:table-cell office:value-type="float" office:value="4301011386" table:style-name="ce10">
            <text:p>4301011386</text:p>
          </table:table-cell>
          <table:table-cell office:value-type="float" office:value="4680115880283" table:number-columns-spanned="2" table:number-rows-spanned="1" table:style-name="ce27">
            <text:p>4680115880283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4.99" table:style-name="ce11">
            <text:p>4,9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Вареные колбасы Классическая Вязанка Фикс.вес 0,6 Вектор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]=&quot;&quot;;0;CEILING(([.X38]/[.$H38]);1;1)*[.$H3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31</text:p>
          </table:table-cell>
          <table:table-cell office:value-type="string" table:style-name="ce9">
            <text:p>P003243</text:p>
          </table:table-cell>
          <table:table-cell office:value-type="float" office:value="4301011806" table:style-name="ce10">
            <text:p>4301011806</text:p>
          </table:table-cell>
          <table:table-cell office:value-type="float" office:value="4680115881525" table:number-columns-spanned="2" table:number-rows-spanned="1" table:style-name="ce27">
            <text:p>4680115881525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Колбаса вареная Филейская ТМ Вязанка ТС Классическая полиамид ф/в 0,4 кг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9]=&quot;&quot;;0;CEILING(([.X39]/[.$H39]);1;1)*[.$H3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033</text:p>
          </table:table-cell>
          <table:table-cell office:value-type="string" table:style-name="ce9">
            <text:p>P003578</text:p>
          </table:table-cell>
          <table:table-cell office:value-type="float" office:value="4301011589" table:style-name="ce10">
            <text:p>4301011589</text:p>
          </table:table-cell>
          <table:table-cell office:value-type="float" office:value="4680115885899" table:number-columns-spanned="2" table:number-rows-spanned="1" table:style-name="ce27">
            <text:p>4680115885899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799999999999998" table:style-name="ce11">
            <text:p>2,2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«Филейская со шпиком» ф/в 0,35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0]=&quot;&quot;;0;CEILING(([.X40]/[.$H40]);1;1)*[.$H4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15</text:p>
          </table:table-cell>
          <table:table-cell office:value-type="string" table:style-name="ce9">
            <text:p>P003227</text:p>
          </table:table-cell>
          <table:table-cell office:value-type="float" office:value="4301011801" table:style-name="ce10">
            <text:p>4301011801</text:p>
          </table:table-cell>
          <table:table-cell office:value-type="float" office:value="4680115881419" table:number-columns-spanned="2" table:number-rows-spanned="1" table:style-name="ce27">
            <text:p>4680115881419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10" table:style-name="ce12">
            <text:p>10</text:p>
          </table:table-cell>
          <table:table-cell office:value-type="float" office:value="4.5" table:style-name="ce11">
            <text:p>4,500</text:p>
          </table:table-cell>
          <table:table-cell office:value-type="float" office:value="4.6900000000000004" table:style-name="ce11">
            <text:p>4,6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«Филейская» Фикс.вес 0,45 Вектор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60" table:style-name="ce16">
            <text:p>360,00<text:s/></text:p>
          </table:table-cell>
          <table:table-cell office:value-type="float" office:value="360" table:formula="of:=IFERROR(IF([.X41]=&quot;&quot;;0;CEILING(([.X41]/[.$H41]);1;1)*[.$H41]);&quot;&quot;)" table:style-name="ce16">
            <text:p>36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99" table:formula="of:=IFERROR([.Y36]/[.H36];&quot;0&quot;)+IFERROR([.Y37]/[.H37];&quot;0&quot;)+IFERROR([.Y38]/[.H38];&quot;0&quot;)+IFERROR([.Y39]/[.H39];&quot;0&quot;)+IFERROR([.Y40]/[.H40];&quot;0&quot;)+IFERROR([.Y41]/[.H41];&quot;0&quot;)" table:style-name="ce18">
            <text:p>99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565.20000000000005" table:formula="of:=IFERROR(SUM([.Y36:.Y41]);&quot;0&quot;)" table:style-name="ce18">
            <text:p>565,2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28</text:p>
          </table:table-cell>
          <table:table-cell office:value-type="string" table:style-name="ce9">
            <text:p>P003234</text:p>
          </table:table-cell>
          <table:table-cell office:value-type="float" office:value="4301020298" table:style-name="ce10">
            <text:p>4301020298</text:p>
          </table:table-cell>
          <table:table-cell office:value-type="float" office:value="4680115881440" table:number-columns-spanned="2" table:number-rows-spanned="1" table:style-name="ce27">
            <text:p>4680115881440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етчины «Филейская» Весовые Вектор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00" table:style-name="ce16">
            <text:p>400,00<text:s/></text:p>
          </table:table-cell>
          <table:table-cell office:value-type="float" office:value="410.40000000000003" table:formula="of:=IFERROR(IF([.X45]=&quot;&quot;;0;CEILING(([.X45]/[.$H45]);1;1)*[.$H45]);&quot;&quot;)" table:style-name="ce16">
            <text:p>410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689</text:p>
          </table:table-cell>
          <table:table-cell office:value-type="string" table:style-name="ce9">
            <text:p>P004676</text:p>
          </table:table-cell>
          <table:table-cell office:value-type="float" office:value="4301020358" table:style-name="ce10">
            <text:p>4301020358</text:p>
          </table:table-cell>
          <table:table-cell office:value-type="float" office:value="4680115885950" table:number-columns-spanned="2" table:number-rows-spanned="1" table:style-name="ce27">
            <text:p>4680115885950</text:p>
          </table:table-cell>
          <table:covered-table-cell/>
          <table:table-cell office:value-type="float" office:value="0.37" table:style-name="ce11">
            <text:p>0,370</text:p>
          </table:table-cell>
          <table:table-cell office:value-type="float" office:value="6" table:style-name="ce12">
            <text:p>6</text:p>
          </table:table-cell>
          <table:table-cell office:value-type="float" office:value="2.2200000000000002" table:style-name="ce11">
            <text:p>2,220</text:p>
          </table:table-cell>
          <table:table-cell office:value-type="float" office:value="2.4" table:style-name="ce11">
            <text:p>2,40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етчины «Филейская» ф/в 0,37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6]=&quot;&quot;;0;CEILING(([.X46]/[.$H46]);1;1)*[.$H4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14</text:p>
          </table:table-cell>
          <table:table-cell office:value-type="string" table:style-name="ce9">
            <text:p>P003226</text:p>
          </table:table-cell>
          <table:table-cell office:value-type="float" office:value="4301020296" table:style-name="ce10">
            <text:p>4301020296</text:p>
          </table:table-cell>
          <table:table-cell office:value-type="float" office:value="4680115881433" table:number-columns-spanned="2" table:number-rows-spanned="1" table:style-name="ce27">
            <text:p>4680115881433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6" table:style-name="ce12">
            <text:p>6</text:p>
          </table:table-cell>
          <table:table-cell office:value-type="float" office:value="2.7" table:style-name="ce11">
            <text:p>2,700</text:p>
          </table:table-cell>
          <table:table-cell office:value-type="float" office:value="2.88" table:style-name="ce11">
            <text:p>2,8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етчины «Филейская» Фикс.вес 0,45 Вектор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08" table:style-name="ce16">
            <text:p>108,00<text:s/></text:p>
          </table:table-cell>
          <table:table-cell office:value-type="float" office:value="108" table:formula="of:=IFERROR(IF([.X47]=&quot;&quot;;0;CEILING(([.X47]/[.$H47]);1;1)*[.$H47]);&quot;&quot;)" table:style-name="ce16">
            <text:p>108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78" table:formula="of:=IFERROR([.Y45]/[.H45];&quot;0&quot;)+IFERROR([.Y46]/[.H46];&quot;0&quot;)+IFERROR([.Y47]/[.H47];&quot;0&quot;)" table:style-name="ce18">
            <text:p>78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518.40000000000009" table:formula="of:=IFERROR(SUM([.Y45:.Y47]);&quot;0&quot;)" table:style-name="ce18">
            <text:p>518,4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027</text:p>
          </table:table-cell>
          <table:table-cell office:value-type="string" table:style-name="ce9">
            <text:p>P003573</text:p>
          </table:table-cell>
          <table:table-cell office:value-type="float" office:value="4301031243" table:style-name="ce10">
            <text:p>4301031243</text:p>
          </table:table-cell>
          <table:table-cell office:value-type="float" office:value="4680115885073" table:number-columns-spanned="2" table:number-rows-spanned="1" table:style-name="ce27">
            <text:p>4680115885073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" table:style-name="ce11">
            <text:p>1,9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В/к колбасы «Салями Филейская» срез ф/в 0,3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51]=&quot;&quot;;0;CEILING(([.X51]/[.$H51]);1;1)*[.$H5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031</text:p>
          </table:table-cell>
          <table:table-cell office:value-type="string" table:style-name="ce9">
            <text:p>P003566</text:p>
          </table:table-cell>
          <table:table-cell office:value-type="float" office:value="4301031316" table:style-name="ce10">
            <text:p>4301031316</text:p>
          </table:table-cell>
          <table:table-cell office:value-type="float" office:value="4680115885097" table:number-columns-spanned="2" table:number-rows-spanned="1" table:style-name="ce27">
            <text:p>4680115885097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" table:style-name="ce11">
            <text:p>1,9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В/к колбасы «Филейская Рубленая» срез ф/в 0,3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52]=&quot;&quot;;0;CEILING(([.X52]/[.$H52]);1;1)*[.$H5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51]/[.H51];&quot;0&quot;)+IFERROR([.Y52]/[.H52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51:.Y52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616</text:p>
          </table:table-cell>
          <table:table-cell office:value-type="string" table:style-name="ce9">
            <text:p>P004555</text:p>
          </table:table-cell>
          <table:table-cell office:value-type="float" office:value="4301051846" table:style-name="ce10">
            <text:p>4301051846</text:p>
          </table:table-cell>
          <table:table-cell office:value-type="float" office:value="4680115885769" table:number-columns-spanned="2" table:number-rows-spanned="1" table:style-name="ce27">
            <text:p>4680115885769</text:p>
          </table:table-cell>
          <table:covered-table-cell/>
          <table:table-cell office:value-type="float" office:value="1.4" table:style-name="ce11">
            <text:p>1,400</text:p>
          </table:table-cell>
          <table:table-cell office:value-type="float" office:value="6" table:style-name="ce12">
            <text:p>6</text:p>
          </table:table-cell>
          <table:table-cell office:value-type="float" office:value="8.4" table:style-name="ce11">
            <text:p>8,400</text:p>
          </table:table-cell>
          <table:table-cell office:value-type="float" office:value="8.81" table:style-name="ce11">
            <text:p>8,8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Филейские по-ганноверски» Весовой амицел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56]=&quot;&quot;;0;CEILING(([.X56]/[.$H56]);1;1)*[.$H5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25</text:p>
          </table:table-cell>
          <table:table-cell office:value-type="string" table:style-name="ce9">
            <text:p>P004554</text:p>
          </table:table-cell>
          <table:table-cell office:value-type="float" office:value="4301051837" table:style-name="ce10">
            <text:p>4301051837</text:p>
          </table:table-cell>
          <table:table-cell office:value-type="float" office:value="4680115884311" table:number-columns-spanned="2" table:number-rows-spanned="1" table:style-name="ce27">
            <text:p>4680115884311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2.0459999999999998" table:style-name="ce11">
            <text:p>2,046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Филейские» Фикс.вес 0,3 ц/о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57]=&quot;&quot;;0;CEILING(([.X57]/[.$H57]);1;1)*[.$H5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617</text:p>
          </table:table-cell>
          <table:table-cell office:value-type="string" table:style-name="ce9">
            <text:p>P004558</text:p>
          </table:table-cell>
          <table:table-cell office:value-type="float" office:value="4301051844" table:style-name="ce10">
            <text:p>4301051844</text:p>
          </table:table-cell>
          <table:table-cell office:value-type="float" office:value="4680115885929" table:number-columns-spanned="2" table:number-rows-spanned="1" table:style-name="ce27">
            <text:p>4680115885929</text:p>
          </table:table-cell>
          <table:covered-table-cell/>
          <table:table-cell office:value-type="float" office:value="0.42" table:style-name="ce11">
            <text:p>0,420</text:p>
          </table:table-cell>
          <table:table-cell office:value-type="float" office:value="6" table:style-name="ce12">
            <text:p>6</text:p>
          </table:table-cell>
          <table:table-cell office:value-type="float" office:value="2.52" table:style-name="ce11">
            <text:p>2,520</text:p>
          </table:table-cell>
          <table:table-cell office:value-type="float" office:value="2.7" table:style-name="ce11">
            <text:p>2,70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«Филейские по-ганноверски» ф/в 0,42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58]=&quot;&quot;;0;CEILING(([.X58]/[.$H58]);1;1)*[.$H5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88</text:p>
          </table:table-cell>
          <table:table-cell office:value-type="string" table:style-name="ce9">
            <text:p>P004557</text:p>
          </table:table-cell>
          <table:table-cell office:value-type="float" office:value="4301051929" table:style-name="ce10">
            <text:p>4301051929</text:p>
          </table:table-cell>
          <table:table-cell office:value-type="float" office:value="4680115884403" table:number-columns-spanned="2" table:number-rows-spanned="1" table:style-name="ce27">
            <text:p>4680115884403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8" table:style-name="ce11">
            <text:p>1,9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Филейские рубленые» ф/в 0,3 ц/о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59]=&quot;&quot;;0;CEILING(([.X59]/[.$H59]);1;1)*[.$H5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56]/[.H56];&quot;0&quot;)+IFERROR([.Y57]/[.H57];&quot;0&quot;)+IFERROR([.Y58]/[.H58];&quot;0&quot;)+IFERROR([.Y59]/[.H59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56:.Y59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ардель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35</text:p>
          </table:table-cell>
          <table:table-cell office:value-type="string" table:style-name="ce9">
            <text:p>P003883</text:p>
          </table:table-cell>
          <table:table-cell office:value-type="float" office:value="4301060455" table:style-name="ce10">
            <text:p>4301060455</text:p>
          </table:table-cell>
          <table:table-cell office:value-type="float" office:value="4680115881532" table:number-columns-spanned="2" table:number-rows-spanned="1" table:style-name="ce27">
            <text:p>4680115881532</text:p>
          </table:table-cell>
          <table:covered-table-cell/>
          <table:table-cell office:value-type="float" office:value="1.3" table:style-name="ce11">
            <text:p>1,300</text:p>
          </table:table-cell>
          <table:table-cell office:value-type="float" office:value="6" table:style-name="ce12">
            <text:p>6</text:p>
          </table:table-cell>
          <table:table-cell office:value-type="float" office:value="7.8" table:style-name="ce11">
            <text:p>7,800</text:p>
          </table:table-cell>
          <table:table-cell office:value-type="float" office:value="8.2100000000000009" table:style-name="ce11">
            <text:p>8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28">
            <text:p>Сардельки «Филейские» Весовые н/о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63]=&quot;&quot;;0;CEILING(([.X63]/[.$H63]);1;1)*[.$H6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34</text:p>
          </table:table-cell>
          <table:table-cell office:value-type="string" table:style-name="ce9">
            <text:p>P003238</text:p>
          </table:table-cell>
          <table:table-cell office:value-type="float" office:value="4301060351" table:style-name="ce10">
            <text:p>4301060351</text:p>
          </table:table-cell>
          <table:table-cell office:value-type="float" office:value="4680115881464" table:number-columns-spanned="2" table:number-rows-spanned="1" table:style-name="ce27">
            <text:p>468011588146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9" table:style-name="ce11">
            <text:p>2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4">
            <text:p>Сардельки «Филейские» Фикс.вес 0,4 NDX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64]=&quot;&quot;;0;CEILING(([.X64]/[.$H64]);1;1)*[.$H6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63]/[.H63];&quot;0&quot;)+IFERROR([.Y64]/[.H64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63:.Y64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Молокуш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30</text:p>
          </table:table-cell>
          <table:table-cell office:value-type="string" table:style-name="ce9">
            <text:p>P003239</text:p>
          </table:table-cell>
          <table:table-cell office:value-type="float" office:value="4301011468" table:style-name="ce10">
            <text:p>4301011468</text:p>
          </table:table-cell>
          <table:table-cell office:value-type="float" office:value="4680115881327" table:number-columns-spanned="2" table:number-rows-spanned="1" table:style-name="ce27">
            <text:p>4680115881327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ареные колбасы Молокуша Вязанка Вес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80" table:style-name="ce16">
            <text:p>280,00<text:s/></text:p>
          </table:table-cell>
          <table:table-cell office:value-type="float" office:value="280.8" table:formula="of:=IFERROR(IF([.X69]=&quot;&quot;;0;CEILING(([.X69]/[.$H69]);1;1)*[.$H69]);&quot;&quot;)" table:style-name="ce16">
            <text:p>280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354</text:p>
          </table:table-cell>
          <table:table-cell office:value-type="string" table:style-name="ce9">
            <text:p>P002641</text:p>
          </table:table-cell>
          <table:table-cell office:value-type="float" office:value="4301011261" table:style-name="ce10">
            <text:p>4301011261</text:p>
          </table:table-cell>
          <table:table-cell office:value-type="float" office:value="4680115887732" table:number-columns-spanned="2" table:number-rows-spanned="1" table:style-name="ce27">
            <text:p>4680115887732</text:p>
          </table:table-cell>
          <table:covered-table-cell/>
          <table:table-cell office:value-type="float" office:value="0.17" table:style-name="ce11">
            <text:p>0,170</text:p>
          </table:table-cell>
          <table:table-cell office:value-type="float" office:value="10" table:style-name="ce12">
            <text:p>10</text:p>
          </table:table-cell>
          <table:table-cell office:value-type="float" office:value="1.7" table:style-name="ce11">
            <text:p>1,700</text:p>
          </table:table-cell>
          <table:table-cell office:value-type="float" office:value="1.8" table:style-name="ce11">
            <text:p>1,800</text:p>
          </table:table-cell>
          <table:table-cell office:value-type="float" office:value="192" table:style-name="ce12">
            <text:p>192</text:p>
          </table:table-cell>
          <table:table-cell office:value-type="string" table:style-name="ce12">
            <text:p>2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4">
            <text:p>Вареные колбасы «Молокуша» Фикс.вес 0,17 нарезк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70]=&quot;&quot;;0;CEILING(([.X70]/[.$H70]);1;1)*[.$H7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32</text:p>
          </table:table-cell>
          <table:table-cell office:value-type="string" table:style-name="ce9">
            <text:p>P003245</text:p>
          </table:table-cell>
          <table:table-cell office:value-type="float" office:value="4301011476" table:style-name="ce10">
            <text:p>4301011476</text:p>
          </table:table-cell>
          <table:table-cell office:value-type="float" office:value="4680115881518" table:number-columns-spanned="2" table:number-rows-spanned="1" table:style-name="ce27">
            <text:p>468011588151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Молокуша Вязанка Фикс.вес 0,4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71]=&quot;&quot;;0;CEILING(([.X71]/[.$H71]);1;1)*[.$H7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16</text:p>
          </table:table-cell>
          <table:table-cell office:value-type="string" table:style-name="ce9">
            <text:p>P003228</text:p>
          </table:table-cell>
          <table:table-cell office:value-type="float" office:value="4301011443" table:style-name="ce10">
            <text:p>4301011443</text:p>
          </table:table-cell>
          <table:table-cell office:value-type="float" office:value="4680115881303" table:number-columns-spanned="2" table:number-rows-spanned="1" table:style-name="ce27">
            <text:p>4680115881303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10" table:style-name="ce12">
            <text:p>10</text:p>
          </table:table-cell>
          <table:table-cell office:value-type="float" office:value="4.5" table:style-name="ce11">
            <text:p>4,500</text:p>
          </table:table-cell>
          <table:table-cell office:value-type="float" office:value="4.6900000000000004" table:style-name="ce11">
            <text:p>4,6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Молокуша Вязанка Фикс.вес 0,45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57.5" table:style-name="ce16">
            <text:p>157,50<text:s/></text:p>
          </table:table-cell>
          <table:table-cell office:value-type="float" office:value="157.5" table:formula="of:=IFERROR(IF([.X72]=&quot;&quot;;0;CEILING(([.X72]/[.$H72]);1;1)*[.$H72]);&quot;&quot;)" table:style-name="ce16">
            <text:p>157,5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61" table:formula="of:=IFERROR([.Y69]/[.H69];&quot;0&quot;)+IFERROR([.Y70]/[.H70];&quot;0&quot;)+IFERROR([.Y71]/[.H71];&quot;0&quot;)+IFERROR([.Y72]/[.H72];&quot;0&quot;)" table:style-name="ce18">
            <text:p>61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438.3" table:formula="of:=IFERROR(SUM([.Y69:.Y72]);&quot;0&quot;)" table:style-name="ce18">
            <text:p>438,3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523</text:p>
          </table:table-cell>
          <table:table-cell office:value-type="string" table:style-name="ce9">
            <text:p>P003986</text:p>
          </table:table-cell>
          <table:table-cell office:value-type="float" office:value="4301051712" table:style-name="ce10">
            <text:p>4301051712</text:p>
          </table:table-cell>
          <table:table-cell office:value-type="float" office:value="4607091386967" table:number-columns-spanned="2" table:number-rows-spanned="1" table:style-name="ce27">
            <text:p>4607091386967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6" table:style-name="ce12">
            <text:p>6</text:p>
          </table:table-cell>
          <table:table-cell office:value-type="float" office:value="8.1" table:style-name="ce11">
            <text:p>8,100</text:p>
          </table:table-cell>
          <table:table-cell office:value-type="float" office:value="8.5939999999999994" table:style-name="ce11">
            <text:p>8,5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Молокуши (Вязанка Молочные)» Весовой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50" table:style-name="ce16">
            <text:p>150,00<text:s/></text:p>
          </table:table-cell>
          <table:table-cell office:value-type="float" office:value="153.9" table:formula="of:=IFERROR(IF([.X76]=&quot;&quot;;0;CEILING(([.X76]/[.$H76]);1;1)*[.$H76]);&quot;&quot;)" table:style-name="ce16">
            <text:p>153,9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503</text:p>
          </table:table-cell>
          <table:table-cell office:value-type="string" table:style-name="ce9">
            <text:p>P004411</text:p>
          </table:table-cell>
          <table:table-cell office:value-type="float" office:value="4301051788" table:style-name="ce10">
            <text:p>4301051788</text:p>
          </table:table-cell>
          <table:table-cell office:value-type="float" office:value="4680115884953" table:number-columns-spanned="2" table:number-rows-spanned="1" table:style-name="ce27">
            <text:p>4680115884953</text:p>
          </table:table-cell>
          <table:covered-table-cell/>
          <table:table-cell office:value-type="float" office:value="0.37" table:style-name="ce11">
            <text:p>0,370</text:p>
          </table:table-cell>
          <table:table-cell office:value-type="float" office:value="6" table:style-name="ce12">
            <text:p>6</text:p>
          </table:table-cell>
          <table:table-cell office:value-type="float" office:value="2.2200000000000002" table:style-name="ce11">
            <text:p>2,220</text:p>
          </table:table-cell>
          <table:table-cell office:value-type="float" office:value="2.472" table:style-name="ce11">
            <text:p>2,47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«Вязанка Молочные» Фикс.вес 0,37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77]=&quot;&quot;;0;CEILING(([.X77]/[.$H77]);1;1)*[.$H7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718</text:p>
          </table:table-cell>
          <table:table-cell office:value-type="string" table:style-name="ce9">
            <text:p>P003985</text:p>
          </table:table-cell>
          <table:table-cell office:value-type="float" office:value="4301051718" table:style-name="ce10">
            <text:p>4301051718</text:p>
          </table:table-cell>
          <table:table-cell office:value-type="float" office:value="4607091385731" table:number-columns-spanned="2" table:number-rows-spanned="1" table:style-name="ce27">
            <text:p>4607091385731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6" table:style-name="ce12">
            <text:p>6</text:p>
          </table:table-cell>
          <table:table-cell office:value-type="float" office:value="2.7" table:style-name="ce11">
            <text:p>2,700</text:p>
          </table:table-cell>
          <table:table-cell office:value-type="float" office:value="2.952" table:style-name="ce11">
            <text:p>2,9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«Молокуши» ф/в 0,45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4.8" table:style-name="ce16">
            <text:p>64,80<text:s/></text:p>
          </table:table-cell>
          <table:table-cell office:value-type="float" office:value="64.800000000000011" table:formula="of:=IFERROR(IF([.X78]=&quot;&quot;;0;CEILING(([.X78]/[.$H78]);1;1)*[.$H78]);&quot;&quot;)" table:style-name="ce16">
            <text:p>64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69</text:p>
          </table:table-cell>
          <table:table-cell office:value-type="string" table:style-name="ce9">
            <text:p>P003324</text:p>
          </table:table-cell>
          <table:table-cell office:value-type="float" office:value="4301051438" table:style-name="ce10">
            <text:p>4301051438</text:p>
          </table:table-cell>
          <table:table-cell office:value-type="float" office:value="4680115880894" table:number-columns-spanned="2" table:number-rows-spanned="1" table:style-name="ce27">
            <text:p>4680115880894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6" table:style-name="ce12">
            <text:p>6</text:p>
          </table:table-cell>
          <table:table-cell office:value-type="float" office:value="1.98" table:style-name="ce11">
            <text:p>1,980</text:p>
          </table:table-cell>
          <table:table-cell office:value-type="float" office:value="2.238" table:style-name="ce11">
            <text:p>2,23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Молокуши Миникушай Вязанка фикс.вес 0,33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9" table:style-name="ce16">
            <text:p>99,00<text:s/></text:p>
          </table:table-cell>
          <table:table-cell office:value-type="float" office:value="99" table:formula="of:=IFERROR(IF([.X79]=&quot;&quot;;0;CEILING(([.X79]/[.$H79]);1;1)*[.$H79]);&quot;&quot;)" table:style-name="ce16">
            <text:p>99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93" table:formula="of:=IFERROR([.Y76]/[.H76];&quot;0&quot;)+IFERROR([.Y77]/[.H77];&quot;0&quot;)+IFERROR([.Y78]/[.H78];&quot;0&quot;)+IFERROR([.Y79]/[.H79];&quot;0&quot;)" table:style-name="ce18">
            <text:p>93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317.70000000000005" table:formula="of:=IFERROR(SUM([.Y76:.Y79]);&quot;0&quot;)" table:style-name="ce18">
            <text:p>317,7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ливушк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28</text:p>
          </table:table-cell>
          <table:table-cell office:value-type="string" table:style-name="ce9">
            <text:p>P003357</text:p>
          </table:table-cell>
          <table:table-cell office:value-type="float" office:value="4301011514" table:style-name="ce10">
            <text:p>4301011514</text:p>
          </table:table-cell>
          <table:table-cell office:value-type="float" office:value="4680115882133" table:number-columns-spanned="2" table:number-rows-spanned="1" table:style-name="ce27">
            <text:p>4680115882133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ареные колбасы «Сливушка» Вес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50" table:style-name="ce16">
            <text:p>50,00<text:s/></text:p>
          </table:table-cell>
          <table:table-cell office:value-type="float" office:value="54" table:formula="of:=IFERROR(IF([.X84]=&quot;&quot;;0;CEILING(([.X84]/[.$H84]);1;1)*[.$H84]);&quot;&quot;)" table:style-name="ce16">
            <text:p>54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745</text:p>
          </table:table-cell>
          <table:table-cell office:value-type="string" table:style-name="ce9">
            <text:p>P004758</text:p>
          </table:table-cell>
          <table:table-cell office:value-type="float" office:value="4301012051" table:style-name="ce10">
            <text:p>4301012051</text:p>
          </table:table-cell>
          <table:table-cell office:value-type="float" office:value="4680115887718" table:number-columns-spanned="2" table:number-rows-spanned="1" table:style-name="ce27">
            <text:p>4680115887718</text:p>
          </table:table-cell>
          <table:covered-table-cell/>
          <table:table-cell office:value-type="float" office:value="0.11" table:style-name="ce11">
            <text:p>0,110</text:p>
          </table:table-cell>
          <table:table-cell office:value-type="float" office:value="10" table:style-name="ce12">
            <text:p>10</text:p>
          </table:table-cell>
          <table:table-cell office:value-type="float" office:value="1.1000000000000001" table:style-name="ce11">
            <text:p>1,100</text:p>
          </table:table-cell>
          <table:table-cell office:value-type="float" office:value="1.31" table:style-name="ce11">
            <text:p>1,310</text:p>
          </table:table-cell>
          <table:table-cell office:value-type="float" office:value="192" table:style-name="ce12">
            <text:p>192</text:p>
          </table:table-cell>
          <table:table-cell office:value-type="string" table:style-name="ce12">
            <text:p>2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4">
            <text:p>Вареные колбасы «Сливушка» Фикс.вес 0,11 нарезк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85]=&quot;&quot;;0;CEILING(([.X85]/[.$H85]);1;1)*[.$H8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33</text:p>
          </table:table-cell>
          <table:table-cell office:value-type="string" table:style-name="ce9">
            <text:p>P003102</text:p>
          </table:table-cell>
          <table:table-cell office:value-type="float" office:value="4301011417" table:style-name="ce10">
            <text:p>4301011417</text:p>
          </table:table-cell>
          <table:table-cell office:value-type="float" office:value="4680115880269" table:number-columns-spanned="2" table:number-rows-spanned="1" table:style-name="ce27">
            <text:p>4680115880269</text:p>
          </table:table-cell>
          <table:covered-table-cell/>
          <table:table-cell office:value-type="float" office:value="0.375" table:style-name="ce11">
            <text:p>0,375</text:p>
          </table:table-cell>
          <table:table-cell office:value-type="float" office:value="10" table:style-name="ce12">
            <text:p>10</text:p>
          </table:table-cell>
          <table:table-cell office:value-type="float" office:value="3.75" table:style-name="ce11">
            <text:p>3,750</text:p>
          </table:table-cell>
          <table:table-cell office:value-type="float" office:value="3.94" table:style-name="ce11">
            <text:p>3,94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Сливушка Вязанка Фикс.вес 0,375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50" table:style-name="ce16">
            <text:p>150,00<text:s/></text:p>
          </table:table-cell>
          <table:table-cell office:value-type="float" office:value="150" table:formula="of:=IFERROR(IF([.X86]=&quot;&quot;;0;CEILING(([.X86]/[.$H86]);1;1)*[.$H86]);&quot;&quot;)" table:style-name="ce16">
            <text:p>15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34</text:p>
          </table:table-cell>
          <table:table-cell office:value-type="string" table:style-name="ce9">
            <text:p>P003103</text:p>
          </table:table-cell>
          <table:table-cell office:value-type="float" office:value="4301011415" table:style-name="ce10">
            <text:p>4301011415</text:p>
          </table:table-cell>
          <table:table-cell office:value-type="float" office:value="4680115880429" table:number-columns-spanned="2" table:number-rows-spanned="1" table:style-name="ce27">
            <text:p>4680115880429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10" table:style-name="ce12">
            <text:p>10</text:p>
          </table:table-cell>
          <table:table-cell office:value-type="float" office:value="4.5" table:style-name="ce11">
            <text:p>4,500</text:p>
          </table:table-cell>
          <table:table-cell office:value-type="float" office:value="4.6900000000000004" table:style-name="ce11">
            <text:p>4,6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Сливушка Вязанка Фикс.вес 0,45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2.5" table:style-name="ce16">
            <text:p>22,50<text:s/></text:p>
          </table:table-cell>
          <table:table-cell office:value-type="float" office:value="22.5" table:formula="of:=IFERROR(IF([.X87]=&quot;&quot;;0;CEILING(([.X87]/[.$H87]);1;1)*[.$H87]);&quot;&quot;)" table:style-name="ce16">
            <text:p>22,5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27</text:p>
          </table:table-cell>
          <table:table-cell office:value-type="string" table:style-name="ce9">
            <text:p>P003233</text:p>
          </table:table-cell>
          <table:table-cell office:value-type="float" office:value="4301011462" table:style-name="ce10">
            <text:p>4301011462</text:p>
          </table:table-cell>
          <table:table-cell office:value-type="float" office:value="4680115881457" table:number-columns-spanned="2" table:number-rows-spanned="1" table:style-name="ce27">
            <text:p>4680115881457</text:p>
          </table:table-cell>
          <table:covered-table-cell/>
          <table:table-cell office:value-type="float" office:value="0.75" table:style-name="ce11">
            <text:p>0,750</text:p>
          </table:table-cell>
          <table:table-cell office:value-type="float" office:value="6" table:style-name="ce12">
            <text:p>6</text:p>
          </table:table-cell>
          <table:table-cell office:value-type="float" office:value="4.5" table:style-name="ce11">
            <text:p>4,500</text:p>
          </table:table-cell>
          <table:table-cell office:value-type="float" office:value="4.6900000000000004" table:style-name="ce11">
            <text:p>4,6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Сливушка Вязанка Фикс.вес 0,75 П/а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88]=&quot;&quot;;0;CEILING(([.X88]/[.$H88]);1;1)*[.$H8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50" table:formula="of:=IFERROR([.Y84]/[.H84];&quot;0&quot;)+IFERROR([.Y85]/[.H85];&quot;0&quot;)+IFERROR([.Y86]/[.H86];&quot;0&quot;)+IFERROR([.Y87]/[.H87];&quot;0&quot;)+IFERROR([.Y88]/[.H88];&quot;0&quot;)" table:style-name="ce18">
            <text:p>5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26.5" table:formula="of:=IFERROR(SUM([.Y84:.Y88]);&quot;0&quot;)" table:style-name="ce18">
            <text:p>226,5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33</text:p>
          </table:table-cell>
          <table:table-cell office:value-type="string" table:style-name="ce9">
            <text:p>P004607</text:p>
          </table:table-cell>
          <table:table-cell office:value-type="float" office:value="4301020345" table:style-name="ce10">
            <text:p>4301020345</text:p>
          </table:table-cell>
          <table:table-cell office:value-type="float" office:value="4680115881488" table:number-columns-spanned="2" table:number-rows-spanned="1" table:style-name="ce27">
            <text:p>4680115881488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етчины «Сливушка с индейкой» вес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92]=&quot;&quot;;0;CEILING(([.X92]/[.$H92]);1;1)*[.$H9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356</text:p>
          </table:table-cell>
          <table:table-cell office:value-type="string" table:style-name="ce9">
            <text:p>P002639</text:p>
          </table:table-cell>
          <table:table-cell office:value-type="float" office:value="4301020186" table:style-name="ce10">
            <text:p>4301020186</text:p>
          </table:table-cell>
          <table:table-cell office:value-type="float" office:value="4680115887664" table:number-columns-spanned="2" table:number-rows-spanned="1" table:style-name="ce27">
            <text:p>4680115887664</text:p>
          </table:table-cell>
          <table:covered-table-cell/>
          <table:table-cell office:value-type="float" office:value="0.1" table:style-name="ce11">
            <text:p>0,100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1">
            <text:p>1,000</text:p>
          </table:table-cell>
          <table:table-cell office:value-type="float" office:value="1.21" table:style-name="ce11">
            <text:p>1,210</text:p>
          </table:table-cell>
          <table:table-cell office:value-type="float" office:value="392" table:style-name="ce12">
            <text:p>392</text:p>
          </table:table-cell>
          <table:table-cell office:value-type="string" table:style-name="ce12">
            <text:p>2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4">
            <text:p>Ветчины «Сливушка с индейкой» Фикс.вес 0,1 нарезк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93]=&quot;&quot;;0;CEILING(([.X93]/[.$H93]);1;1)*[.$H9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037</text:p>
          </table:table-cell>
          <table:table-cell office:value-type="string" table:style-name="ce9">
            <text:p>P004609</text:p>
          </table:table-cell>
          <table:table-cell office:value-type="float" office:value="4301020346" table:style-name="ce10">
            <text:p>4301020346</text:p>
          </table:table-cell>
          <table:table-cell office:value-type="float" office:value="4680115882775" table:number-columns-spanned="2" table:number-rows-spanned="1" table:style-name="ce27">
            <text:p>4680115882775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8" table:style-name="ce12">
            <text:p>8</text:p>
          </table:table-cell>
          <table:table-cell office:value-type="float" office:value="2.4" table:style-name="ce11">
            <text:p>2,400</text:p>
          </table:table-cell>
          <table:table-cell office:value-type="float" office:value="2.5" table:style-name="ce11">
            <text:p>2,5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етчины «Сливушка с индейкой» Фикс.вес 0,3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4" table:style-name="ce16">
            <text:p>24,00<text:s/></text:p>
          </table:table-cell>
          <table:table-cell office:value-type="float" office:value="24" table:formula="of:=IFERROR(IF([.X94]=&quot;&quot;;0;CEILING(([.X94]/[.$H94]);1;1)*[.$H94]);&quot;&quot;)" table:style-name="ce16">
            <text:p>24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35</text:p>
          </table:table-cell>
          <table:table-cell office:value-type="string" table:style-name="ce9">
            <text:p>P004586</text:p>
          </table:table-cell>
          <table:table-cell office:value-type="float" office:value="4301020344" table:style-name="ce10">
            <text:p>4301020344</text:p>
          </table:table-cell>
          <table:table-cell office:value-type="float" office:value="4680115880658" table:number-columns-spanned="2" table:number-rows-spanned="1" table:style-name="ce27">
            <text:p>468011588065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етчины «Сливушка с индейкой» Фикс.вес 0,4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95]=&quot;&quot;;0;CEILING(([.X95]/[.$H95]);1;1)*[.$H9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0" table:formula="of:=IFERROR([.Y92]/[.H92];&quot;0&quot;)+IFERROR([.Y93]/[.H93];&quot;0&quot;)+IFERROR([.Y94]/[.H94];&quot;0&quot;)+IFERROR([.Y95]/[.H95];&quot;0&quot;)" table:style-name="ce18">
            <text:p>1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4" table:formula="of:=IFERROR(SUM([.Y92:.Y95]);&quot;0&quot;)" table:style-name="ce18">
            <text:p>24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721</text:p>
          </table:table-cell>
          <table:table-cell office:value-type="string" table:style-name="ce9">
            <text:p>P003988</text:p>
          </table:table-cell>
          <table:table-cell office:value-type="float" office:value="4301051724" table:style-name="ce10">
            <text:p>4301051724</text:p>
          </table:table-cell>
          <table:table-cell office:value-type="float" office:value="4607091385168" table:number-columns-spanned="2" table:number-rows-spanned="1" table:style-name="ce27">
            <text:p>4607091385168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6" table:style-name="ce12">
            <text:p>6</text:p>
          </table:table-cell>
          <table:table-cell office:value-type="float" office:value="8.1" table:style-name="ce11">
            <text:p>8,100</text:p>
          </table:table-cell>
          <table:table-cell office:value-type="float" office:value="8.5879999999999992" table:style-name="ce11">
            <text:p>8,588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Сливочные Вязанка» Весовой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20" table:style-name="ce16">
            <text:p>120,00<text:s/></text:p>
          </table:table-cell>
          <table:table-cell office:value-type="float" office:value="121.5" table:formula="of:=IFERROR(IF([.X99]=&quot;&quot;;0;CEILING(([.X99]/[.$H99]);1;1)*[.$H99]);&quot;&quot;)" table:style-name="ce16">
            <text:p>121,5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139</text:p>
          </table:table-cell>
          <table:table-cell office:value-type="string" table:style-name="ce9">
            <text:p>P003990</text:p>
          </table:table-cell>
          <table:table-cell office:value-type="float" office:value="4301051730" table:style-name="ce10">
            <text:p>4301051730</text:p>
          </table:table-cell>
          <table:table-cell office:value-type="float" office:value="4607091383256" table:number-columns-spanned="2" table:number-rows-spanned="1" table:style-name="ce27">
            <text:p>4607091383256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6" table:style-name="ce12">
            <text:p>6</text:p>
          </table:table-cell>
          <table:table-cell office:value-type="float" office:value="1.98" table:style-name="ce11">
            <text:p>1,980</text:p>
          </table:table-cell>
          <table:table-cell office:value-type="float" office:value="2.226" table:style-name="ce11">
            <text:p>2,226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«Сливочные» ф/в 0,33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08.9" table:style-name="ce16">
            <text:p>108,90<text:s/></text:p>
          </table:table-cell>
          <table:table-cell office:value-type="float" office:value="108.9" table:formula="of:=IFERROR(IF([.X100]=&quot;&quot;;0;CEILING(([.X100]/[.$H100]);1;1)*[.$H100]);&quot;&quot;)" table:style-name="ce16">
            <text:p>108,9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720</text:p>
          </table:table-cell>
          <table:table-cell office:value-type="string" table:style-name="ce9">
            <text:p>P003989</text:p>
          </table:table-cell>
          <table:table-cell office:value-type="float" office:value="4301051721" table:style-name="ce10">
            <text:p>4301051721</text:p>
          </table:table-cell>
          <table:table-cell office:value-type="float" office:value="4607091385748" table:number-columns-spanned="2" table:number-rows-spanned="1" table:style-name="ce27">
            <text:p>4607091385748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6" table:style-name="ce12">
            <text:p>6</text:p>
          </table:table-cell>
          <table:table-cell office:value-type="float" office:value="2.7" table:style-name="ce11">
            <text:p>2,700</text:p>
          </table:table-cell>
          <table:table-cell office:value-type="float" office:value="2.952" table:style-name="ce11">
            <text:p>2,9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«Сливочные» ф/в 0,45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1" table:style-name="ce16">
            <text:p>81,00<text:s/></text:p>
          </table:table-cell>
          <table:table-cell office:value-type="float" office:value="81" table:formula="of:=IFERROR(IF([.X101]=&quot;&quot;;0;CEILING(([.X101]/[.$H101]);1;1)*[.$H101]);&quot;&quot;)" table:style-name="ce16">
            <text:p>81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36</text:p>
          </table:table-cell>
          <table:table-cell office:value-type="string" table:style-name="ce9">
            <text:p>P004116</text:p>
          </table:table-cell>
          <table:table-cell office:value-type="float" office:value="4301051740" table:style-name="ce10">
            <text:p>4301051740</text:p>
          </table:table-cell>
          <table:table-cell office:value-type="float" office:value="4680115884533" table:number-columns-spanned="2" table:number-rows-spanned="1" table:style-name="ce27">
            <text:p>4680115884533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8" table:style-name="ce11">
            <text:p>1,9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«Сливушки по-венски» ф/в 0,3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02]=&quot;&quot;;0;CEILING(([.X102]/[.$H102]);1;1)*[.$H10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00" table:formula="of:=IFERROR([.Y99]/[.H99];&quot;0&quot;)+IFERROR([.Y100]/[.H100];&quot;0&quot;)+IFERROR([.Y101]/[.H101];&quot;0&quot;)+IFERROR([.Y102]/[.H102];&quot;0&quot;)" table:style-name="ce18">
            <text:p>10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311.39999999999998" table:formula="of:=IFERROR(SUM([.Y99:.Y102]);&quot;0&quot;)" table:style-name="ce18">
            <text:p>311,4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ардель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367</text:p>
          </table:table-cell>
          <table:table-cell office:value-type="string" table:style-name="ce9">
            <text:p>P002644</text:p>
          </table:table-cell>
          <table:table-cell office:value-type="float" office:value="4301060317" table:style-name="ce10">
            <text:p>4301060317</text:p>
          </table:table-cell>
          <table:table-cell office:value-type="float" office:value="4680115880238" table:number-columns-spanned="2" table:number-rows-spanned="1" table:style-name="ce27">
            <text:p>4680115880238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6" table:style-name="ce12">
            <text:p>6</text:p>
          </table:table-cell>
          <table:table-cell office:value-type="float" office:value="1.98" table:style-name="ce11">
            <text:p>1,980</text:p>
          </table:table-cell>
          <table:table-cell office:value-type="float" office:value="2.238" table:style-name="ce11">
            <text:p>2,23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ардельки «Сливушки» фикс.вес 0,33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06]=&quot;&quot;;0;CEILING(([.X106]/[.$H106]);1;1)*[.$H10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06]/[.H106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06:.Y106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Халяль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83</text:p>
          </table:table-cell>
          <table:table-cell office:value-type="string" table:style-name="ce9">
            <text:p>P003437</text:p>
          </table:table-cell>
          <table:table-cell office:value-type="float" office:value="4301011562" table:style-name="ce10">
            <text:p>4301011562</text:p>
          </table:table-cell>
          <table:table-cell office:value-type="float" office:value="4680115882577" table:number-columns-spanned="2" table:number-rows-spanned="1" table:style-name="ce27">
            <text:p>4680115882577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8" table:style-name="ce12">
            <text:p>8</text:p>
          </table:table-cell>
          <table:table-cell office:value-type="float" office:value="3.2" table:style-name="ce11">
            <text:p>3,200</text:p>
          </table:table-cell>
          <table:table-cell office:value-type="float" office:value="3.38" table:style-name="ce11">
            <text:p>3,3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АК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28">
            <text:p>Колбаса вареная Мусульманская ТМ Вязанка Халяль вектор ф/в 0,4 кг Казахстан АК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4" table:style-name="ce16">
            <text:p>64,00<text:s/></text:p>
          </table:table-cell>
          <table:table-cell office:value-type="float" office:value="64" table:formula="of:=IFERROR(IF([.X111]=&quot;&quot;;0;CEILING(([.X111]/[.$H111]);1;1)*[.$H111]);&quot;&quot;)" table:style-name="ce16">
            <text:p>64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83</text:p>
          </table:table-cell>
          <table:table-cell office:value-type="string" table:style-name="ce9">
            <text:p>P003441</text:p>
          </table:table-cell>
          <table:table-cell office:value-type="float" office:value="4301011564" table:style-name="ce10">
            <text:p>4301011564</text:p>
          </table:table-cell>
          <table:table-cell office:value-type="float" office:value="4680115882577" table:number-columns-spanned="2" table:number-rows-spanned="1" table:style-name="ce27">
            <text:p>4680115882577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8" table:style-name="ce12">
            <text:p>8</text:p>
          </table:table-cell>
          <table:table-cell office:value-type="float" office:value="3.2" table:style-name="ce11">
            <text:p>3,200</text:p>
          </table:table-cell>
          <table:table-cell office:value-type="float" office:value="3.38" table:style-name="ce11">
            <text:p>3,3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АК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4">
            <text:p>Колбаса вареная Мусульманская халяль ТМ Вязанка вектор ф/в 0,4 кг НД Узбекистан АК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12]=&quot;&quot;;0;CEILING(([.X112]/[.$H112]);1;1)*[.$H11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0" table:formula="of:=IFERROR([.Y111]/[.H111];&quot;0&quot;)+IFERROR([.Y112]/[.H112];&quot;0&quot;)" table:style-name="ce18">
            <text:p>2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64" table:formula="of:=IFERROR(SUM([.Y111:.Y112]);&quot;0&quot;)" table:style-name="ce18">
            <text:p>64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85</text:p>
          </table:table-cell>
          <table:table-cell office:value-type="string" table:style-name="ce9">
            <text:p>P003442</text:p>
          </table:table-cell>
          <table:table-cell office:value-type="float" office:value="4301031235" table:style-name="ce10">
            <text:p>4301031235</text:p>
          </table:table-cell>
          <table:table-cell office:value-type="float" office:value="4680115883444" table:number-columns-spanned="2" table:number-rows-spanned="1" table:style-name="ce27">
            <text:p>4680115883444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8" table:style-name="ce12">
            <text:p>8</text:p>
          </table:table-cell>
          <table:table-cell office:value-type="float" office:value="2.8" table:style-name="ce11">
            <text:p>2,800</text:p>
          </table:table-cell>
          <table:table-cell office:value-type="float" office:value="3.0680000000000001" table:style-name="ce11">
            <text:p>3,06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АК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28">
            <text:p>П/к колбасы «Аль-Ислами халяль» ф/в 0,35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6.8" table:style-name="ce16">
            <text:p>16,80<text:s/></text:p>
          </table:table-cell>
          <table:table-cell office:value-type="float" office:value="16.799999999999997" table:formula="of:=IFERROR(IF([.X116]=&quot;&quot;;0;CEILING(([.X116]/[.$H116]);1;1)*[.$H116]);&quot;&quot;)" table:style-name="ce16">
            <text:p>16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85</text:p>
          </table:table-cell>
          <table:table-cell office:value-type="string" table:style-name="ce9">
            <text:p>P003439</text:p>
          </table:table-cell>
          <table:table-cell office:value-type="float" office:value="4301031234" table:style-name="ce10">
            <text:p>4301031234</text:p>
          </table:table-cell>
          <table:table-cell office:value-type="float" office:value="4680115883444" table:number-columns-spanned="2" table:number-rows-spanned="1" table:style-name="ce27">
            <text:p>4680115883444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8" table:style-name="ce12">
            <text:p>8</text:p>
          </table:table-cell>
          <table:table-cell office:value-type="float" office:value="2.8" table:style-name="ce11">
            <text:p>2,800</text:p>
          </table:table-cell>
          <table:table-cell office:value-type="float" office:value="3.0680000000000001" table:style-name="ce11">
            <text:p>3,06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АК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4">
            <text:p>П/к колбасы «Аль-Ислами халяль» ф/в 0,35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17]=&quot;&quot;;0;CEILING(([.X117]/[.$H117]);1;1)*[.$H11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5.9999999999999991" table:formula="of:=IFERROR([.Y116]/[.H116];&quot;0&quot;)+IFERROR([.Y117]/[.H117];&quot;0&quot;)" table:style-name="ce18">
            <text:p>6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6.799999999999997" table:formula="of:=IFERROR(SUM([.Y116:.Y117]);&quot;0&quot;)" table:style-name="ce18">
            <text:p>16,8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84</text:p>
          </table:table-cell>
          <table:table-cell office:value-type="string" table:style-name="ce9">
            <text:p>P003440</text:p>
          </table:table-cell>
          <table:table-cell office:value-type="float" office:value="4301051477" table:style-name="ce10">
            <text:p>4301051477</text:p>
          </table:table-cell>
          <table:table-cell office:value-type="float" office:value="4680115882584" table:number-columns-spanned="2" table:number-rows-spanned="1" table:style-name="ce27">
            <text:p>4680115882584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8" table:style-name="ce12">
            <text:p>8</text:p>
          </table:table-cell>
          <table:table-cell office:value-type="float" office:value="2.64" table:style-name="ce11">
            <text:p>2,640</text:p>
          </table:table-cell>
          <table:table-cell office:value-type="float" office:value="2.9079999999999999" table:style-name="ce11">
            <text:p>2,90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АК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28">
            <text:p>Сосиски Восточные халяль ТМ Вязанка полиамид в/у ф/в 0,33 кг НД Узбекистан АК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6.4" table:style-name="ce16">
            <text:p>26,40<text:s/></text:p>
          </table:table-cell>
          <table:table-cell office:value-type="float" office:value="26.400000000000002" table:formula="of:=IFERROR(IF([.X121]=&quot;&quot;;0;CEILING(([.X121]/[.$H121]);1;1)*[.$H121]);&quot;&quot;)" table:style-name="ce16">
            <text:p>26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84</text:p>
          </table:table-cell>
          <table:table-cell office:value-type="string" table:style-name="ce9">
            <text:p>P003438</text:p>
          </table:table-cell>
          <table:table-cell office:value-type="float" office:value="4301051476" table:style-name="ce10">
            <text:p>4301051476</text:p>
          </table:table-cell>
          <table:table-cell office:value-type="float" office:value="4680115882584" table:number-columns-spanned="2" table:number-rows-spanned="1" table:style-name="ce27">
            <text:p>4680115882584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8" table:style-name="ce12">
            <text:p>8</text:p>
          </table:table-cell>
          <table:table-cell office:value-type="float" office:value="2.64" table:style-name="ce11">
            <text:p>2,640</text:p>
          </table:table-cell>
          <table:table-cell office:value-type="float" office:value="2.9079999999999999" table:style-name="ce11">
            <text:p>2,90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АК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Сосиски Восточные халяль ТМ Вязанка полиамид в/у ф/в 0,33 кг Казахстан АК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22]=&quot;&quot;;0;CEILING(([.X122]/[.$H122]);1;1)*[.$H12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0" table:formula="of:=IFERROR([.Y121]/[.H121];&quot;0&quot;)+IFERROR([.Y122]/[.H122];&quot;0&quot;)" table:style-name="ce18">
            <text:p>1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6.400000000000002" table:formula="of:=IFERROR(SUM([.Y121:.Y122]);&quot;0&quot;)" table:style-name="ce18">
            <text:p>26,4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язанк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4028</text:p>
          </table:table-cell>
          <table:table-cell office:value-type="string" table:style-name="ce9">
            <text:p>P005156</text:p>
          </table:table-cell>
          <table:table-cell office:value-type="float" office:value="4301012244" table:style-name="ce10">
            <text:p>4301012244</text:p>
          </table:table-cell>
          <table:table-cell office:value-type="float" office:value="4680115887374" table:number-columns-spanned="2" table:number-rows-spanned="1" table:style-name="ce27">
            <text:p>4680115887374</text:p>
          </table:table-cell>
          <table:covered-table-cell/>
          <table:table-cell office:value-type="float" office:value="1.6" table:style-name="ce11">
            <text:p>1,600</text:p>
          </table:table-cell>
          <table:table-cell office:value-type="float" office:value="8" table:style-name="ce12">
            <text:p>8</text:p>
          </table:table-cell>
          <table:table-cell office:value-type="float" office:value="12.8" table:style-name="ce11">
            <text:p>12,800</text:p>
          </table:table-cell>
          <table:table-cell office:value-type="float" office:value="13.21" table:style-name="ce11">
            <text:p>13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ареные колбасы «Мясная Классическая» Весовой п/а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27]=&quot;&quot;;0;CEILING(([.X127]/[.$H127]);1;1)*[.$H12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312</text:p>
          </table:table-cell>
          <table:table-cell office:value-type="string" table:style-name="ce9">
            <text:p>P003913</text:p>
          </table:table-cell>
          <table:table-cell office:value-type="float" office:value="4301011705" table:style-name="ce10">
            <text:p>4301011705</text:p>
          </table:table-cell>
          <table:table-cell office:value-type="float" office:value="4607091384604" table:number-columns-spanned="2" table:number-rows-spanned="1" table:style-name="ce27">
            <text:p>460709138460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«Докторский гарант» Фикс.вес 0,4 Вектор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8" table:style-name="ce16">
            <text:p>48,00<text:s/></text:p>
          </table:table-cell>
          <table:table-cell office:value-type="float" office:value="48" table:formula="of:=IFERROR(IF([.X128]=&quot;&quot;;0;CEILING(([.X128]/[.$H128]);1;1)*[.$H128]);&quot;&quot;)" table:style-name="ce16">
            <text:p>48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2" table:formula="of:=IFERROR([.Y127]/[.H127];&quot;0&quot;)+IFERROR([.Y128]/[.H128];&quot;0&quot;)" table:style-name="ce18">
            <text:p>12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48" table:formula="of:=IFERROR(SUM([.Y127:.Y128]);&quot;0&quot;)" table:style-name="ce18">
            <text:p>48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0064</text:p>
          </table:table-cell>
          <table:table-cell office:value-type="string" table:style-name="ce9">
            <text:p>P001841</text:p>
          </table:table-cell>
          <table:table-cell office:value-type="float" office:value="4301030895" table:style-name="ce10">
            <text:p>4301030895</text:p>
          </table:table-cell>
          <table:table-cell office:value-type="float" office:value="4607091387667" table:number-columns-spanned="2" table:number-rows-spanned="1" table:style-name="ce27">
            <text:p>4607091387667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10" table:style-name="ce12">
            <text:p>10</text:p>
          </table:table-cell>
          <table:table-cell office:value-type="float" office:value="9" table:style-name="ce11">
            <text:p>9,000</text:p>
          </table:table-cell>
          <table:table-cell office:value-type="float" office:value="9.56" table:style-name="ce11">
            <text:p>9,56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В/к колбасы Балыковая Вязанка Весовые Фиброуз в/у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0" table:style-name="ce16">
            <text:p>90,00<text:s/></text:p>
          </table:table-cell>
          <table:table-cell office:value-type="float" office:value="90" table:formula="of:=IFERROR(IF([.X132]=&quot;&quot;;0;CEILING(([.X132]/[.$H132]);1;1)*[.$H132]);&quot;&quot;)" table:style-name="ce16">
            <text:p>9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41</text:p>
          </table:table-cell>
          <table:table-cell office:value-type="string" table:style-name="ce9">
            <text:p>P005165</text:p>
          </table:table-cell>
          <table:table-cell office:value-type="float" office:value="4301031450" table:style-name="ce10">
            <text:p>4301031450</text:p>
          </table:table-cell>
          <table:table-cell office:value-type="float" office:value="4680115887428" table:number-columns-spanned="2" table:number-rows-spanned="1" table:style-name="ce27">
            <text:p>4680115887428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3899999999999997" table:style-name="ce11">
            <text:p>4,3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Копченые колбасы «Балыковая» Весовой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33]=&quot;&quot;;0;CEILING(([.X133]/[.$H133]);1;1)*[.$H13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664</text:p>
          </table:table-cell>
          <table:table-cell office:value-type="string" table:style-name="ce9">
            <text:p>P002177</text:p>
          </table:table-cell>
          <table:table-cell office:value-type="float" office:value="4301030961" table:style-name="ce10">
            <text:p>4301030961</text:p>
          </table:table-cell>
          <table:table-cell office:value-type="float" office:value="4607091387636" table:number-columns-spanned="2" table:number-rows-spanned="1" table:style-name="ce27">
            <text:p>4607091387636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7" table:style-name="ce11">
            <text:p>4,47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В/к колбасы Салями Финская Вязанка Весовые Фиброуз в/у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34]=&quot;&quot;;0;CEILING(([.X134]/[.$H134]);1;1)*[.$H13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44</text:p>
          </table:table-cell>
          <table:table-cell office:value-type="string" table:style-name="ce9">
            <text:p>P005168</text:p>
          </table:table-cell>
          <table:table-cell office:value-type="float" office:value="4301031453" table:style-name="ce10">
            <text:p>4301031453</text:p>
          </table:table-cell>
          <table:table-cell office:value-type="float" office:value="4680115887336" table:number-columns-spanned="2" table:number-rows-spanned="1" table:style-name="ce27">
            <text:p>4680115887336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3899999999999997" table:style-name="ce11">
            <text:p>4,3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Копченые колбасы «Сервелат Ореховый» Весовой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35]=&quot;&quot;;0;CEILING(([.X135]/[.$H135]);1;1)*[.$H13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097</text:p>
          </table:table-cell>
          <table:table-cell office:value-type="string" table:style-name="ce9">
            <text:p>P002179</text:p>
          </table:table-cell>
          <table:table-cell office:value-type="float" office:value="4301030963" table:style-name="ce10">
            <text:p>4301030963</text:p>
          </table:table-cell>
          <table:table-cell office:value-type="float" office:value="4607091382426" table:number-columns-spanned="2" table:number-rows-spanned="1" table:style-name="ce27">
            <text:p>4607091382426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10" table:style-name="ce12">
            <text:p>10</text:p>
          </table:table-cell>
          <table:table-cell office:value-type="float" office:value="9" table:style-name="ce11">
            <text:p>9,000</text:p>
          </table:table-cell>
          <table:table-cell office:value-type="float" office:value="9.56" table:style-name="ce11">
            <text:p>9,56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В/к колбасы Столичный Вязанка Весовые Фиброуз в/у Вязан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36]=&quot;&quot;;0;CEILING(([.X136]/[.$H136]);1;1)*[.$H13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47</text:p>
          </table:table-cell>
          <table:table-cell office:value-type="string" table:style-name="ce9">
            <text:p>P005171</text:p>
          </table:table-cell>
          <table:table-cell office:value-type="float" office:value="4301031456" table:style-name="ce10">
            <text:p>4301031456</text:p>
          </table:table-cell>
          <table:table-cell office:value-type="float" office:value="4680115887398" table:number-columns-spanned="2" table:number-rows-spanned="1" table:style-name="ce27">
            <text:p>4680115887398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3899999999999997" table:style-name="ce11">
            <text:p>4,3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Копченые колбасы «Сервелат Финский» Весовой фиброуз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37]=&quot;&quot;;0;CEILING(([.X137]/[.$H137]);1;1)*[.$H13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0" table:formula="of:=IFERROR([.Y132]/[.H132];&quot;0&quot;)+IFERROR([.Y133]/[.H133];&quot;0&quot;)+IFERROR([.Y134]/[.H134];&quot;0&quot;)+IFERROR([.Y135]/[.H135];&quot;0&quot;)+IFERROR([.Y136]/[.H136];&quot;0&quot;)+IFERROR([.Y137]/[.H137];&quot;0&quot;)" table:style-name="ce18">
            <text:p>1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90" table:formula="of:=IFERROR(SUM([.Y132:.Y137]);&quot;0&quot;)" table:style-name="ce18">
            <text:p>9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4053</text:p>
          </table:table-cell>
          <table:table-cell office:value-type="string" table:style-name="ce9">
            <text:p>P005187</text:p>
          </table:table-cell>
          <table:table-cell office:value-type="float" office:value="4301052064" table:style-name="ce10">
            <text:p>4301052064</text:p>
          </table:table-cell>
          <table:table-cell office:value-type="float" office:value="4680115887459" table:number-columns-spanned="2" table:number-rows-spanned="1" table:style-name="ce27">
            <text:p>4680115887459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2.0579999999999998" table:style-name="ce11">
            <text:p>2,05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Сочные» Фикс.вес 0,3 П/а мгс ТМ «Вязан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41]=&quot;&quot;;0;CEILING(([.X141]/[.$H141]);1;1)*[.$H14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41]/[.H141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41:.Y141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тародворье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Мясорубска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512</text:p>
          </table:table-cell>
          <table:table-cell office:value-type="string" table:style-name="ce9">
            <text:p>P004437</text:p>
          </table:table-cell>
          <table:table-cell office:value-type="float" office:value="4301020323" table:style-name="ce10">
            <text:p>4301020323</text:p>
          </table:table-cell>
          <table:table-cell office:value-type="float" office:value="4680115886223" table:number-columns-spanned="2" table:number-rows-spanned="1" table:style-name="ce27">
            <text:p>4680115886223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6" table:style-name="ce12">
            <text:p>6</text:p>
          </table:table-cell>
          <table:table-cell office:value-type="float" office:value="1.98" table:style-name="ce11">
            <text:p>1,980</text:p>
          </table:table-cell>
          <table:table-cell office:value-type="float" office:value="2.08" table:style-name="ce11">
            <text:p>2,08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Ветчины «Мясорубская с окороком» Фикс.вес 0,3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47]=&quot;&quot;;0;CEILING(([.X147]/[.$H147]);1;1)*[.$H14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47]/[.H147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47:.Y147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4085</text:p>
          </table:table-cell>
          <table:table-cell office:value-type="string" table:style-name="ce9">
            <text:p>P005231</text:p>
          </table:table-cell>
          <table:table-cell office:value-type="float" office:value="4301031463" table:style-name="ce10">
            <text:p>4301031463</text:p>
          </table:table-cell>
          <table:table-cell office:value-type="float" office:value="4680115887824" table:number-columns-spanned="2" table:number-rows-spanned="1" table:style-name="ce27">
            <text:p>4680115887824</text:p>
          </table:table-cell>
          <table:covered-table-cell/>
          <table:table-cell office:value-type="float" office:value="0.15" table:style-name="ce11">
            <text:p>0,150</text:p>
          </table:table-cell>
          <table:table-cell office:value-type="float" office:value="16" table:style-name="ce12">
            <text:p>1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31">
            <text:p>Копченые колбасы «Сервелат Вяленый» Фикс.вес 0,15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1]=&quot;&quot;;0;CEILING(([.X151]/[.$H151]);1;1)*[.$H15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86</text:p>
          </table:table-cell>
          <table:table-cell office:value-type="string" table:style-name="ce9">
            <text:p>P005232</text:p>
          </table:table-cell>
          <table:table-cell office:value-type="float" office:value="4301031464" table:style-name="ce10">
            <text:p>4301031464</text:p>
          </table:table-cell>
          <table:table-cell office:value-type="float" office:value="4680115887701" table:number-columns-spanned="2" table:number-rows-spanned="1" table:style-name="ce27">
            <text:p>4680115887701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8" table:style-name="ce12">
            <text:p>8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5">
            <text:p>Копченые колбасы «Сервелат Вяленый»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2]=&quot;&quot;;0;CEILING(([.X152]/[.$H152]);1;1)*[.$H15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56</text:p>
          </table:table-cell>
          <table:table-cell office:value-type="string" table:style-name="ce9">
            <text:p>P003179</text:p>
          </table:table-cell>
          <table:table-cell office:value-type="float" office:value="4301031191" table:style-name="ce10">
            <text:p>4301031191</text:p>
          </table:table-cell>
          <table:table-cell office:value-type="float" office:value="4680115880993" table:number-columns-spanned="2" table:number-rows-spanned="1" table:style-name="ce27">
            <text:p>4680115880993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5" table:style-name="ce11">
            <text:p>4,4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Колбаса Мясорубская ТМ Стародворье с рубленой грудинкой в оболочке фиброуз в вакуумной упаковк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3]=&quot;&quot;;0;CEILING(([.X153]/[.$H153]);1;1)*[.$H15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76</text:p>
          </table:table-cell>
          <table:table-cell office:value-type="string" table:style-name="ce9">
            <text:p>P003276</text:p>
          </table:table-cell>
          <table:table-cell office:value-type="float" office:value="4301031204" table:style-name="ce10">
            <text:p>4301031204</text:p>
          </table:table-cell>
          <table:table-cell office:value-type="float" office:value="4680115881761" table:number-columns-spanned="2" table:number-rows-spanned="1" table:style-name="ce27">
            <text:p>4680115881761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5" table:style-name="ce11">
            <text:p>4,4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Копченые колбасы Салями Мясорубская с рубленым шпиком Бордо Весовой фиброуз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4]=&quot;&quot;;0;CEILING(([.X154]/[.$H154]);1;1)*[.$H15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47</text:p>
          </table:table-cell>
          <table:table-cell office:value-type="string" table:style-name="ce9">
            <text:p>P003259</text:p>
          </table:table-cell>
          <table:table-cell office:value-type="float" office:value="4301031201" table:style-name="ce10">
            <text:p>4301031201</text:p>
          </table:table-cell>
          <table:table-cell office:value-type="float" office:value="4680115881563" table:number-columns-spanned="2" table:number-rows-spanned="1" table:style-name="ce27">
            <text:p>4680115881563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3899999999999997" table:style-name="ce11">
            <text:p>4,3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В/к колбасы Сервелат Мясорубский с мелкорубленным окороком Бордо Весовой фиброуз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0" table:style-name="ce16">
            <text:p>40,00<text:s/></text:p>
          </table:table-cell>
          <table:table-cell office:value-type="float" office:value="42" table:formula="of:=IFERROR(IF([.X155]=&quot;&quot;;0;CEILING(([.X155]/[.$H155]);1;1)*[.$H155]);&quot;&quot;)" table:style-name="ce16">
            <text:p>42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26</text:p>
          </table:table-cell>
          <table:table-cell office:value-type="string" table:style-name="ce9">
            <text:p>P005155</text:p>
          </table:table-cell>
          <table:table-cell office:value-type="float" office:value="4301031447" table:style-name="ce10">
            <text:p>4301031447</text:p>
          </table:table-cell>
          <table:table-cell office:value-type="float" office:value="4680115887565" table:number-columns-spanned="2" table:number-rows-spanned="1" table:style-name="ce27">
            <text:p>4680115887565</text:p>
          </table:table-cell>
          <table:covered-table-cell/>
          <table:table-cell office:value-type="float" office:value="0.08" table:style-name="ce11">
            <text:p>0,080</text:p>
          </table:table-cell>
          <table:table-cell office:value-type="float" office:value="10" table:style-name="ce12">
            <text:p>10</text:p>
          </table:table-cell>
          <table:table-cell office:value-type="float" office:value="0.8" table:style-name="ce11">
            <text:p>0,800</text:p>
          </table:table-cell>
          <table:table-cell office:value-type="float" office:value="0.93" table:style-name="ce11">
            <text:p>0,93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Копченые колбасы «Ассорти Мясорубская коллекция: Сервелат Делюкс, С балыком» Фикс.вес 0,08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6]=&quot;&quot;;0;CEILING(([.X156]/[.$H156]);1;1)*[.$H15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60</text:p>
          </table:table-cell>
          <table:table-cell office:value-type="string" table:style-name="ce9">
            <text:p>P003256</text:p>
          </table:table-cell>
          <table:table-cell office:value-type="float" office:value="4301031199" table:style-name="ce10">
            <text:p>4301031199</text:p>
          </table:table-cell>
          <table:table-cell office:value-type="float" office:value="4680115880986" table:number-columns-spanned="2" table:number-rows-spanned="1" table:style-name="ce27">
            <text:p>4680115880986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Колбаса Мясорубская ТМ Стародворье с рубленой грудинкой в оболочке фиброуз в вакуумной упаковке 0,35 кг срез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.3" table:style-name="ce16">
            <text:p>6,30<text:s/></text:p>
          </table:table-cell>
          <table:table-cell office:value-type="float" office:value="6.3000000000000007" table:formula="of:=IFERROR(IF([.X157]=&quot;&quot;;0;CEILING(([.X157]/[.$H157]);1;1)*[.$H157]);&quot;&quot;)" table:style-name="ce16">
            <text:p>6,3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97</text:p>
          </table:table-cell>
          <table:table-cell office:value-type="string" table:style-name="ce9">
            <text:p>P005141</text:p>
          </table:table-cell>
          <table:table-cell office:value-type="float" office:value="4301031443" table:style-name="ce10">
            <text:p>4301031443</text:p>
          </table:table-cell>
          <table:table-cell office:value-type="float" office:value="4680115887213" table:number-columns-spanned="2" table:number-rows-spanned="1" table:style-name="ce27">
            <text:p>4680115887213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" table:style-name="ce11">
            <text:p>1,9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Копченые колбасы «Мясорубская с чесноком»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58]=&quot;&quot;;0;CEILING(([.X158]/[.$H158]);1;1)*[.$H15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77</text:p>
          </table:table-cell>
          <table:table-cell office:value-type="string" table:style-name="ce9">
            <text:p>P003277</text:p>
          </table:table-cell>
          <table:table-cell office:value-type="float" office:value="4301031205" table:style-name="ce10">
            <text:p>4301031205</text:p>
          </table:table-cell>
          <table:table-cell office:value-type="float" office:value="4680115881785" table:number-columns-spanned="2" table:number-rows-spanned="1" table:style-name="ce27">
            <text:p>4680115881785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Копченые колбасы Салями Мясорубская с рубленым шпиком срез Бордо ф/в 0,35 фиброуз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4" table:style-name="ce16">
            <text:p>84,00<text:s/></text:p>
          </table:table-cell>
          <table:table-cell office:value-type="float" office:value="84" table:formula="of:=IFERROR(IF([.X159]=&quot;&quot;;0;CEILING(([.X159]/[.$H159]);1;1)*[.$H159]);&quot;&quot;)" table:style-name="ce16">
            <text:p>84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829</text:p>
          </table:table-cell>
          <table:table-cell office:value-type="string" table:style-name="ce9">
            <text:p>P004890</text:p>
          </table:table-cell>
          <table:table-cell office:value-type="float" office:value="4301031399" table:style-name="ce10">
            <text:p>4301031399</text:p>
          </table:table-cell>
          <table:table-cell office:value-type="float" office:value="4680115886537" table:number-columns-spanned="2" table:number-rows-spanned="1" table:style-name="ce27">
            <text:p>4680115886537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3" table:style-name="ce11">
            <text:p>1,9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Копченые колбасы «Сервелат Мясорубский Делюкс»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60]=&quot;&quot;;0;CEILING(([.X160]/[.$H160]);1;1)*[.$H16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178</text:p>
          </table:table-cell>
          <table:table-cell office:value-type="string" table:style-name="ce9">
            <text:p>P003837</text:p>
          </table:table-cell>
          <table:table-cell office:value-type="float" office:value="4301031279" table:style-name="ce10">
            <text:p>4301031279</text:p>
          </table:table-cell>
          <table:table-cell office:value-type="float" office:value="4680115887596" table:number-columns-spanned="2" table:number-rows-spanned="1" table:style-name="ce27">
            <text:p>4680115887596</text:p>
          </table:table-cell>
          <table:covered-table-cell/>
          <table:table-cell office:value-type="float" office:value="0.08" table:style-name="ce11">
            <text:p>0,080</text:p>
          </table:table-cell>
          <table:table-cell office:value-type="float" office:value="10" table:style-name="ce12">
            <text:p>10</text:p>
          </table:table-cell>
          <table:table-cell office:value-type="float" office:value="0.8" table:style-name="ce11">
            <text:p>0,800</text:p>
          </table:table-cell>
          <table:table-cell office:value-type="float" office:value="1.01" table:style-name="ce11">
            <text:p>1,010</text:p>
          </table:table-cell>
          <table:table-cell office:value-type="float" office:value="336" table:style-name="ce12">
            <text:p>336</text:p>
          </table:table-cell>
          <table:table-cell office:value-type="string" table:style-name="ce12">
            <text:p>2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Копченые колбасы «Сервелат Мясорубский» Фикс.вес 0,08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61]=&quot;&quot;;0;CEILING(([.X161]/[.$H161]);1;1)*[.$H16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48</text:p>
          </table:table-cell>
          <table:table-cell office:value-type="string" table:style-name="ce9">
            <text:p>P003260</text:p>
          </table:table-cell>
          <table:table-cell office:value-type="float" office:value="4301031202" table:style-name="ce10">
            <text:p>4301031202</text:p>
          </table:table-cell>
          <table:table-cell office:value-type="float" office:value="4680115881679" table:number-columns-spanned="2" table:number-rows-spanned="1" table:style-name="ce27">
            <text:p>4680115881679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000000000000002" table:style-name="ce11">
            <text:p>2,2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В/к колбасы Сервелат Мясорубский с мелкорубленным окороком срез Бордо Фикс.вес 0,35 фиброуз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26" table:style-name="ce16">
            <text:p>126,00<text:s/></text:p>
          </table:table-cell>
          <table:table-cell office:value-type="float" office:value="126" table:formula="of:=IFERROR(IF([.X162]=&quot;&quot;;0;CEILING(([.X162]/[.$H162]);1;1)*[.$H162]);&quot;&quot;)" table:style-name="ce16">
            <text:p>126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59</text:p>
          </table:table-cell>
          <table:table-cell office:value-type="string" table:style-name="ce9">
            <text:p>P003034</text:p>
          </table:table-cell>
          <table:table-cell office:value-type="float" office:value="4301031158" table:style-name="ce10">
            <text:p>4301031158</text:p>
          </table:table-cell>
          <table:table-cell office:value-type="float" office:value="4680115880191" table:number-columns-spanned="2" table:number-rows-spanned="1" table:style-name="ce27">
            <text:p>4680115880191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В/к колбасы Сервелат Мясорубский с мелкорубленным окороком срез Бордо Фикс.вес 0,4 фиброуз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63]=&quot;&quot;;0;CEILING(([.X163]/[.$H163]);1;1)*[.$H16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046</text:p>
          </table:table-cell>
          <table:table-cell office:value-type="string" table:style-name="ce9">
            <text:p>P003598</text:p>
          </table:table-cell>
          <table:table-cell office:value-type="float" office:value="4301031245" table:style-name="ce10">
            <text:p>4301031245</text:p>
          </table:table-cell>
          <table:table-cell office:value-type="float" office:value="4680115883963" table:number-columns-spanned="2" table:number-rows-spanned="1" table:style-name="ce27">
            <text:p>4680115883963</text:p>
          </table:table-cell>
          <table:covered-table-cell/>
          <table:table-cell office:value-type="float" office:value="0.28000000000000003" table:style-name="ce11">
            <text:p>0,280</text:p>
          </table:table-cell>
          <table:table-cell office:value-type="float" office:value="6" table:style-name="ce12">
            <text:p>6</text:p>
          </table:table-cell>
          <table:table-cell office:value-type="float" office:value="1.68" table:style-name="ce11">
            <text:p>1,680</text:p>
          </table:table-cell>
          <table:table-cell office:value-type="float" office:value="1.78" table:style-name="ce11">
            <text:p>1,78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П/к колбасы «Мясорубская» ф/в 0,28 н/о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64]=&quot;&quot;;0;CEILING(([.X164]/[.$H164]);1;1)*[.$H16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13" table:formula="of:=IFERROR([.Y151]/[.H151];&quot;0&quot;)+IFERROR([.Y152]/[.H152];&quot;0&quot;)+IFERROR([.Y153]/[.H153];&quot;0&quot;)+IFERROR([.Y154]/[.H154];&quot;0&quot;)+IFERROR([.Y155]/[.H155];&quot;0&quot;)+IFERROR([.Y156]/[.H156];&quot;0&quot;)+IFERROR([.Y157]/[.H157];&quot;0&quot;)+IFERROR([.Y158]/[.H158];&quot;0&quot;)+IFERROR([.Y159]/[.H159];&quot;0&quot;)+IFERROR([.Y160]/[.H160];&quot;0&quot;)+IFERROR([.Y161]/[.H161];&quot;0&quot;)+IFERROR([.Y162]/[.H162];&quot;0&quot;)+IFERROR([.Y163]/[.H163];&quot;0&quot;)+IFERROR([.Y164]/[.H164];&quot;0&quot;)" table:style-name="ce18">
            <text:p>113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58.3" table:formula="of:=IFERROR(SUM([.Y151:.Y164]);&quot;0&quot;)" table:style-name="ce18">
            <text:p>258,3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ыро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895</text:p>
          </table:table-cell>
          <table:table-cell office:value-type="string" table:style-name="ce9">
            <text:p>P004981</text:p>
          </table:table-cell>
          <table:table-cell office:value-type="float" office:value="4301032053" table:style-name="ce10">
            <text:p>4301032053</text:p>
          </table:table-cell>
          <table:table-cell office:value-type="float" office:value="4680115886780" table:number-columns-spanned="2" table:number-rows-spanned="1" table:style-name="ce27">
            <text:p>4680115886780</text:p>
          </table:table-cell>
          <table:covered-table-cell/>
          <table:table-cell office:value-type="float" office:value="7.0000000000000007E-2" table:style-name="ce11">
            <text:p>0,070</text:p>
          </table:table-cell>
          <table:table-cell office:value-type="float" office:value="18" table:style-name="ce12">
            <text:p>18</text:p>
          </table:table-cell>
          <table:table-cell office:value-type="float" office:value="1.26" table:style-name="ce11">
            <text:p>1,260</text:p>
          </table:table-cell>
          <table:table-cell office:value-type="float" office:value="1.45" table:style-name="ce11">
            <text:p>1,45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28">
            <text:p>Сырокопченые колбасы «Мраморная» Фикс.вес 0,07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68]=&quot;&quot;;0;CEILING(([.X168]/[.$H168]);1;1)*[.$H16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893</text:p>
          </table:table-cell>
          <table:table-cell office:value-type="string" table:style-name="ce9">
            <text:p>P004978</text:p>
          </table:table-cell>
          <table:table-cell office:value-type="float" office:value="4301032051" table:style-name="ce10">
            <text:p>4301032051</text:p>
          </table:table-cell>
          <table:table-cell office:value-type="float" office:value="4680115886742" table:number-columns-spanned="2" table:number-rows-spanned="1" table:style-name="ce27">
            <text:p>4680115886742</text:p>
          </table:table-cell>
          <table:covered-table-cell/>
          <table:table-cell office:value-type="float" office:value="7.0000000000000007E-2" table:style-name="ce11">
            <text:p>0,070</text:p>
          </table:table-cell>
          <table:table-cell office:value-type="float" office:value="18" table:style-name="ce12">
            <text:p>18</text:p>
          </table:table-cell>
          <table:table-cell office:value-type="float" office:value="1.26" table:style-name="ce11">
            <text:p>1,260</text:p>
          </table:table-cell>
          <table:table-cell office:value-type="float" office:value="1.45" table:style-name="ce11">
            <text:p>1,45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4">
            <text:p>Сырокопченые колбасы «Сальчичон» Фикс.вес 0,07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2.6" table:style-name="ce16">
            <text:p>12,60<text:s/></text:p>
          </table:table-cell>
          <table:table-cell office:value-type="float" office:value="12.6" table:formula="of:=IFERROR(IF([.X169]=&quot;&quot;;0;CEILING(([.X169]/[.$H169]);1;1)*[.$H169]);&quot;&quot;)" table:style-name="ce16">
            <text:p>12,6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894</text:p>
          </table:table-cell>
          <table:table-cell office:value-type="string" table:style-name="ce9">
            <text:p>P004979</text:p>
          </table:table-cell>
          <table:table-cell office:value-type="float" office:value="4301032052" table:style-name="ce10">
            <text:p>4301032052</text:p>
          </table:table-cell>
          <table:table-cell office:value-type="float" office:value="4680115886766" table:number-columns-spanned="2" table:number-rows-spanned="1" table:style-name="ce27">
            <text:p>4680115886766</text:p>
          </table:table-cell>
          <table:covered-table-cell/>
          <table:table-cell office:value-type="float" office:value="7.0000000000000007E-2" table:style-name="ce11">
            <text:p>0,070</text:p>
          </table:table-cell>
          <table:table-cell office:value-type="float" office:value="18" table:style-name="ce12">
            <text:p>18</text:p>
          </table:table-cell>
          <table:table-cell office:value-type="float" office:value="1.26" table:style-name="ce11">
            <text:p>1,260</text:p>
          </table:table-cell>
          <table:table-cell office:value-type="float" office:value="1.45" table:style-name="ce11">
            <text:p>1,45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4">
            <text:p>Сырокопченые колбасы «Сервелат Ореховый» Фикс.вес 0,07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.82" table:style-name="ce16">
            <text:p>8,82<text:s/></text:p>
          </table:table-cell>
          <table:table-cell office:value-type="float" office:value="8.82" table:formula="of:=IFERROR(IF([.X170]=&quot;&quot;;0;CEILING(([.X170]/[.$H170]);1;1)*[.$H170]);&quot;&quot;)" table:style-name="ce16">
            <text:p>8,82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7" table:formula="of:=IFERROR([.Y168]/[.H168];&quot;0&quot;)+IFERROR([.Y169]/[.H169];&quot;0&quot;)+IFERROR([.Y170]/[.H170];&quot;0&quot;)" table:style-name="ce18">
            <text:p>17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1.42" table:formula="of:=IFERROR(SUM([.Y168:.Y170]);&quot;0&quot;)" table:style-name="ce18">
            <text:p>21,42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ыровял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896</text:p>
          </table:table-cell>
          <table:table-cell office:value-type="string" table:style-name="ce9">
            <text:p>P004982</text:p>
          </table:table-cell>
          <table:table-cell office:value-type="float" office:value="4301170013" table:style-name="ce10">
            <text:p>4301170013</text:p>
          </table:table-cell>
          <table:table-cell office:value-type="float" office:value="4680115886797" table:number-columns-spanned="2" table:number-rows-spanned="1" table:style-name="ce27">
            <text:p>4680115886797</text:p>
          </table:table-cell>
          <table:covered-table-cell/>
          <table:table-cell office:value-type="float" office:value="7.0000000000000007E-2" table:style-name="ce11">
            <text:p>0,070</text:p>
          </table:table-cell>
          <table:table-cell office:value-type="float" office:value="18" table:style-name="ce12">
            <text:p>18</text:p>
          </table:table-cell>
          <table:table-cell office:value-type="float" office:value="1.26" table:style-name="ce11">
            <text:p>1,260</text:p>
          </table:table-cell>
          <table:table-cell office:value-type="float" office:value="1.45" table:style-name="ce11">
            <text:p>1,45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28">
            <text:p>Сыровяленые колбасы «Фуэт» Фикс.вес 0,07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7.56" table:style-name="ce16">
            <text:p>7,56<text:s/></text:p>
          </table:table-cell>
          <table:table-cell office:value-type="float" office:value="7.5600000000000005" table:formula="of:=IFERROR(IF([.X174]=&quot;&quot;;0;CEILING(([.X174]/[.$H174]);1;1)*[.$H174]);&quot;&quot;)" table:style-name="ce16">
            <text:p>7,56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6" table:formula="of:=IFERROR([.Y174]/[.H174];&quot;0&quot;)" table:style-name="ce18">
            <text:p>6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7.5600000000000005" table:formula="of:=IFERROR(SUM([.Y174:.Y174]);&quot;0&quot;)" table:style-name="ce18">
            <text:p>7,56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чинк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24</text:p>
          </table:table-cell>
          <table:table-cell office:value-type="string" table:style-name="ce9">
            <text:p>P003231</text:p>
          </table:table-cell>
          <table:table-cell office:value-type="float" office:value="4301011450" table:style-name="ce10">
            <text:p>4301011450</text:p>
          </table:table-cell>
          <table:table-cell office:value-type="float" office:value="4680115881402" table:number-columns-spanned="2" table:number-rows-spanned="1" table:style-name="ce27">
            <text:p>4680115881402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ареные колбасы «Сочинка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79]=&quot;&quot;;0;CEILING(([.X179]/[.$H179]);1;1)*[.$H17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23</text:p>
          </table:table-cell>
          <table:table-cell office:value-type="string" table:style-name="ce9">
            <text:p>P003230</text:p>
          </table:table-cell>
          <table:table-cell office:value-type="float" office:value="4301011768" table:style-name="ce10">
            <text:p>4301011768</text:p>
          </table:table-cell>
          <table:table-cell office:value-type="float" office:value="4680115881396" table:number-columns-spanned="2" table:number-rows-spanned="1" table:style-name="ce27">
            <text:p>4680115881396</text:p>
          </table:table-cell>
          <table:covered-table-cell/>
          <table:table-cell office:value-type="float" office:value="0.45" table:style-name="ce11">
            <text:p>0,450</text:p>
          </table:table-cell>
          <table:table-cell office:value-type="float" office:value="6" table:style-name="ce12">
            <text:p>6</text:p>
          </table:table-cell>
          <table:table-cell office:value-type="float" office:value="2.7" table:style-name="ce11">
            <text:p>2,700</text:p>
          </table:table-cell>
          <table:table-cell office:value-type="float" office:value="2.88" table:style-name="ce11">
            <text:p>2,8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Сочинка с сочным окороком ТМ Стародворье ф/в 0,45 кг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80]=&quot;&quot;;0;CEILING(([.X180]/[.$H180]);1;1)*[.$H18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79]/[.H179];&quot;0&quot;)+IFERROR([.Y180]/[.H180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79:.Y180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068</text:p>
          </table:table-cell>
          <table:table-cell office:value-type="string" table:style-name="ce9">
            <text:p>P003611</text:p>
          </table:table-cell>
          <table:table-cell office:value-type="float" office:value="4301020261" table:style-name="ce10">
            <text:p>4301020261</text:p>
          </table:table-cell>
          <table:table-cell office:value-type="float" office:value="4680115882935" table:number-columns-spanned="2" table:number-rows-spanned="1" table:style-name="ce27">
            <text:p>4680115882935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етчина «Сочинка с сочным окороком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84]=&quot;&quot;;0;CEILING(([.X184]/[.$H184]);1;1)*[.$H18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57</text:p>
          </table:table-cell>
          <table:table-cell office:value-type="string" table:style-name="ce9">
            <text:p>P003128</text:p>
          </table:table-cell>
          <table:table-cell office:value-type="float" office:value="4301020220" table:style-name="ce10">
            <text:p>4301020220</text:p>
          </table:table-cell>
          <table:table-cell office:value-type="float" office:value="4680115880764" table:number-columns-spanned="2" table:number-rows-spanned="1" table:style-name="ce27">
            <text:p>4680115880764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799999999999998" table:style-name="ce11">
            <text:p>2,2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етчина Сочинка с сочным окороком ТМ Стародворье полиамид ф/в 0,35 кг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85]=&quot;&quot;;0;CEILING(([.X185]/[.$H185]);1;1)*[.$H18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184]/[.H184];&quot;0&quot;)+IFERROR([.Y185]/[.H185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184:.Y185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41</text:p>
          </table:table-cell>
          <table:table-cell office:value-type="string" table:style-name="ce9">
            <text:p>P003387</text:p>
          </table:table-cell>
          <table:table-cell office:value-type="float" office:value="4301031224" table:style-name="ce10">
            <text:p>4301031224</text:p>
          </table:table-cell>
          <table:table-cell office:value-type="float" office:value="4680115882683" table:number-columns-spanned="2" table:number-rows-spanned="1" table:style-name="ce27">
            <text:p>4680115882683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В/к колбасы «Сочинка по-европейски с сочной грудинкой» Весовой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5" table:style-name="ce16">
            <text:p>15,00<text:s/></text:p>
          </table:table-cell>
          <table:table-cell office:value-type="float" office:value="16.200000000000003" table:formula="of:=IFERROR(IF([.X189]=&quot;&quot;;0;CEILING(([.X189]/[.$H189]);1;1)*[.$H189]);&quot;&quot;)" table:style-name="ce16">
            <text:p>16,2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3</text:p>
          </table:table-cell>
          <table:table-cell office:value-type="string" table:style-name="ce9">
            <text:p>P003401</text:p>
          </table:table-cell>
          <table:table-cell office:value-type="float" office:value="4301031230" table:style-name="ce10">
            <text:p>4301031230</text:p>
          </table:table-cell>
          <table:table-cell office:value-type="float" office:value="4680115882690" table:number-columns-spanned="2" table:number-rows-spanned="1" table:style-name="ce27">
            <text:p>4680115882690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В/к колбасы «Сочинка по-фински с сочным окороком» Весовой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90]=&quot;&quot;;0;CEILING(([.X190]/[.$H190]);1;1)*[.$H19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5</text:p>
          </table:table-cell>
          <table:table-cell office:value-type="string" table:style-name="ce9">
            <text:p>P003383</text:p>
          </table:table-cell>
          <table:table-cell office:value-type="float" office:value="4301031220" table:style-name="ce10">
            <text:p>4301031220</text:p>
          </table:table-cell>
          <table:table-cell office:value-type="float" office:value="4680115882669" table:number-columns-spanned="2" table:number-rows-spanned="1" table:style-name="ce27">
            <text:p>4680115882669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П/к колбасы «Сочинка зернистая с сочной грудинкой» Весовой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0" table:style-name="ce16">
            <text:p>60,00<text:s/></text:p>
          </table:table-cell>
          <table:table-cell office:value-type="float" office:value="64.800000000000011" table:formula="of:=IFERROR(IF([.X191]=&quot;&quot;;0;CEILING(([.X191]/[.$H191]);1;1)*[.$H191]);&quot;&quot;)" table:style-name="ce16">
            <text:p>64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7</text:p>
          </table:table-cell>
          <table:table-cell office:value-type="string" table:style-name="ce9">
            <text:p>P003384</text:p>
          </table:table-cell>
          <table:table-cell office:value-type="float" office:value="4301031221" table:style-name="ce10">
            <text:p>4301031221</text:p>
          </table:table-cell>
          <table:table-cell office:value-type="float" office:value="4680115882676" table:number-columns-spanned="2" table:number-rows-spanned="1" table:style-name="ce27">
            <text:p>4680115882676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П/к колбасы «Сочинка рубленая с сочным окороком» Весовой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92]=&quot;&quot;;0;CEILING(([.X192]/[.$H192]);1;1)*[.$H19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4</text:p>
          </table:table-cell>
          <table:table-cell office:value-type="string" table:style-name="ce9">
            <text:p>P003386</text:p>
          </table:table-cell>
          <table:table-cell office:value-type="float" office:value="4301031223" table:style-name="ce10">
            <text:p>4301031223</text:p>
          </table:table-cell>
          <table:table-cell office:value-type="float" office:value="4680115884014" table:number-columns-spanned="2" table:number-rows-spanned="1" table:style-name="ce27">
            <text:p>4680115884014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3" table:style-name="ce11">
            <text:p>1,9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В/к колбасы «Сочинка по-европейски с сочной грудинкой» срез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08" table:style-name="ce16">
            <text:p>108,00<text:s/></text:p>
          </table:table-cell>
          <table:table-cell office:value-type="float" office:value="108" table:formula="of:=IFERROR(IF([.X193]=&quot;&quot;;0;CEILING(([.X193]/[.$H193]);1;1)*[.$H193]);&quot;&quot;)" table:style-name="ce16">
            <text:p>108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2</text:p>
          </table:table-cell>
          <table:table-cell office:value-type="string" table:style-name="ce9">
            <text:p>P003385</text:p>
          </table:table-cell>
          <table:table-cell office:value-type="float" office:value="4301031222" table:style-name="ce10">
            <text:p>4301031222</text:p>
          </table:table-cell>
          <table:table-cell office:value-type="float" office:value="4680115884007" table:number-columns-spanned="2" table:number-rows-spanned="1" table:style-name="ce27">
            <text:p>4680115884007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" table:style-name="ce11">
            <text:p>1,9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В/к колбасы «Сочинка по-фински с сочным окороком» срез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54" table:style-name="ce16">
            <text:p>54,00<text:s/></text:p>
          </table:table-cell>
          <table:table-cell office:value-type="float" office:value="54" table:formula="of:=IFERROR(IF([.X194]=&quot;&quot;;0;CEILING(([.X194]/[.$H194]);1;1)*[.$H194]);&quot;&quot;)" table:style-name="ce16">
            <text:p>54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6</text:p>
          </table:table-cell>
          <table:table-cell office:value-type="string" table:style-name="ce9">
            <text:p>P003400</text:p>
          </table:table-cell>
          <table:table-cell office:value-type="float" office:value="4301031229" table:style-name="ce10">
            <text:p>4301031229</text:p>
          </table:table-cell>
          <table:table-cell office:value-type="float" office:value="4680115884038" table:number-columns-spanned="2" table:number-rows-spanned="1" table:style-name="ce27">
            <text:p>4680115884038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" table:style-name="ce11">
            <text:p>1,9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П/к колбасы «Сочинка зернистая с сочной грудинкой» срез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195]=&quot;&quot;;0;CEILING(([.X195]/[.$H195]);1;1)*[.$H19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48</text:p>
          </table:table-cell>
          <table:table-cell office:value-type="string" table:style-name="ce9">
            <text:p>P003390</text:p>
          </table:table-cell>
          <table:table-cell office:value-type="float" office:value="4301031225" table:style-name="ce10">
            <text:p>4301031225</text:p>
          </table:table-cell>
          <table:table-cell office:value-type="float" office:value="4680115884021" table:number-columns-spanned="2" table:number-rows-spanned="1" table:style-name="ce27">
            <text:p>4680115884021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" table:style-name="ce11">
            <text:p>1,9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П/к колбасы «Сочинка рубленая с сочным окороком» срез Фикс.вес 0,3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1.6" table:style-name="ce16">
            <text:p>21,60<text:s/></text:p>
          </table:table-cell>
          <table:table-cell office:value-type="float" office:value="21.6" table:formula="of:=IFERROR(IF([.X196]=&quot;&quot;;0;CEILING(([.X196]/[.$H196]);1;1)*[.$H196]);&quot;&quot;)" table:style-name="ce16">
            <text:p>21,6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17" table:formula="of:=IFERROR([.Y189]/[.H189];&quot;0&quot;)+IFERROR([.Y190]/[.H190];&quot;0&quot;)+IFERROR([.Y191]/[.H191];&quot;0&quot;)+IFERROR([.Y192]/[.H192];&quot;0&quot;)+IFERROR([.Y193]/[.H193];&quot;0&quot;)+IFERROR([.Y194]/[.H194];&quot;0&quot;)+IFERROR([.Y195]/[.H195];&quot;0&quot;)+IFERROR([.Y196]/[.H196];&quot;0&quot;)" table:style-name="ce18">
            <text:p>117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64.60000000000002" table:formula="of:=IFERROR(SUM([.Y189:.Y196]);&quot;0&quot;)" table:style-name="ce18">
            <text:p>264,6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43</text:p>
          </table:table-cell>
          <table:table-cell office:value-type="string" table:style-name="ce9">
            <text:p>P003263</text:p>
          </table:table-cell>
          <table:table-cell office:value-type="float" office:value="4301051408" table:style-name="ce10">
            <text:p>4301051408</text:p>
          </table:table-cell>
          <table:table-cell office:value-type="float" office:value="4680115881594" table:number-columns-spanned="2" table:number-rows-spanned="1" table:style-name="ce27">
            <text:p>4680115881594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6" table:style-name="ce12">
            <text:p>6</text:p>
          </table:table-cell>
          <table:table-cell office:value-type="float" office:value="8.1" table:style-name="ce11">
            <text:p>8,100</text:p>
          </table:table-cell>
          <table:table-cell office:value-type="float" office:value="8.5939999999999994" table:style-name="ce11">
            <text:p>8,5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осиски «Сочинки Молочные» Весовой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00]=&quot;&quot;;0;CEILING(([.X200]/[.$H200]);1;1)*[.$H20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45</text:p>
          </table:table-cell>
          <table:table-cell office:value-type="string" table:style-name="ce9">
            <text:p>P003266</text:p>
          </table:table-cell>
          <table:table-cell office:value-type="float" office:value="4301051411" table:style-name="ce10">
            <text:p>4301051411</text:p>
          </table:table-cell>
          <table:table-cell office:value-type="float" office:value="4680115881617" table:number-columns-spanned="2" table:number-rows-spanned="1" table:style-name="ce27">
            <text:p>4680115881617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6" table:style-name="ce12">
            <text:p>6</text:p>
          </table:table-cell>
          <table:table-cell office:value-type="float" office:value="8.1" table:style-name="ce11">
            <text:p>8,100</text:p>
          </table:table-cell>
          <table:table-cell office:value-type="float" office:value="8.5760000000000005" table:style-name="ce11">
            <text:p>8,576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Сочинки Сливочные» Весовые ТМ «Стародворье» 1,35 кг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01]=&quot;&quot;;0;CEILING(([.X201]/[.$H201]);1;1)*[.$H20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25</text:p>
          </table:table-cell>
          <table:table-cell office:value-type="string" table:style-name="ce9">
            <text:p>P003959</text:p>
          </table:table-cell>
          <table:table-cell office:value-type="float" office:value="4301051656" table:style-name="ce10">
            <text:p>4301051656</text:p>
          </table:table-cell>
          <table:table-cell office:value-type="float" office:value="4680115880573" table:number-columns-spanned="2" table:number-rows-spanned="1" table:style-name="ce27">
            <text:p>4680115880573</text:p>
          </table:table-cell>
          <table:covered-table-cell/>
          <table:table-cell office:value-type="float" office:value="1.45" table:style-name="ce11">
            <text:p>1,450</text:p>
          </table:table-cell>
          <table:table-cell office:value-type="float" office:value="6" table:style-name="ce12">
            <text:p>6</text:p>
          </table:table-cell>
          <table:table-cell office:value-type="float" office:value="8.6999999999999993" table:style-name="ce11">
            <text:p>8,700</text:p>
          </table:table-cell>
          <table:table-cell office:value-type="float" office:value="9.1940000000000008" table:style-name="ce11">
            <text:p>9,1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«Сочинки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02]=&quot;&quot;;0;CEILING(([.X202]/[.$H202]);1;1)*[.$H20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42</text:p>
          </table:table-cell>
          <table:table-cell office:value-type="string" table:style-name="ce9">
            <text:p>P003262</text:p>
          </table:table-cell>
          <table:table-cell office:value-type="float" office:value="4301051407" table:style-name="ce10">
            <text:p>4301051407</text:p>
          </table:table-cell>
          <table:table-cell office:value-type="float" office:value="4680115882195" table:number-columns-spanned="2" table:number-rows-spanned="1" table:style-name="ce27">
            <text:p>4680115882195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7" table:style-name="ce11">
            <text:p>2,67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Сочинки Молочные» Фикс.вес 0,4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6" table:style-name="ce16">
            <text:p>96,00<text:s/></text:p>
          </table:table-cell>
          <table:table-cell office:value-type="float" office:value="96" table:formula="of:=IFERROR(IF([.X203]=&quot;&quot;;0;CEILING(([.X203]/[.$H203]);1;1)*[.$H203]);&quot;&quot;)" table:style-name="ce16">
            <text:p>96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92</text:p>
          </table:table-cell>
          <table:table-cell office:value-type="string" table:style-name="ce9">
            <text:p>P004147</text:p>
          </table:table-cell>
          <table:table-cell office:value-type="float" office:value="4301051752" table:style-name="ce10">
            <text:p>4301051752</text:p>
          </table:table-cell>
          <table:table-cell office:value-type="float" office:value="4680115882607" table:number-columns-spanned="2" table:number-rows-spanned="1" table:style-name="ce27">
            <text:p>4680115882607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2.052" table:style-name="ce11">
            <text:p>2,0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«Сочинки с сочной грудинкой» Фикс.вес 0,3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32" table:style-name="ce16">
            <text:p>132,00<text:s/></text:p>
          </table:table-cell>
          <table:table-cell office:value-type="float" office:value="133.20000000000002" table:formula="of:=IFERROR(IF([.X204]=&quot;&quot;;0;CEILING(([.X204]/[.$H204]);1;1)*[.$H204]);&quot;&quot;)" table:style-name="ce16">
            <text:p>133,2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18</text:p>
          </table:table-cell>
          <table:table-cell office:value-type="string" table:style-name="ce9">
            <text:p>P003957</text:p>
          </table:table-cell>
          <table:table-cell office:value-type="float" office:value="4301051666" table:style-name="ce10">
            <text:p>4301051666</text:p>
          </table:table-cell>
          <table:table-cell office:value-type="float" office:value="4680115880092" table:number-columns-spanned="2" table:number-rows-spanned="1" table:style-name="ce27">
            <text:p>4680115880092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20000000000001" table:style-name="ce11">
            <text:p>2,6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«Сочинки с сочной грудинкой» Фикс.вес 0,4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05]=&quot;&quot;;0;CEILING(([.X205]/[.$H205]);1;1)*[.$H20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21</text:p>
          </table:table-cell>
          <table:table-cell office:value-type="string" table:style-name="ce9">
            <text:p>P003958</text:p>
          </table:table-cell>
          <table:table-cell office:value-type="float" office:value="4301051668" table:style-name="ce10">
            <text:p>4301051668</text:p>
          </table:table-cell>
          <table:table-cell office:value-type="float" office:value="4680115880221" table:number-columns-spanned="2" table:number-rows-spanned="1" table:style-name="ce27">
            <text:p>4680115880221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20000000000001" table:style-name="ce11">
            <text:p>2,6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«Сочинки с сочным окороком» Фикс.вес 0,4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32" table:style-name="ce16">
            <text:p>132,00<text:s/></text:p>
          </table:table-cell>
          <table:table-cell office:value-type="float" office:value="132" table:formula="of:=IFERROR(IF([.X206]=&quot;&quot;;0;CEILING(([.X206]/[.$H206]);1;1)*[.$H206]);&quot;&quot;)" table:style-name="ce16">
            <text:p>132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86</text:p>
          </table:table-cell>
          <table:table-cell office:value-type="string" table:style-name="ce9">
            <text:p>P004178</text:p>
          </table:table-cell>
          <table:table-cell office:value-type="float" office:value="4301051945" table:style-name="ce10">
            <text:p>4301051945</text:p>
          </table:table-cell>
          <table:table-cell office:value-type="float" office:value="4680115880504" table:number-columns-spanned="2" table:number-rows-spanned="1" table:style-name="ce27">
            <text:p>468011588050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20000000000001" table:style-name="ce11">
            <text:p>2,6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Сочинки с сыром Бордо ф/в 0,4 кг п/а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07]=&quot;&quot;;0;CEILING(([.X207]/[.$H207]);1;1)*[.$H20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44</text:p>
          </table:table-cell>
          <table:table-cell office:value-type="string" table:style-name="ce9">
            <text:p>P003265</text:p>
          </table:table-cell>
          <table:table-cell office:value-type="float" office:value="4301051410" table:style-name="ce10">
            <text:p>4301051410</text:p>
          </table:table-cell>
          <table:table-cell office:value-type="float" office:value="4680115882164" table:number-columns-spanned="2" table:number-rows-spanned="1" table:style-name="ce27">
            <text:p>468011588216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79999999999999" table:style-name="ce11">
            <text:p>2,65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Сочинки Сливочные» Фикс.вес 0,4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0" table:style-name="ce16">
            <text:p>80,00<text:s/></text:p>
          </table:table-cell>
          <table:table-cell office:value-type="float" office:value="81.599999999999994" table:formula="of:=IFERROR(IF([.X208]=&quot;&quot;;0;CEILING(([.X208]/[.$H208]);1;1)*[.$H208]);&quot;&quot;)" table:style-name="ce16">
            <text:p>81,6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03" table:formula="of:=IFERROR([.Y200]/[.H200];&quot;0&quot;)+IFERROR([.Y201]/[.H201];&quot;0&quot;)+IFERROR([.Y202]/[.H202];&quot;0&quot;)+IFERROR([.Y203]/[.H203];&quot;0&quot;)+IFERROR([.Y204]/[.H204];&quot;0&quot;)+IFERROR([.Y205]/[.H205];&quot;0&quot;)+IFERROR([.Y206]/[.H206];&quot;0&quot;)+IFERROR([.Y207]/[.H207];&quot;0&quot;)+IFERROR([.Y208]/[.H208];&quot;0&quot;)" table:style-name="ce18">
            <text:p>203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442.80000000000007" table:formula="of:=IFERROR(SUM([.Y200:.Y208]);&quot;0&quot;)" table:style-name="ce18">
            <text:p>442,8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ардель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759</text:p>
          </table:table-cell>
          <table:table-cell office:value-type="string" table:style-name="ce9">
            <text:p>P003961</text:p>
          </table:table-cell>
          <table:table-cell office:value-type="float" office:value="4301060463" table:style-name="ce10">
            <text:p>4301060463</text:p>
          </table:table-cell>
          <table:table-cell office:value-type="float" office:value="4680115880818" table:number-columns-spanned="2" table:number-rows-spanned="1" table:style-name="ce27">
            <text:p>468011588081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20000000000001" table:style-name="ce11">
            <text:p>2,6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ардельки «Сочинки с сыром» Фикс.вес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12]=&quot;&quot;;0;CEILING(([.X212]/[.$H212]);1;1)*[.$H21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58</text:p>
          </table:table-cell>
          <table:table-cell office:value-type="string" table:style-name="ce9">
            <text:p>P003960</text:p>
          </table:table-cell>
          <table:table-cell office:value-type="float" office:value="4301060389" table:style-name="ce10">
            <text:p>4301060389</text:p>
          </table:table-cell>
          <table:table-cell office:value-type="float" office:value="4680115880801" table:number-columns-spanned="2" table:number-rows-spanned="1" table:style-name="ce27">
            <text:p>4680115880801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20000000000001" table:style-name="ce11">
            <text:p>2,6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ардельки «Сочинки» Фикс.вес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4" table:style-name="ce16">
            <text:p>24,00<text:s/></text:p>
          </table:table-cell>
          <table:table-cell office:value-type="float" office:value="24" table:formula="of:=IFERROR(IF([.X213]=&quot;&quot;;0;CEILING(([.X213]/[.$H213]);1;1)*[.$H213]);&quot;&quot;)" table:style-name="ce16">
            <text:p>24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0" table:formula="of:=IFERROR([.Y212]/[.H212];&quot;0&quot;)+IFERROR([.Y213]/[.H213];&quot;0&quot;)" table:style-name="ce18">
            <text:p>1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4" table:formula="of:=IFERROR(SUM([.Y212:.Y213]);&quot;0&quot;)" table:style-name="ce18">
            <text:p>24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тародворска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273</text:p>
          </table:table-cell>
          <table:table-cell office:value-type="string" table:style-name="ce9">
            <text:p>P004070</text:p>
          </table:table-cell>
          <table:table-cell office:value-type="float" office:value="4301011826" table:style-name="ce10">
            <text:p>4301011826</text:p>
          </table:table-cell>
          <table:table-cell office:value-type="float" office:value="4680115884137" table:number-columns-spanned="2" table:number-rows-spanned="1" table:style-name="ce27">
            <text:p>4680115884137</text:p>
          </table:table-cell>
          <table:covered-table-cell/>
          <table:table-cell office:value-type="float" office:value="1.45" table:style-name="ce11">
            <text:p>1,450</text:p>
          </table:table-cell>
          <table:table-cell office:value-type="float" office:value="8" table:style-name="ce12">
            <text:p>8</text:p>
          </table:table-cell>
          <table:table-cell office:value-type="float" office:value="11.6" table:style-name="ce11">
            <text:p>11,600</text:p>
          </table:table-cell>
          <table:table-cell office:value-type="float" office:value="12.01" table:style-name="ce11">
            <text:p>12,0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ареные колбасы «Молочная Стародворская с молоком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18]=&quot;&quot;;0;CEILING(([.X218]/[.$H218]);1;1)*[.$H21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75</text:p>
          </table:table-cell>
          <table:table-cell office:value-type="string" table:style-name="ce9">
            <text:p>P003950</text:p>
          </table:table-cell>
          <table:table-cell office:value-type="float" office:value="4301011724" table:style-name="ce10">
            <text:p>4301011724</text:p>
          </table:table-cell>
          <table:table-cell office:value-type="float" office:value="4680115884236" table:number-columns-spanned="2" table:number-rows-spanned="1" table:style-name="ce27">
            <text:p>4680115884236</text:p>
          </table:table-cell>
          <table:covered-table-cell/>
          <table:table-cell office:value-type="float" office:value="1.45" table:style-name="ce11">
            <text:p>1,450</text:p>
          </table:table-cell>
          <table:table-cell office:value-type="float" office:value="8" table:style-name="ce12">
            <text:p>8</text:p>
          </table:table-cell>
          <table:table-cell office:value-type="float" office:value="11.6" table:style-name="ce11">
            <text:p>11,600</text:p>
          </table:table-cell>
          <table:table-cell office:value-type="float" office:value="12.01" table:style-name="ce11">
            <text:p>12,0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Стародворская со шпиком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19]=&quot;&quot;;0;CEILING(([.X219]/[.$H219]);1;1)*[.$H21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71</text:p>
          </table:table-cell>
          <table:table-cell office:value-type="string" table:style-name="ce9">
            <text:p>P003945</text:p>
          </table:table-cell>
          <table:table-cell office:value-type="float" office:value="4301011721" table:style-name="ce10">
            <text:p>4301011721</text:p>
          </table:table-cell>
          <table:table-cell office:value-type="float" office:value="4680115884175" table:number-columns-spanned="2" table:number-rows-spanned="1" table:style-name="ce27">
            <text:p>4680115884175</text:p>
          </table:table-cell>
          <table:covered-table-cell/>
          <table:table-cell office:value-type="float" office:value="1.45" table:style-name="ce11">
            <text:p>1,450</text:p>
          </table:table-cell>
          <table:table-cell office:value-type="float" office:value="8" table:style-name="ce12">
            <text:p>8</text:p>
          </table:table-cell>
          <table:table-cell office:value-type="float" office:value="11.6" table:style-name="ce11">
            <text:p>11,600</text:p>
          </table:table-cell>
          <table:table-cell office:value-type="float" office:value="12.01" table:style-name="ce11">
            <text:p>12,0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Стародворская с окороком 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0]=&quot;&quot;;0;CEILING(([.X220]/[.$H220]);1;1)*[.$H22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74</text:p>
          </table:table-cell>
          <table:table-cell office:value-type="string" table:style-name="ce9">
            <text:p>P004067</text:p>
          </table:table-cell>
          <table:table-cell office:value-type="float" office:value="4301011824" table:style-name="ce10">
            <text:p>4301011824</text:p>
          </table:table-cell>
          <table:table-cell office:value-type="float" office:value="4680115884144" table:number-columns-spanned="2" table:number-rows-spanned="1" table:style-name="ce27">
            <text:p>468011588414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Молочная Стародворская с молоком» ф/в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1]=&quot;&quot;;0;CEILING(([.X221]/[.$H221]);1;1)*[.$H22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74</text:p>
          </table:table-cell>
          <table:table-cell office:value-type="string" table:style-name="ce9">
            <text:p>P005062</text:p>
          </table:table-cell>
          <table:table-cell office:value-type="float" office:value="4301012196" table:style-name="ce10">
            <text:p>4301012196</text:p>
          </table:table-cell>
          <table:table-cell office:value-type="float" office:value="4680115884144" table:number-columns-spanned="2" table:number-rows-spanned="1" table:style-name="ce27">
            <text:p>468011588414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Молочная Стародворская с молоком» Фикс.вес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2]=&quot;&quot;;0;CEILING(([.X222]/[.$H222]);1;1)*[.$H22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859</text:p>
          </table:table-cell>
          <table:table-cell office:value-type="string" table:style-name="ce9">
            <text:p>P004942</text:p>
          </table:table-cell>
          <table:table-cell office:value-type="float" office:value="4301012149" table:style-name="ce10">
            <text:p>4301012149</text:p>
          </table:table-cell>
          <table:table-cell office:value-type="float" office:value="4680115886551" table:number-columns-spanned="2" table:number-rows-spanned="1" table:style-name="ce27">
            <text:p>4680115886551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Стародворская Мясная» Фикс.вес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3]=&quot;&quot;;0;CEILING(([.X223]/[.$H223]);1;1)*[.$H22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4011</text:p>
          </table:table-cell>
          <table:table-cell office:value-type="string" table:style-name="ce9">
            <text:p>P005130</text:p>
          </table:table-cell>
          <table:table-cell office:value-type="float" office:value="4301012228" table:style-name="ce10">
            <text:p>4301012228</text:p>
          </table:table-cell>
          <table:table-cell office:value-type="float" office:value="4680115887282" table:number-columns-spanned="2" table:number-rows-spanned="1" table:style-name="ce27">
            <text:p>4680115887282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Стародворская со шпиком» Фикс.вес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4]=&quot;&quot;;0;CEILING(([.X224]/[.$H224]);1;1)*[.$H22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72</text:p>
          </table:table-cell>
          <table:table-cell office:value-type="string" table:style-name="ce9">
            <text:p>P003947</text:p>
          </table:table-cell>
          <table:table-cell office:value-type="float" office:value="4301011722" table:style-name="ce10">
            <text:p>4301011722</text:p>
          </table:table-cell>
          <table:table-cell office:value-type="float" office:value="4680115884205" table:number-columns-spanned="2" table:number-rows-spanned="1" table:style-name="ce27">
            <text:p>4680115884205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Стародворская с окороком» ф/в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5]=&quot;&quot;;0;CEILING(([.X225]/[.$H225]);1;1)*[.$H22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72</text:p>
          </table:table-cell>
          <table:table-cell office:value-type="string" table:style-name="ce9">
            <text:p>P005061</text:p>
          </table:table-cell>
          <table:table-cell office:value-type="float" office:value="4301012195" table:style-name="ce10">
            <text:p>4301012195</text:p>
          </table:table-cell>
          <table:table-cell office:value-type="float" office:value="4680115884205" table:number-columns-spanned="2" table:number-rows-spanned="1" table:style-name="ce27">
            <text:p>4680115884205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Стародворская с окороком» Фикс.вес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26]=&quot;&quot;;0;CEILING(([.X226]/[.$H226]);1;1)*[.$H22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218]/[.H218];&quot;0&quot;)+IFERROR([.Y219]/[.H219];&quot;0&quot;)+IFERROR([.Y220]/[.H220];&quot;0&quot;)+IFERROR([.Y221]/[.H221];&quot;0&quot;)+IFERROR([.Y222]/[.H222];&quot;0&quot;)+IFERROR([.Y223]/[.H223];&quot;0&quot;)+IFERROR([.Y224]/[.H224];&quot;0&quot;)+IFERROR([.Y225]/[.H225];&quot;0&quot;)+IFERROR([.Y226]/[.H226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218:.Y226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573</text:p>
          </table:table-cell>
          <table:table-cell office:value-type="string" table:style-name="ce9">
            <text:p>P004891</text:p>
          </table:table-cell>
          <table:table-cell office:value-type="float" office:value="4301020377" table:style-name="ce10">
            <text:p>4301020377</text:p>
          </table:table-cell>
          <table:table-cell office:value-type="float" office:value="4680115885981" table:number-columns-spanned="2" table:number-rows-spanned="1" table:style-name="ce27">
            <text:p>4680115885981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6" table:style-name="ce12">
            <text:p>6</text:p>
          </table:table-cell>
          <table:table-cell office:value-type="float" office:value="1.98" table:style-name="ce11">
            <text:p>1,980</text:p>
          </table:table-cell>
          <table:table-cell office:value-type="float" office:value="2.08" table:style-name="ce11">
            <text:p>2,08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етчины «Стародворская» Фикс.вес 0,33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30]=&quot;&quot;;0;CEILING(([.X230]/[.$H230]);1;1)*[.$H23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230]/[.H230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230:.Y230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Деликатесы в/к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921</text:p>
          </table:table-cell>
          <table:table-cell office:value-type="string" table:style-name="ce9">
            <text:p>P005060</text:p>
          </table:table-cell>
          <table:table-cell office:value-type="float" office:value="4301040362" table:style-name="ce10">
            <text:p>4301040362</text:p>
          </table:table-cell>
          <table:table-cell office:value-type="float" office:value="4680115886803" table:number-columns-spanned="2" table:number-rows-spanned="1" table:style-name="ce27">
            <text:p>4680115886803</text:p>
          </table:table-cell>
          <table:covered-table-cell/>
          <table:table-cell office:value-type="float" office:value="0.12" table:style-name="ce11">
            <text:p>0,120</text:p>
          </table:table-cell>
          <table:table-cell office:value-type="float" office:value="15" table:style-name="ce12">
            <text:p>15</text:p>
          </table:table-cell>
          <table:table-cell office:value-type="float" office:value="1.8" table:style-name="ce11">
            <text:p>1,800</text:p>
          </table:table-cell>
          <table:table-cell office:value-type="float" office:value="1.9750000000000001" table:style-name="ce11">
            <text:p>1,975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Деликатесы в/к «Грудинка копчено-вареная» Фикс.вес 0,12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.8" table:style-name="ce16">
            <text:p>1,80<text:s/></text:p>
          </table:table-cell>
          <table:table-cell office:value-type="float" office:value="1.8" table:formula="of:=IFERROR(IF([.X234]=&quot;&quot;;0;CEILING(([.X234]/[.$H234]);1;1)*[.$H234]);&quot;&quot;)" table:style-name="ce16">
            <text:p>1,8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" table:formula="of:=IFERROR([.Y234]/[.H234];&quot;0&quot;)" table:style-name="ce18">
            <text:p>1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.8" table:formula="of:=IFERROR(SUM([.Y234:.Y234]);&quot;0&quot;)" table:style-name="ce18">
            <text:p>1,8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Деликатесы с/к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922</text:p>
          </table:table-cell>
          <table:table-cell office:value-type="string" table:style-name="ce9">
            <text:p>P005020</text:p>
          </table:table-cell>
          <table:table-cell office:value-type="float" office:value="4301041004" table:style-name="ce10">
            <text:p>4301041004</text:p>
          </table:table-cell>
          <table:table-cell office:value-type="float" office:value="4680115886704" table:number-columns-spanned="2" table:number-rows-spanned="1" table:style-name="ce27">
            <text:p>4680115886704</text:p>
          </table:table-cell>
          <table:covered-table-cell/>
          <table:table-cell office:value-type="float" office:value="5.5E-2" table:style-name="ce11">
            <text:p>0,055</text:p>
          </table:table-cell>
          <table:table-cell office:value-type="float" office:value="18" table:style-name="ce12">
            <text:p>18</text:p>
          </table:table-cell>
          <table:table-cell office:value-type="float" office:value="0.99" table:style-name="ce11">
            <text:p>0,990</text:p>
          </table:table-cell>
          <table:table-cell office:value-type="float" office:value="1.18" table:style-name="ce11">
            <text:p>1,18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28">
            <text:p>Деликатесы с/к «Бекон Вяленый выдержанный» Фикс.вес 0,055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.98" table:style-name="ce16">
            <text:p>1,98<text:s/></text:p>
          </table:table-cell>
          <table:table-cell office:value-type="float" office:value="1.98" table:formula="of:=IFERROR(IF([.X238]=&quot;&quot;;0;CEILING(([.X238]/[.$H238]);1;1)*[.$H238]);&quot;&quot;)" table:style-name="ce16">
            <text:p>1,98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20</text:p>
          </table:table-cell>
          <table:table-cell office:value-type="string" table:style-name="ce9">
            <text:p>P005059</text:p>
          </table:table-cell>
          <table:table-cell office:value-type="float" office:value="4301041008" table:style-name="ce10">
            <text:p>4301041008</text:p>
          </table:table-cell>
          <table:table-cell office:value-type="float" office:value="4680115886681" table:number-columns-spanned="2" table:number-rows-spanned="1" table:style-name="ce27">
            <text:p>4680115886681</text:p>
          </table:table-cell>
          <table:covered-table-cell/>
          <table:table-cell office:value-type="float" office:value="0.12" table:style-name="ce11">
            <text:p>0,120</text:p>
          </table:table-cell>
          <table:table-cell office:value-type="float" office:value="15" table:style-name="ce12">
            <text:p>15</text:p>
          </table:table-cell>
          <table:table-cell office:value-type="float" office:value="1.8" table:style-name="ce11">
            <text:p>1,800</text:p>
          </table:table-cell>
          <table:table-cell office:value-type="float" office:value="1.9750000000000001" table:style-name="ce11">
            <text:p>1,975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4">
            <text:p>Деликатесы с/к «Бекон сырокопченый» Фикс.вес 0,12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7.2" table:style-name="ce16">
            <text:p>7,20<text:s/></text:p>
          </table:table-cell>
          <table:table-cell office:value-type="float" office:value="7.2" table:formula="of:=IFERROR(IF([.X239]=&quot;&quot;;0;CEILING(([.X239]/[.$H239]);1;1)*[.$H239]);&quot;&quot;)" table:style-name="ce16">
            <text:p>7,2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25</text:p>
          </table:table-cell>
          <table:table-cell office:value-type="string" table:style-name="ce9">
            <text:p>P005023</text:p>
          </table:table-cell>
          <table:table-cell office:value-type="float" office:value="4301041007" table:style-name="ce10">
            <text:p>4301041007</text:p>
          </table:table-cell>
          <table:table-cell office:value-type="float" office:value="4680115886735" table:number-columns-spanned="2" table:number-rows-spanned="1" table:style-name="ce27">
            <text:p>4680115886735</text:p>
          </table:table-cell>
          <table:covered-table-cell/>
          <table:table-cell office:value-type="float" office:value="0.05" table:style-name="ce11">
            <text:p>0,050</text:p>
          </table:table-cell>
          <table:table-cell office:value-type="float" office:value="18" table:style-name="ce12">
            <text:p>18</text:p>
          </table:table-cell>
          <table:table-cell office:value-type="float" office:value="0.9" table:style-name="ce11">
            <text:p>0,900</text:p>
          </table:table-cell>
          <table:table-cell office:value-type="float" office:value="1.0900000000000001" table:style-name="ce11">
            <text:p>1,09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4">
            <text:p>Деликатесы с/к «Корейка Вяленая выдержанная» Фикс.вес 0,05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.6" table:style-name="ce16">
            <text:p>3,60<text:s/></text:p>
          </table:table-cell>
          <table:table-cell office:value-type="float" office:value="3.6" table:formula="of:=IFERROR(IF([.X240]=&quot;&quot;;0;CEILING(([.X240]/[.$H240]);1;1)*[.$H240]);&quot;&quot;)" table:style-name="ce16">
            <text:p>3,6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24</text:p>
          </table:table-cell>
          <table:table-cell office:value-type="string" table:style-name="ce9">
            <text:p>P005022</text:p>
          </table:table-cell>
          <table:table-cell office:value-type="float" office:value="4301041006" table:style-name="ce10">
            <text:p>4301041006</text:p>
          </table:table-cell>
          <table:table-cell office:value-type="float" office:value="4680115886728" table:number-columns-spanned="2" table:number-rows-spanned="1" table:style-name="ce27">
            <text:p>4680115886728</text:p>
          </table:table-cell>
          <table:covered-table-cell/>
          <table:table-cell office:value-type="float" office:value="5.5E-2" table:style-name="ce11">
            <text:p>0,055</text:p>
          </table:table-cell>
          <table:table-cell office:value-type="float" office:value="18" table:style-name="ce12">
            <text:p>18</text:p>
          </table:table-cell>
          <table:table-cell office:value-type="float" office:value="0.99" table:style-name="ce11">
            <text:p>0,990</text:p>
          </table:table-cell>
          <table:table-cell office:value-type="float" office:value="1.18" table:style-name="ce11">
            <text:p>1,18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4">
            <text:p>Деликатесы с/к «Окорок Прошутто сыровяленый выдержанный» Фикс.вес 0,055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5.28" table:style-name="ce16">
            <text:p>5,28<text:s/></text:p>
          </table:table-cell>
          <table:table-cell office:value-type="float" office:value="5.9399999999999995" table:formula="of:=IFERROR(IF([.X241]=&quot;&quot;;0;CEILING(([.X241]/[.$H241]);1;1)*[.$H241]);&quot;&quot;)" table:style-name="ce16">
            <text:p>5,94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23</text:p>
          </table:table-cell>
          <table:table-cell office:value-type="string" table:style-name="ce9">
            <text:p>P005021</text:p>
          </table:table-cell>
          <table:table-cell office:value-type="float" office:value="4301041005" table:style-name="ce10">
            <text:p>4301041005</text:p>
          </table:table-cell>
          <table:table-cell office:value-type="float" office:value="4680115886711" table:number-columns-spanned="2" table:number-rows-spanned="1" table:style-name="ce27">
            <text:p>4680115886711</text:p>
          </table:table-cell>
          <table:covered-table-cell/>
          <table:table-cell office:value-type="float" office:value="5.5E-2" table:style-name="ce11">
            <text:p>0,055</text:p>
          </table:table-cell>
          <table:table-cell office:value-type="float" office:value="18" table:style-name="ce12">
            <text:p>18</text:p>
          </table:table-cell>
          <table:table-cell office:value-type="float" office:value="0.99" table:style-name="ce11">
            <text:p>0,990</text:p>
          </table:table-cell>
          <table:table-cell office:value-type="float" office:value="1.18" table:style-name="ce11">
            <text:p>1,180</text:p>
          </table:table-cell>
          <table:table-cell office:value-type="float" office:value="216" table:style-name="ce12">
            <text:p>216</text:p>
          </table:table-cell>
          <table:table-cell office:value-type="string" table:style-name="ce12">
            <text:p>27</text:p>
          </table:table-cell>
          <table:table-cell table:style-name="ce12"/>
          <table:table-cell office:value-type="string" table:style-name="ce13">
            <text:p>МЗР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4">
            <text:p>Деликатесы с/к «Окорок Хамон Вяленый выдержанный» Фикс.вес 0,055 нарезк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.98" table:style-name="ce16">
            <text:p>1,98<text:s/></text:p>
          </table:table-cell>
          <table:table-cell office:value-type="float" office:value="1.98" table:formula="of:=IFERROR(IF([.X242]=&quot;&quot;;0;CEILING(([.X242]/[.$H242]);1;1)*[.$H242]);&quot;&quot;)" table:style-name="ce16">
            <text:p>1,98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8" table:formula="of:=IFERROR([.Y238]/[.H238];&quot;0&quot;)+IFERROR([.Y239]/[.H239];&quot;0&quot;)+IFERROR([.Y240]/[.H240];&quot;0&quot;)+IFERROR([.Y241]/[.H241];&quot;0&quot;)+IFERROR([.Y242]/[.H242];&quot;0&quot;)" table:style-name="ce18">
            <text:p>18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0.7" table:formula="of:=IFERROR(SUM([.Y238:.Y242]);&quot;0&quot;)" table:style-name="ce18">
            <text:p>20,7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Филедворская по-стародвор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389</text:p>
          </table:table-cell>
          <table:table-cell office:value-type="string" table:style-name="ce9">
            <text:p>P004212</text:p>
          </table:table-cell>
          <table:table-cell office:value-type="float" office:value="4301011855" table:style-name="ce10">
            <text:p>4301011855</text:p>
          </table:table-cell>
          <table:table-cell office:value-type="float" office:value="4680115885837" table:number-columns-spanned="2" table:number-rows-spanned="1" table:style-name="ce27">
            <text:p>4680115885837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ареные колбасы «Молочная по-стародворски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0" table:style-name="ce16">
            <text:p>80,00<text:s/></text:p>
          </table:table-cell>
          <table:table-cell office:value-type="float" office:value="86.4" table:formula="of:=IFERROR(IF([.X247]=&quot;&quot;;0;CEILING(([.X247]/[.$H247]);1;1)*[.$H247]);&quot;&quot;)" table:style-name="ce16">
            <text:p>86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1</text:p>
          </table:table-cell>
          <table:table-cell office:value-type="string" table:style-name="ce9">
            <text:p>P004209</text:p>
          </table:table-cell>
          <table:table-cell office:value-type="float" office:value="4301011853" table:style-name="ce10">
            <text:p>4301011853</text:p>
          </table:table-cell>
          <table:table-cell office:value-type="float" office:value="4680115885851" table:number-columns-spanned="2" table:number-rows-spanned="1" table:style-name="ce27">
            <text:p>4680115885851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Филедворская со шпиком по-стародворски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48]=&quot;&quot;;0;CEILING(([.X248]/[.$H248]);1;1)*[.$H24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87</text:p>
          </table:table-cell>
          <table:table-cell office:value-type="string" table:style-name="ce9">
            <text:p>P004206</text:p>
          </table:table-cell>
          <table:table-cell office:value-type="float" office:value="4301011850" table:style-name="ce10">
            <text:p>4301011850</text:p>
          </table:table-cell>
          <table:table-cell office:value-type="float" office:value="4680115885806" table:number-columns-spanned="2" table:number-rows-spanned="1" table:style-name="ce27">
            <text:p>4680115885806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Филедворская по-стародворски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50" table:style-name="ce16">
            <text:p>150,00<text:s/></text:p>
          </table:table-cell>
          <table:table-cell office:value-type="float" office:value="151.20000000000002" table:formula="of:=IFERROR(IF([.X249]=&quot;&quot;;0;CEILING(([.X249]/[.$H249]);1;1)*[.$H249]);&quot;&quot;)" table:style-name="ce16">
            <text:p>151,2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0</text:p>
          </table:table-cell>
          <table:table-cell office:value-type="string" table:style-name="ce9">
            <text:p>P004208</text:p>
          </table:table-cell>
          <table:table-cell office:value-type="float" office:value="4301011852" table:style-name="ce10">
            <text:p>4301011852</text:p>
          </table:table-cell>
          <table:table-cell office:value-type="float" office:value="4680115885844" table:number-columns-spanned="2" table:number-rows-spanned="1" table:style-name="ce27">
            <text:p>4680115885844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Молочная по-стародворски» ф/в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50]=&quot;&quot;;0;CEILING(([.X250]/[.$H250]);1;1)*[.$H25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88</text:p>
          </table:table-cell>
          <table:table-cell office:value-type="string" table:style-name="ce9">
            <text:p>P004207</text:p>
          </table:table-cell>
          <table:table-cell office:value-type="float" office:value="4301011851" table:style-name="ce10">
            <text:p>4301011851</text:p>
          </table:table-cell>
          <table:table-cell office:value-type="float" office:value="4680115885820" table:number-columns-spanned="2" table:number-rows-spanned="1" table:style-name="ce27">
            <text:p>4680115885820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Филедворская по-стародворски» ф/в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51]=&quot;&quot;;0;CEILING(([.X251]/[.$H251]);1;1)*[.$H25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2" table:formula="of:=IFERROR([.Y247]/[.H247];&quot;0&quot;)+IFERROR([.Y248]/[.H248];&quot;0&quot;)+IFERROR([.Y249]/[.H249];&quot;0&quot;)+IFERROR([.Y250]/[.H250];&quot;0&quot;)+IFERROR([.Y251]/[.H251];&quot;0&quot;)" table:style-name="ce18">
            <text:p>22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37.60000000000002" table:formula="of:=IFERROR(SUM([.Y247:.Y251]);&quot;0&quot;)" table:style-name="ce18">
            <text:p>237,6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тародворская Золоченная в печ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201</text:p>
          </table:table-cell>
          <table:table-cell office:value-type="string" table:style-name="ce9">
            <text:p>P002567</text:p>
          </table:table-cell>
          <table:table-cell office:value-type="float" office:value="4301011223" table:style-name="ce10">
            <text:p>4301011223</text:p>
          </table:table-cell>
          <table:table-cell office:value-type="float" office:value="4607091383423" table:number-columns-spanned="2" table:number-rows-spanned="1" table:style-name="ce27">
            <text:p>4607091383423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305999999999999" table:style-name="ce11">
            <text:p>11,306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35" table:style-name="ce12">
            <text:p>35</text:p>
          </table:table-cell>
          <table:table-cell office:value-type="string" table:number-columns-spanned="5" table:number-rows-spanned="1" table:style-name="ce28">
            <text:p>Вареные колбасы Докторская ГОСТ Золоченная в печи Весовые ц/о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56]=&quot;&quot;;0;CEILING(([.X256]/[.$H256]);1;1)*[.$H25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46</text:p>
          </table:table-cell>
          <table:table-cell office:value-type="string" table:style-name="ce9">
            <text:p>P005063</text:p>
          </table:table-cell>
          <table:table-cell office:value-type="float" office:value="4301012199" table:style-name="ce10">
            <text:p>4301012199</text:p>
          </table:table-cell>
          <table:table-cell office:value-type="float" office:value="4680115886957" table:number-columns-spanned="2" table:number-rows-spanned="1" table:style-name="ce27">
            <text:p>4680115886957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4">
            <text:p>Вареные колбасы «со шпиком» Весовой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57]=&quot;&quot;;0;CEILING(([.X257]/[.$H257]);1;1)*[.$H25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429</text:p>
          </table:table-cell>
          <table:table-cell office:value-type="string" table:style-name="ce9">
            <text:p>P004275</text:p>
          </table:table-cell>
          <table:table-cell office:value-type="float" office:value="4301012098" table:style-name="ce10">
            <text:p>4301012098</text:p>
          </table:table-cell>
          <table:table-cell office:value-type="float" office:value="4680115885660" table:number-columns-spanned="2" table:number-rows-spanned="1" table:style-name="ce27">
            <text:p>4680115885660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35" table:style-name="ce12">
            <text:p>35</text:p>
          </table:table-cell>
          <table:table-cell office:value-type="string" table:number-columns-spanned="5" table:number-rows-spanned="1" table:style-name="ce44">
            <text:p>Вареные колбасы «Стародворская» Весовой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58]=&quot;&quot;;0;CEILING(([.X258]/[.$H258]);1;1)*[.$H25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26</text:p>
          </table:table-cell>
          <table:table-cell office:value-type="string" table:style-name="ce9">
            <text:p>P005038</text:p>
          </table:table-cell>
          <table:table-cell office:value-type="float" office:value="4301012176" table:style-name="ce10">
            <text:p>4301012176</text:p>
          </table:table-cell>
          <table:table-cell office:value-type="float" office:value="4680115886773" table:number-columns-spanned="2" table:number-rows-spanned="1" table:style-name="ce27">
            <text:p>4680115886773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10" table:style-name="ce12">
            <text:p>10</text:p>
          </table:table-cell>
          <table:table-cell office:value-type="float" office:value="9" table:style-name="ce11">
            <text:p>9,000</text:p>
          </table:table-cell>
          <table:table-cell office:value-type="float" office:value="9.41" table:style-name="ce11">
            <text:p>9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31" table:style-name="ce12">
            <text:p>31</text:p>
          </table:table-cell>
          <table:table-cell office:value-type="string" table:number-columns-spanned="5" table:number-rows-spanned="1" table:style-name="ce44">
            <text:p>Вареные колбасы «Стародворская» Весовой б/о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59]=&quot;&quot;;0;CEILING(([.X259]/[.$H259]);1;1)*[.$H25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256]/[.H256];&quot;0&quot;)+IFERROR([.Y257]/[.H257];&quot;0&quot;)+IFERROR([.Y258]/[.H258];&quot;0&quot;)+IFERROR([.Y259]/[.H259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256:.Y259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чинка по-бавар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814</text:p>
          </table:table-cell>
          <table:table-cell office:value-type="string" table:style-name="ce9">
            <text:p>P004838</text:p>
          </table:table-cell>
          <table:table-cell office:value-type="float" office:value="4301051893" table:style-name="ce10">
            <text:p>4301051893</text:p>
          </table:table-cell>
          <table:table-cell office:value-type="float" office:value="4680115886186" table:number-columns-spanned="2" table:number-rows-spanned="1" table:style-name="ce27">
            <text:p>4680115886186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1.98" table:style-name="ce11">
            <text:p>1,9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Сочинки по-баварски» Фикс.вес 0,3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.8" table:style-name="ce16">
            <text:p>4,80<text:s/></text:p>
          </table:table-cell>
          <table:table-cell office:value-type="float" office:value="5.4" table:formula="of:=IFERROR(IF([.X264]=&quot;&quot;;0;CEILING(([.X264]/[.$H264]);1;1)*[.$H264]);&quot;&quot;)" table:style-name="ce16">
            <text:p>5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01</text:p>
          </table:table-cell>
          <table:table-cell office:value-type="string" table:style-name="ce9">
            <text:p>P003475</text:p>
          </table:table-cell>
          <table:table-cell office:value-type="float" office:value="4301051795" table:style-name="ce10">
            <text:p>4301051795</text:p>
          </table:table-cell>
          <table:table-cell office:value-type="float" office:value="4680115881228" table:number-columns-spanned="2" table:number-rows-spanned="1" table:style-name="ce27">
            <text:p>468011588122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520000000000001" table:style-name="ce11">
            <text:p>2,6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Сочинки по-баварски с сыром» Фикс.вес 0,4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.8" table:style-name="ce16">
            <text:p>4,80<text:s/></text:p>
          </table:table-cell>
          <table:table-cell office:value-type="float" office:value="4.8" table:formula="of:=IFERROR(IF([.X265]=&quot;&quot;;0;CEILING(([.X265]/[.$H265]);1;1)*[.$H265]);&quot;&quot;)" table:style-name="ce16">
            <text:p>4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99</text:p>
          </table:table-cell>
          <table:table-cell office:value-type="string" table:style-name="ce9">
            <text:p>P003217</text:p>
          </table:table-cell>
          <table:table-cell office:value-type="float" office:value="4301051388" table:style-name="ce10">
            <text:p>4301051388</text:p>
          </table:table-cell>
          <table:table-cell office:value-type="float" office:value="4680115881211" table:number-columns-spanned="2" table:number-rows-spanned="1" table:style-name="ce27">
            <text:p>4680115881211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Сочинки по-баварски Бавария Фикс.вес 0,4 П/а мгс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66]=&quot;&quot;;0;CEILING(([.X266]/[.$H266]);1;1)*[.$H26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5" table:formula="of:=IFERROR([.Y264]/[.H264];&quot;0&quot;)+IFERROR([.Y265]/[.H265];&quot;0&quot;)+IFERROR([.Y266]/[.H266];&quot;0&quot;)" table:style-name="ce18">
            <text:p>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0.199999999999999" table:formula="of:=IFERROR(SUM([.Y264:.Y266]);&quot;0&quot;)" table:style-name="ce18">
            <text:p>10,2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тародворская EDLP/EDPP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698</text:p>
          </table:table-cell>
          <table:table-cell office:value-type="string" table:style-name="ce9">
            <text:p>P004231</text:p>
          </table:table-cell>
          <table:table-cell office:value-type="float" office:value="4301031307" table:style-name="ce10">
            <text:p>4301031307</text:p>
          </table:table-cell>
          <table:table-cell office:value-type="float" office:value="4680115880344" table:number-columns-spanned="2" table:number-rows-spanned="1" table:style-name="ce27">
            <text:p>4680115880344</text:p>
          </table:table-cell>
          <table:covered-table-cell/>
          <table:table-cell office:value-type="float" office:value="0.28000000000000003" table:style-name="ce11">
            <text:p>0,280</text:p>
          </table:table-cell>
          <table:table-cell office:value-type="float" office:value="6" table:style-name="ce12">
            <text:p>6</text:p>
          </table:table-cell>
          <table:table-cell office:value-type="float" office:value="1.68" table:style-name="ce11">
            <text:p>1,680</text:p>
          </table:table-cell>
          <table:table-cell office:value-type="float" office:value="1.78" table:style-name="ce11">
            <text:p>1,78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Копченые колбасы Сервелат Стародворский срез Бордо ф/в 0,28 кг фиброуз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71]=&quot;&quot;;0;CEILING(([.X271]/[.$H271]);1;1)*[.$H27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42</text:p>
          </table:table-cell>
          <table:table-cell office:value-type="string" table:style-name="ce9">
            <text:p>P005056</text:p>
          </table:table-cell>
          <table:table-cell office:value-type="float" office:value="4301031429" table:style-name="ce10">
            <text:p>4301031429</text:p>
          </table:table-cell>
          <table:table-cell office:value-type="float" office:value="4680115886919" table:number-columns-spanned="2" table:number-rows-spanned="1" table:style-name="ce27">
            <text:p>4680115886919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Копченые колбасы «Чесночная» Фикс.вес 0,4 фиброуз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72]=&quot;&quot;;0;CEILING(([.X272]/[.$H272]);1;1)*[.$H27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271]/[.H271];&quot;0&quot;)+IFERROR([.Y272]/[.H272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271:.Y272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340</text:p>
          </table:table-cell>
          <table:table-cell office:value-type="string" table:style-name="ce9">
            <text:p>P004090</text:p>
          </table:table-cell>
          <table:table-cell office:value-type="float" office:value="4301051782" table:style-name="ce10">
            <text:p>4301051782</text:p>
          </table:table-cell>
          <table:table-cell office:value-type="float" office:value="4680115884618" table:number-columns-spanned="2" table:number-rows-spanned="1" table:style-name="ce27">
            <text:p>4680115884618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6" table:style-name="ce12">
            <text:p>6</text:p>
          </table:table-cell>
          <table:table-cell office:value-type="float" office:value="3.6" table:style-name="ce11">
            <text:p>3,600</text:p>
          </table:table-cell>
          <table:table-cell office:value-type="float" office:value="3.79" table:style-name="ce11">
            <text:p>3,7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Венские» ф/в 0,6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76]=&quot;&quot;;0;CEILING(([.X276]/[.$H276]);1;1)*[.$H27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962</text:p>
          </table:table-cell>
          <table:table-cell office:value-type="string" table:style-name="ce9">
            <text:p>P005092</text:p>
          </table:table-cell>
          <table:table-cell office:value-type="float" office:value="4301052057" table:style-name="ce10">
            <text:p>4301052057</text:p>
          </table:table-cell>
          <table:table-cell office:value-type="float" office:value="4680115887114" table:number-columns-spanned="2" table:number-rows-spanned="1" table:style-name="ce27">
            <text:p>4680115887114</text:p>
          </table:table-cell>
          <table:covered-table-cell/>
          <table:table-cell office:value-type="float" office:value="0.55000000000000004" table:style-name="ce11">
            <text:p>0,550</text:p>
          </table:table-cell>
          <table:table-cell office:value-type="float" office:value="6" table:style-name="ce12">
            <text:p>6</text:p>
          </table:table-cell>
          <table:table-cell office:value-type="float" office:value="3.3" table:style-name="ce11">
            <text:p>3,300</text:p>
          </table:table-cell>
          <table:table-cell office:value-type="float" office:value="3.49" table:style-name="ce11">
            <text:p>3,4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«Сливочные» Фикс.вес 0,55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77]=&quot;&quot;;0;CEILING(([.X277]/[.$H277]);1;1)*[.$H27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276]/[.H276];&quot;0&quot;)+IFERROR([.Y277]/[.H277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276:.Y277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Бордо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777</text:p>
          </table:table-cell>
          <table:table-cell office:value-type="string" table:style-name="ce9">
            <text:p>P004919</text:p>
          </table:table-cell>
          <table:table-cell office:value-type="float" office:value="4301012126" table:style-name="ce10">
            <text:p>4301012126</text:p>
          </table:table-cell>
          <table:table-cell office:value-type="float" office:value="4607091386004" table:number-columns-spanned="2" table:number-rows-spanned="1" table:style-name="ce27">
            <text:p>4607091386004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ареные колбасы «Докторская Стародворская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82]=&quot;&quot;;0;CEILING(([.X282]/[.$H282]);1;1)*[.$H28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4</text:p>
          </table:table-cell>
          <table:table-cell office:value-type="string" table:style-name="ce9">
            <text:p>P004213</text:p>
          </table:table-cell>
          <table:table-cell office:value-type="float" office:value="4301012024" table:style-name="ce10">
            <text:p>4301012024</text:p>
          </table:table-cell>
          <table:table-cell office:value-type="float" office:value="4680115885615" table:number-columns-spanned="2" table:number-rows-spanned="1" table:style-name="ce27">
            <text:p>4680115885615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Молочная Традиционная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00" table:style-name="ce16">
            <text:p>100,00<text:s/></text:p>
          </table:table-cell>
          <table:table-cell office:value-type="float" office:value="108" table:formula="of:=IFERROR(IF([.X283]=&quot;&quot;;0;CEILING(([.X283]/[.$H283]);1;1)*[.$H283]);&quot;&quot;)" table:style-name="ce16">
            <text:p>108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6</text:p>
          </table:table-cell>
          <table:table-cell office:value-type="string" table:style-name="ce9">
            <text:p>P004215</text:p>
          </table:table-cell>
          <table:table-cell office:value-type="float" office:value="4301011858" table:style-name="ce10">
            <text:p>4301011858</text:p>
          </table:table-cell>
          <table:table-cell office:value-type="float" office:value="4680115885646" table:number-columns-spanned="2" table:number-rows-spanned="1" table:style-name="ce27">
            <text:p>4680115885646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Стародворская Традиционная со шпиком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0" table:style-name="ce16">
            <text:p>30,00<text:s/></text:p>
          </table:table-cell>
          <table:table-cell office:value-type="float" office:value="32.400000000000006" table:formula="of:=IFERROR(IF([.X284]=&quot;&quot;;0;CEILING(([.X284]/[.$H284]);1;1)*[.$H284]);&quot;&quot;)" table:style-name="ce16">
            <text:p>32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2</text:p>
          </table:table-cell>
          <table:table-cell office:value-type="string" table:style-name="ce9">
            <text:p>P004210</text:p>
          </table:table-cell>
          <table:table-cell office:value-type="float" office:value="4301012016" table:style-name="ce10">
            <text:p>4301012016</text:p>
          </table:table-cell>
          <table:table-cell office:value-type="float" office:value="4680115885554" table:number-columns-spanned="2" table:number-rows-spanned="1" table:style-name="ce27">
            <text:p>4680115885554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Стародворская Традиционная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50" table:style-name="ce16">
            <text:p>650,00<text:s/></text:p>
          </table:table-cell>
          <table:table-cell office:value-type="float" office:value="658.80000000000007" table:formula="of:=IFERROR(IF([.X285]=&quot;&quot;;0;CEILING(([.X285]/[.$H285]);1;1)*[.$H285]);&quot;&quot;)" table:style-name="ce16">
            <text:p>658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5</text:p>
          </table:table-cell>
          <table:table-cell office:value-type="string" table:style-name="ce9">
            <text:p>P004214</text:p>
          </table:table-cell>
          <table:table-cell office:value-type="float" office:value="4301011857" table:style-name="ce10">
            <text:p>4301011857</text:p>
          </table:table-cell>
          <table:table-cell office:value-type="float" office:value="4680115885622" table:number-columns-spanned="2" table:number-rows-spanned="1" table:style-name="ce27">
            <text:p>4680115885622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Молочная Традиционная» ф/в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0" table:style-name="ce16">
            <text:p>40,00<text:s/></text:p>
          </table:table-cell>
          <table:table-cell office:value-type="float" office:value="40" table:formula="of:=IFERROR(IF([.X286]=&quot;&quot;;0;CEILING(([.X286]/[.$H286]);1;1)*[.$H286]);&quot;&quot;)" table:style-name="ce16">
            <text:p>4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93</text:p>
          </table:table-cell>
          <table:table-cell office:value-type="string" table:style-name="ce9">
            <text:p>P004211</text:p>
          </table:table-cell>
          <table:table-cell office:value-type="float" office:value="4301011859" table:style-name="ce10">
            <text:p>4301011859</text:p>
          </table:table-cell>
          <table:table-cell office:value-type="float" office:value="4680115885608" table:number-columns-spanned="2" table:number-rows-spanned="1" table:style-name="ce27">
            <text:p>468011588560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Стародворская Традиционная» ф/в 0,4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0" table:style-name="ce16">
            <text:p>60,00<text:s/></text:p>
          </table:table-cell>
          <table:table-cell office:value-type="float" office:value="60" table:formula="of:=IFERROR(IF([.X287]=&quot;&quot;;0;CEILING(([.X287]/[.$H287]);1;1)*[.$H287]);&quot;&quot;)" table:style-name="ce16">
            <text:p>6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99" table:formula="of:=IFERROR([.Y282]/[.H282];&quot;0&quot;)+IFERROR([.Y283]/[.H283];&quot;0&quot;)+IFERROR([.Y284]/[.H284];&quot;0&quot;)+IFERROR([.Y285]/[.H285];&quot;0&quot;)+IFERROR([.Y286]/[.H286];&quot;0&quot;)+IFERROR([.Y287]/[.H287];&quot;0&quot;)" table:style-name="ce18">
            <text:p>99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899.2" table:formula="of:=IFERROR(SUM([.Y282:.Y287]);&quot;0&quot;)" table:style-name="ce18">
            <text:p>899,2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820</text:p>
          </table:table-cell>
          <table:table-cell office:value-type="string" table:style-name="ce9">
            <text:p>P001820</text:p>
          </table:table-cell>
          <table:table-cell office:value-type="float" office:value="4301030878" table:style-name="ce10">
            <text:p>4301030878</text:p>
          </table:table-cell>
          <table:table-cell office:value-type="float" office:value="4607091387193" table:number-columns-spanned="2" table:number-rows-spanned="1" table:style-name="ce27">
            <text:p>4607091387193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5" table:style-name="ce11">
            <text:p>4,4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35" table:style-name="ce12">
            <text:p>35</text:p>
          </table:table-cell>
          <table:table-cell office:value-type="string" table:number-columns-spanned="5" table:number-rows-spanned="1" table:style-name="ce28">
            <text:p>В/к колбасы Зернистый Бордо Весовые Фиброуз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50" table:style-name="ce16">
            <text:p>250,00<text:s/></text:p>
          </table:table-cell>
          <table:table-cell office:value-type="float" office:value="252" table:formula="of:=IFERROR(IF([.X291]=&quot;&quot;;0;CEILING(([.X291]/[.$H291]);1;1)*[.$H291]);&quot;&quot;)" table:style-name="ce16">
            <text:p>252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822</text:p>
          </table:table-cell>
          <table:table-cell office:value-type="string" table:style-name="ce9">
            <text:p>P003013</text:p>
          </table:table-cell>
          <table:table-cell office:value-type="float" office:value="4301031153" table:style-name="ce10">
            <text:p>4301031153</text:p>
          </table:table-cell>
          <table:table-cell office:value-type="float" office:value="4607091387230" table:number-columns-spanned="2" table:number-rows-spanned="1" table:style-name="ce27">
            <text:p>4607091387230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5" table:style-name="ce11">
            <text:p>4,4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В/к колбасы Кремлевский Бордо Весовые Фиброуз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00" table:style-name="ce16">
            <text:p>300,00<text:s/></text:p>
          </table:table-cell>
          <table:table-cell office:value-type="float" office:value="302.40000000000003" table:formula="of:=IFERROR(IF([.X292]=&quot;&quot;;0;CEILING(([.X292]/[.$H292]);1;1)*[.$H292]);&quot;&quot;)" table:style-name="ce16">
            <text:p>302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801</text:p>
          </table:table-cell>
          <table:table-cell office:value-type="string" table:style-name="ce9">
            <text:p>P003014</text:p>
          </table:table-cell>
          <table:table-cell office:value-type="float" office:value="4301031154" table:style-name="ce10">
            <text:p>4301031154</text:p>
          </table:table-cell>
          <table:table-cell office:value-type="float" office:value="4607091387292" table:number-columns-spanned="2" table:number-rows-spanned="1" table:style-name="ce27">
            <text:p>4607091387292</text:p>
          </table:table-cell>
          <table:covered-table-cell/>
          <table:table-cell office:value-type="float" office:value="0.73" table:style-name="ce11">
            <text:p>0,730</text:p>
          </table:table-cell>
          <table:table-cell office:value-type="float" office:value="6" table:style-name="ce12">
            <text:p>6</text:p>
          </table:table-cell>
          <table:table-cell office:value-type="float" office:value="4.38" table:style-name="ce11">
            <text:p>4,380</text:p>
          </table:table-cell>
          <table:table-cell office:value-type="float" office:value="4.63" table:style-name="ce11">
            <text:p>4,63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В/к колбасы Сервелатная По-стародворски Фирменная Весовые Фиброуз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293]=&quot;&quot;;0;CEILING(([.X293]/[.$H293]);1;1)*[.$H29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579</text:p>
          </table:table-cell>
          <table:table-cell office:value-type="string" table:style-name="ce9">
            <text:p>P003012</text:p>
          </table:table-cell>
          <table:table-cell office:value-type="float" office:value="4301031152" table:style-name="ce10">
            <text:p>4301031152</text:p>
          </table:table-cell>
          <table:table-cell office:value-type="float" office:value="4607091387285" table:number-columns-spanned="2" table:number-rows-spanned="1" table:style-name="ce27">
            <text:p>4607091387285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В/к колбасы Кремлевский срез Бордо Фикс.вес 0,35 Фиброуз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3" table:style-name="ce16">
            <text:p>63,00<text:s/></text:p>
          </table:table-cell>
          <table:table-cell office:value-type="float" office:value="63" table:formula="of:=IFERROR(IF([.X294]=&quot;&quot;;0;CEILING(([.X294]/[.$H294]);1;1)*[.$H294]);&quot;&quot;)" table:style-name="ce16">
            <text:p>63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17</text:p>
          </table:table-cell>
          <table:table-cell office:value-type="string" table:style-name="ce9">
            <text:p>P004229</text:p>
          </table:table-cell>
          <table:table-cell office:value-type="float" office:value="4301031305" table:style-name="ce10">
            <text:p>4301031305</text:p>
          </table:table-cell>
          <table:table-cell office:value-type="float" office:value="4607091389845" table:number-columns-spanned="2" table:number-rows-spanned="1" table:style-name="ce27">
            <text:p>4607091389845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000000000000002" table:style-name="ce11">
            <text:p>2,20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office:value-type="string" table:style-name="ce12">
            <text:p>Короб, мин. 1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В/к колбасы Сервелат Филедворский срез Бордо Фикс.вес 0,35 фиброуз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3" table:style-name="ce16">
            <text:p>63,00<text:s/></text:p>
          </table:table-cell>
          <table:table-cell office:value-type="float" office:value="63" table:formula="of:=IFERROR(IF([.X295]=&quot;&quot;;0;CEILING(([.X295]/[.$H295]);1;1)*[.$H295]);&quot;&quot;)" table:style-name="ce16">
            <text:p>63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252</text:p>
          </table:table-cell>
          <table:table-cell office:value-type="string" table:style-name="ce9">
            <text:p>P002461</text:p>
          </table:table-cell>
          <table:table-cell office:value-type="float" office:value="4301031066" table:style-name="ce10">
            <text:p>4301031066</text:p>
          </table:table-cell>
          <table:table-cell office:value-type="float" office:value="4607091383836" table:number-columns-spanned="2" table:number-rows-spanned="1" table:style-name="ce27">
            <text:p>4607091383836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2.028" table:style-name="ce11">
            <text:p>2,02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П/к колбасы Кракушка пряная с сальцем Бавария Фикс.вес 0,3 н/о в/у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72" table:style-name="ce16">
            <text:p>72,00<text:s/></text:p>
          </table:table-cell>
          <table:table-cell office:value-type="float" office:value="72" table:formula="of:=IFERROR(IF([.X296]=&quot;&quot;;0;CEILING(([.X296]/[.$H296]);1;1)*[.$H296]);&quot;&quot;)" table:style-name="ce16">
            <text:p>72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32" table:formula="of:=IFERROR([.Y291]/[.H291];&quot;0&quot;)+IFERROR([.Y292]/[.H292];&quot;0&quot;)+IFERROR([.Y293]/[.H293];&quot;0&quot;)+IFERROR([.Y294]/[.H294];&quot;0&quot;)+IFERROR([.Y295]/[.H295];&quot;0&quot;)+IFERROR([.Y296]/[.H296];&quot;0&quot;)" table:style-name="ce18">
            <text:p>232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752.40000000000009" table:formula="of:=IFERROR(SUM([.Y291:.Y296]);&quot;0&quot;)" table:style-name="ce18">
            <text:p>752,4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340</text:p>
          </table:table-cell>
          <table:table-cell office:value-type="string" table:style-name="ce9">
            <text:p>P002209</text:p>
          </table:table-cell>
          <table:table-cell office:value-type="float" office:value="4301051100" table:style-name="ce10">
            <text:p>4301051100</text:p>
          </table:table-cell>
          <table:table-cell office:value-type="float" office:value="4607091387766" table:number-columns-spanned="2" table:number-rows-spanned="1" table:style-name="ce27">
            <text:p>4607091387766</text:p>
          </table:table-cell>
          <table:covered-table-cell/>
          <table:table-cell office:value-type="float" office:value="1.3" table:style-name="ce11">
            <text:p>1,300</text:p>
          </table:table-cell>
          <table:table-cell office:value-type="float" office:value="6" table:style-name="ce12">
            <text:p>6</text:p>
          </table:table-cell>
          <table:table-cell office:value-type="float" office:value="7.8" table:style-name="ce11">
            <text:p>7,800</text:p>
          </table:table-cell>
          <table:table-cell office:value-type="float" office:value="8.2880000000000003" table:style-name="ce11">
            <text:p>8,288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осиски Ганноверские Бордо Весовые П/а мгс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00" table:style-name="ce16">
            <text:p>800,00<text:s/></text:p>
          </table:table-cell>
          <table:table-cell office:value-type="float" office:value="803.4" table:formula="of:=IFERROR(IF([.X300]=&quot;&quot;;0;CEILING(([.X300]/[.$H300]);1;1)*[.$H300]);&quot;&quot;)" table:style-name="ce16">
            <text:p>803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727</text:p>
          </table:table-cell>
          <table:table-cell office:value-type="string" table:style-name="ce9">
            <text:p>P002205</text:p>
          </table:table-cell>
          <table:table-cell office:value-type="float" office:value="4301051818" table:style-name="ce10">
            <text:p>4301051818</text:p>
          </table:table-cell>
          <table:table-cell office:value-type="float" office:value="4607091387957" table:number-columns-spanned="2" table:number-rows-spanned="1" table:style-name="ce27">
            <text:p>4607091387957</text:p>
          </table:table-cell>
          <table:covered-table-cell/>
          <table:table-cell office:value-type="float" office:value="1.3" table:style-name="ce11">
            <text:p>1,300</text:p>
          </table:table-cell>
          <table:table-cell office:value-type="float" office:value="6" table:style-name="ce12">
            <text:p>6</text:p>
          </table:table-cell>
          <table:table-cell office:value-type="float" office:value="7.8" table:style-name="ce11">
            <text:p>7,800</text:p>
          </table:table-cell>
          <table:table-cell office:value-type="float" office:value="8.2940000000000005" table:style-name="ce11">
            <text:p>8,2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Молочные по-стародворски Бордо Весовые П/а мгс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01]=&quot;&quot;;0;CEILING(([.X301]/[.$H301]);1;1)*[.$H30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728</text:p>
          </table:table-cell>
          <table:table-cell office:value-type="string" table:style-name="ce9">
            <text:p>P002207</text:p>
          </table:table-cell>
          <table:table-cell office:value-type="float" office:value="4301051819" table:style-name="ce10">
            <text:p>4301051819</text:p>
          </table:table-cell>
          <table:table-cell office:value-type="float" office:value="4607091387964" table:number-columns-spanned="2" table:number-rows-spanned="1" table:style-name="ce27">
            <text:p>4607091387964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6" table:style-name="ce12">
            <text:p>6</text:p>
          </table:table-cell>
          <table:table-cell office:value-type="float" office:value="8.1" table:style-name="ce11">
            <text:p>8,100</text:p>
          </table:table-cell>
          <table:table-cell office:value-type="float" office:value="8.5760000000000005" table:style-name="ce11">
            <text:p>8,576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Сливочные по-стародворски Бордо Весовые П/а мгс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02]=&quot;&quot;;0;CEILING(([.X302]/[.$H302]);1;1)*[.$H30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333</text:p>
          </table:table-cell>
          <table:table-cell office:value-type="string" table:style-name="ce9">
            <text:p>P004082</text:p>
          </table:table-cell>
          <table:table-cell office:value-type="float" office:value="4301051734" table:style-name="ce10">
            <text:p>4301051734</text:p>
          </table:table-cell>
          <table:table-cell office:value-type="float" office:value="4680115884588" table:number-columns-spanned="2" table:number-rows-spanned="1" table:style-name="ce27">
            <text:p>4680115884588</text:p>
          </table:table-cell>
          <table:covered-table-cell/>
          <table:table-cell office:value-type="float" office:value="0.5" table:style-name="ce11">
            <text:p>0,500</text:p>
          </table:table-cell>
          <table:table-cell office:value-type="float" office:value="6" table:style-name="ce12">
            <text:p>6</text:p>
          </table:table-cell>
          <table:table-cell office:value-type="float" office:value="3" table:style-name="ce11">
            <text:p>3,000</text:p>
          </table:table-cell>
          <table:table-cell office:value-type="float" office:value="3.246" table:style-name="ce11">
            <text:p>3,246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Ганноверские» Фикс.вес 0,5 П/а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50" table:style-name="ce16">
            <text:p>150,00<text:s/></text:p>
          </table:table-cell>
          <table:table-cell office:value-type="float" office:value="150" table:formula="of:=IFERROR(IF([.X303]=&quot;&quot;;0;CEILING(([.X303]/[.$H303]);1;1)*[.$H303]);&quot;&quot;)" table:style-name="ce16">
            <text:p>15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53" table:formula="of:=IFERROR([.Y300]/[.H300];&quot;0&quot;)+IFERROR([.Y301]/[.H301];&quot;0&quot;)+IFERROR([.Y302]/[.H302];&quot;0&quot;)+IFERROR([.Y303]/[.H303];&quot;0&quot;)" table:style-name="ce18">
            <text:p>153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953.4" table:formula="of:=IFERROR(SUM([.Y300:.Y303]);&quot;0&quot;)" table:style-name="ce18">
            <text:p>953,4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ардель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051</text:p>
          </table:table-cell>
          <table:table-cell office:value-type="string" table:style-name="ce9">
            <text:p>P003997</text:p>
          </table:table-cell>
          <table:table-cell office:value-type="float" office:value="4301060387" table:style-name="ce10">
            <text:p>4301060387</text:p>
          </table:table-cell>
          <table:table-cell office:value-type="float" office:value="4607091380880" table:number-columns-spanned="2" table:number-rows-spanned="1" table:style-name="ce27">
            <text:p>4607091380880</text:p>
          </table:table-cell>
          <table:covered-table-cell/>
          <table:table-cell office:value-type="float" office:value="1.4" table:style-name="ce11">
            <text:p>1,400</text:p>
          </table:table-cell>
          <table:table-cell office:value-type="float" office:value="6" table:style-name="ce12">
            <text:p>6</text:p>
          </table:table-cell>
          <table:table-cell office:value-type="float" office:value="8.4" table:style-name="ce11">
            <text:p>8,400</text:p>
          </table:table-cell>
          <table:table-cell office:value-type="float" office:value="8.8940000000000001" table:style-name="ce11">
            <text:p>8,8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28">
            <text:p>Сардельки «Нежные» Весовые NDX мгс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00" table:style-name="ce16">
            <text:p>100,00<text:s/></text:p>
          </table:table-cell>
          <table:table-cell office:value-type="float" office:value="100.80000000000001" table:formula="of:=IFERROR(IF([.X307]=&quot;&quot;;0;CEILING(([.X307]/[.$H307]);1;1)*[.$H307]);&quot;&quot;)" table:style-name="ce16">
            <text:p>100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227</text:p>
          </table:table-cell>
          <table:table-cell office:value-type="string" table:style-name="ce9">
            <text:p>P002536</text:p>
          </table:table-cell>
          <table:table-cell office:value-type="float" office:value="4301060406" table:style-name="ce10">
            <text:p>4301060406</text:p>
          </table:table-cell>
          <table:table-cell office:value-type="float" office:value="4607091384482" table:number-columns-spanned="2" table:number-rows-spanned="1" table:style-name="ce27">
            <text:p>4607091384482</text:p>
          </table:table-cell>
          <table:covered-table-cell/>
          <table:table-cell office:value-type="float" office:value="1.3" table:style-name="ce11">
            <text:p>1,300</text:p>
          </table:table-cell>
          <table:table-cell office:value-type="float" office:value="6" table:style-name="ce12">
            <text:p>6</text:p>
          </table:table-cell>
          <table:table-cell office:value-type="float" office:value="7.8" table:style-name="ce11">
            <text:p>7,800</text:p>
          </table:table-cell>
          <table:table-cell office:value-type="float" office:value="8.2940000000000005" table:style-name="ce11">
            <text:p>8,2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4">
            <text:p>Сардельки «Стародворские с говядиной» Весовые NDX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20" table:style-name="ce16">
            <text:p>120,00<text:s/></text:p>
          </table:table-cell>
          <table:table-cell office:value-type="float" office:value="124.8" table:formula="of:=IFERROR(IF([.X308]=&quot;&quot;;0;CEILING(([.X308]/[.$H308]);1;1)*[.$H308]);&quot;&quot;)" table:style-name="ce16">
            <text:p>124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430</text:p>
          </table:table-cell>
          <table:table-cell office:value-type="string" table:style-name="ce9">
            <text:p>P004913</text:p>
          </table:table-cell>
          <table:table-cell office:value-type="float" office:value="4301060484" table:style-name="ce10">
            <text:p>4301060484</text:p>
          </table:table-cell>
          <table:table-cell office:value-type="float" office:value="4607091380897" table:number-columns-spanned="2" table:number-rows-spanned="1" table:style-name="ce27">
            <text:p>4607091380897</text:p>
          </table:table-cell>
          <table:covered-table-cell/>
          <table:table-cell office:value-type="float" office:value="1.4" table:style-name="ce11">
            <text:p>1,400</text:p>
          </table:table-cell>
          <table:table-cell office:value-type="float" office:value="6" table:style-name="ce12">
            <text:p>6</text:p>
          </table:table-cell>
          <table:table-cell office:value-type="float" office:value="8.4" table:style-name="ce11">
            <text:p>8,400</text:p>
          </table:table-cell>
          <table:table-cell office:value-type="float" office:value="8.8940000000000001" table:style-name="ce11">
            <text:p>8,8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30" table:style-name="ce12">
            <text:p>30</text:p>
          </table:table-cell>
          <table:table-cell office:value-type="string" table:number-columns-spanned="5" table:number-rows-spanned="1" table:style-name="ce44">
            <text:p>Сардельки «Шпикачки Стародворские» Весовой NDX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40" table:style-name="ce16">
            <text:p>140,00<text:s/></text:p>
          </table:table-cell>
          <table:table-cell office:value-type="float" office:value="142.80000000000001" table:formula="of:=IFERROR(IF([.X309]=&quot;&quot;;0;CEILING(([.X309]/[.$H309]);1;1)*[.$H309]);&quot;&quot;)" table:style-name="ce16">
            <text:p>142,8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45" table:formula="of:=IFERROR([.Y307]/[.H307];&quot;0&quot;)+IFERROR([.Y308]/[.H308];&quot;0&quot;)+IFERROR([.Y309]/[.H309];&quot;0&quot;)" table:style-name="ce18">
            <text:p>4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368.40000000000003" table:formula="of:=IFERROR(SUM([.Y307:.Y309]);&quot;0&quot;)" table:style-name="ce18">
            <text:p>368,4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ыро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921</text:p>
          </table:table-cell>
          <table:table-cell office:value-type="string" table:style-name="ce9">
            <text:p>P001916</text:p>
          </table:table-cell>
          <table:table-cell office:value-type="float" office:value="4301030235" table:style-name="ce10">
            <text:p>4301030235</text:p>
          </table:table-cell>
          <table:table-cell office:value-type="float" office:value="4607091388381" table:number-columns-spanned="2" table:number-rows-spanned="1" table:style-name="ce27">
            <text:p>4607091388381</text:p>
          </table:table-cell>
          <table:covered-table-cell/>
          <table:table-cell office:value-type="float" office:value="0.38" table:style-name="ce11">
            <text:p>0,380</text:p>
          </table:table-cell>
          <table:table-cell office:value-type="float" office:value="8" table:style-name="ce12">
            <text:p>8</text:p>
          </table:table-cell>
          <table:table-cell office:value-type="float" office:value="3.04" table:style-name="ce11">
            <text:p>3,040</text:p>
          </table:table-cell>
          <table:table-cell office:value-type="float" office:value="3.31" table:style-name="ce11">
            <text:p>3,31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АК</text:p>
          </table:table-cell>
          <table:table-cell table:style-name="ce13"/>
          <table:table-cell office:value-type="float" office:value="180" table:style-name="ce12">
            <text:p>180</text:p>
          </table:table-cell>
          <table:table-cell office:value-type="string" table:number-columns-spanned="5" table:number-rows-spanned="1" table:style-name="ce28">
            <text:p>С/к колбасы Салями Охотничья Бордо Весовые б/о терм/п 180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" table:style-name="ce16">
            <text:p>6,00<text:s/></text:p>
          </table:table-cell>
          <table:table-cell office:value-type="float" office:value="6.08" table:formula="of:=IFERROR(IF([.X313]=&quot;&quot;;0;CEILING(([.X313]/[.$H313]);1;1)*[.$H313]);&quot;&quot;)" table:style-name="ce16">
            <text:p>6,08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920</text:p>
          </table:table-cell>
          <table:table-cell office:value-type="string" table:style-name="ce9">
            <text:p>P001900</text:p>
          </table:table-cell>
          <table:table-cell office:value-type="float" office:value="4301030232" table:style-name="ce10">
            <text:p>4301030232</text:p>
          </table:table-cell>
          <table:table-cell office:value-type="float" office:value="4607091388374" table:number-columns-spanned="2" table:number-rows-spanned="1" table:style-name="ce27">
            <text:p>4607091388374</text:p>
          </table:table-cell>
          <table:covered-table-cell/>
          <table:table-cell office:value-type="float" office:value="0.38" table:style-name="ce11">
            <text:p>0,380</text:p>
          </table:table-cell>
          <table:table-cell office:value-type="float" office:value="8" table:style-name="ce12">
            <text:p>8</text:p>
          </table:table-cell>
          <table:table-cell office:value-type="float" office:value="3.04" table:style-name="ce11">
            <text:p>3,040</text:p>
          </table:table-cell>
          <table:table-cell office:value-type="float" office:value="3.27" table:style-name="ce11">
            <text:p>3,27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АК</text:p>
          </table:table-cell>
          <table:table-cell table:style-name="ce13"/>
          <table:table-cell office:value-type="float" office:value="180" table:style-name="ce12">
            <text:p>180</text:p>
          </table:table-cell>
          <table:table-cell office:value-type="string" table:number-columns-spanned="5" table:number-rows-spanned="1" table:style-name="ce44">
            <text:p>С/к колбасы Княжеская Бордо Весовые б/о терм/п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6" table:style-name="ce16">
            <text:p>6,00<text:s/></text:p>
          </table:table-cell>
          <table:table-cell office:value-type="float" office:value="6.08" table:formula="of:=IFERROR(IF([.X314]=&quot;&quot;;0;CEILING(([.X314]/[.$H314]);1;1)*[.$H314]);&quot;&quot;)" table:style-name="ce16">
            <text:p>6,08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092</text:p>
          </table:table-cell>
          <table:table-cell office:value-type="string" table:style-name="ce9">
            <text:p>P002290</text:p>
          </table:table-cell>
          <table:table-cell office:value-type="float" office:value="4301032015" table:style-name="ce10">
            <text:p>4301032015</text:p>
          </table:table-cell>
          <table:table-cell office:value-type="float" office:value="4607091383102" table:number-columns-spanned="2" table:number-rows-spanned="1" table:style-name="ce27">
            <text:p>4607091383102</text:p>
          </table:table-cell>
          <table:covered-table-cell/>
          <table:table-cell office:value-type="float" office:value="0.17" table:style-name="ce11">
            <text:p>0,170</text:p>
          </table:table-cell>
          <table:table-cell office:value-type="float" office:value="15" table:style-name="ce12">
            <text:p>15</text:p>
          </table:table-cell>
          <table:table-cell office:value-type="float" office:value="2.5499999999999998" table:style-name="ce11">
            <text:p>2,550</text:p>
          </table:table-cell>
          <table:table-cell office:value-type="float" office:value="2.9550000000000001" table:style-name="ce11">
            <text:p>2,955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АК</text:p>
          </table:table-cell>
          <table:table-cell table:style-name="ce13"/>
          <table:table-cell office:value-type="float" office:value="180" table:style-name="ce12">
            <text:p>180</text:p>
          </table:table-cell>
          <table:table-cell office:value-type="string" table:number-columns-spanned="5" table:number-rows-spanned="1" table:style-name="ce44">
            <text:p>С/к колбасы Баварская Бавария Фикс.вес 0,17 б/о терм/п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.5499999999999998" table:style-name="ce16">
            <text:p>2,55<text:s/></text:p>
          </table:table-cell>
          <table:table-cell office:value-type="float" office:value="2.5499999999999998" table:formula="of:=IFERROR(IF([.X315]=&quot;&quot;;0;CEILING(([.X315]/[.$H315]);1;1)*[.$H315]);&quot;&quot;)" table:style-name="ce16">
            <text:p>2,55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1869</text:p>
          </table:table-cell>
          <table:table-cell office:value-type="string" table:style-name="ce9">
            <text:p>P001909</text:p>
          </table:table-cell>
          <table:table-cell office:value-type="float" office:value="4301030233" table:style-name="ce10">
            <text:p>4301030233</text:p>
          </table:table-cell>
          <table:table-cell office:value-type="float" office:value="4607091388404" table:number-columns-spanned="2" table:number-rows-spanned="1" table:style-name="ce27">
            <text:p>4607091388404</text:p>
          </table:table-cell>
          <table:covered-table-cell/>
          <table:table-cell office:value-type="float" office:value="0.17" table:style-name="ce11">
            <text:p>0,170</text:p>
          </table:table-cell>
          <table:table-cell office:value-type="float" office:value="15" table:style-name="ce12">
            <text:p>15</text:p>
          </table:table-cell>
          <table:table-cell office:value-type="float" office:value="2.5499999999999998" table:style-name="ce11">
            <text:p>2,550</text:p>
          </table:table-cell>
          <table:table-cell office:value-type="float" office:value="2.88" table:style-name="ce11">
            <text:p>2,8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АК</text:p>
          </table:table-cell>
          <table:table-cell table:style-name="ce13"/>
          <table:table-cell office:value-type="float" office:value="180" table:style-name="ce12">
            <text:p>180</text:p>
          </table:table-cell>
          <table:table-cell office:value-type="string" table:number-columns-spanned="5" table:number-rows-spanned="1" table:style-name="ce44">
            <text:p>С/к колбасы Швейцарская Бордо Фикс.вес 0,17 Фиброуз терм/п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5.5" table:style-name="ce16">
            <text:p>25,50<text:s/></text:p>
          </table:table-cell>
          <table:table-cell office:value-type="float" office:value="25.5" table:formula="of:=IFERROR(IF([.X316]=&quot;&quot;;0;CEILING(([.X316]/[.$H316]);1;1)*[.$H316]);&quot;&quot;)" table:style-name="ce16">
            <text:p>25,5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5" table:formula="of:=IFERROR([.Y313]/[.H313];&quot;0&quot;)+IFERROR([.Y314]/[.H314];&quot;0&quot;)+IFERROR([.Y315]/[.H315];&quot;0&quot;)+IFERROR([.Y316]/[.H316];&quot;0&quot;)" table:style-name="ce18">
            <text:p>1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40.21" table:formula="of:=IFERROR(SUM([.Y313:.Y316]);&quot;0&quot;)" table:style-name="ce18">
            <text:p>40,21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Паштет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41</text:p>
          </table:table-cell>
          <table:table-cell office:value-type="string" table:style-name="ce9">
            <text:p>P003253</text:p>
          </table:table-cell>
          <table:table-cell office:value-type="float" office:value="4301180007" table:style-name="ce10">
            <text:p>4301180007</text:p>
          </table:table-cell>
          <table:table-cell office:value-type="float" office:value="4680115881808" table:number-columns-spanned="2" table:number-rows-spanned="1" table:style-name="ce27">
            <text:p>4680115881808</text:p>
          </table:table-cell>
          <table:covered-table-cell/>
          <table:table-cell office:value-type="float" office:value="0.1" table:style-name="ce11">
            <text:p>0,100</text:p>
          </table:table-cell>
          <table:table-cell office:value-type="float" office:value="20" table:style-name="ce12">
            <text:p>20</text:p>
          </table:table-cell>
          <table:table-cell office:value-type="float" office:value="2" table:style-name="ce11">
            <text:p>2,000</text:p>
          </table:table-cell>
          <table:table-cell office:value-type="float" office:value="2.2400000000000002" table:style-name="ce11">
            <text:p>2,240</text:p>
          </table:table-cell>
          <table:table-cell office:value-type="float" office:value="238" table:style-name="ce12">
            <text:p>238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РК</text:p>
          </table:table-cell>
          <table:table-cell table:style-name="ce13"/>
          <table:table-cell office:value-type="float" office:value="730" table:style-name="ce12">
            <text:p>730</text:p>
          </table:table-cell>
          <table:table-cell office:value-type="string" table:number-columns-spanned="5" table:number-rows-spanned="1" table:style-name="ce28">
            <text:p>Паштеты «Любительский ГОСТ» Фикс.вес 0,1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0" table:style-name="ce16">
            <text:p>20,00<text:s/></text:p>
          </table:table-cell>
          <table:table-cell office:value-type="float" office:value="20" table:formula="of:=IFERROR(IF([.X320]=&quot;&quot;;0;CEILING(([.X320]/[.$H320]);1;1)*[.$H320]);&quot;&quot;)" table:style-name="ce16">
            <text:p>2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40</text:p>
          </table:table-cell>
          <table:table-cell office:value-type="string" table:style-name="ce9">
            <text:p>P003252</text:p>
          </table:table-cell>
          <table:table-cell office:value-type="float" office:value="4301180006" table:style-name="ce10">
            <text:p>4301180006</text:p>
          </table:table-cell>
          <table:table-cell office:value-type="float" office:value="4680115881822" table:number-columns-spanned="2" table:number-rows-spanned="1" table:style-name="ce27">
            <text:p>4680115881822</text:p>
          </table:table-cell>
          <table:covered-table-cell/>
          <table:table-cell office:value-type="float" office:value="0.1" table:style-name="ce11">
            <text:p>0,100</text:p>
          </table:table-cell>
          <table:table-cell office:value-type="float" office:value="20" table:style-name="ce12">
            <text:p>20</text:p>
          </table:table-cell>
          <table:table-cell office:value-type="float" office:value="2" table:style-name="ce11">
            <text:p>2,000</text:p>
          </table:table-cell>
          <table:table-cell office:value-type="float" office:value="2.2400000000000002" table:style-name="ce11">
            <text:p>2,240</text:p>
          </table:table-cell>
          <table:table-cell office:value-type="float" office:value="238" table:style-name="ce12">
            <text:p>238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РК</text:p>
          </table:table-cell>
          <table:table-cell table:style-name="ce13"/>
          <table:table-cell office:value-type="float" office:value="730" table:style-name="ce12">
            <text:p>730</text:p>
          </table:table-cell>
          <table:table-cell office:value-type="string" table:number-columns-spanned="5" table:number-rows-spanned="1" table:style-name="ce44">
            <text:p>Паштеты «Печеночный с морковью ГОСТ» Фикс.вес 0,1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0" table:style-name="ce16">
            <text:p>10,00<text:s/></text:p>
          </table:table-cell>
          <table:table-cell office:value-type="float" office:value="10" table:formula="of:=IFERROR(IF([.X321]=&quot;&quot;;0;CEILING(([.X321]/[.$H321]);1;1)*[.$H321]);&quot;&quot;)" table:style-name="ce16">
            <text:p>1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368</text:p>
          </table:table-cell>
          <table:table-cell office:value-type="string" table:style-name="ce9">
            <text:p>P002648</text:p>
          </table:table-cell>
          <table:table-cell office:value-type="float" office:value="4301180001" table:style-name="ce10">
            <text:p>4301180001</text:p>
          </table:table-cell>
          <table:table-cell office:value-type="float" office:value="4680115880016" table:number-columns-spanned="2" table:number-rows-spanned="1" table:style-name="ce27">
            <text:p>4680115880016</text:p>
          </table:table-cell>
          <table:covered-table-cell/>
          <table:table-cell office:value-type="float" office:value="0.1" table:style-name="ce11">
            <text:p>0,100</text:p>
          </table:table-cell>
          <table:table-cell office:value-type="float" office:value="20" table:style-name="ce12">
            <text:p>20</text:p>
          </table:table-cell>
          <table:table-cell office:value-type="float" office:value="2" table:style-name="ce11">
            <text:p>2,000</text:p>
          </table:table-cell>
          <table:table-cell office:value-type="float" office:value="2.2400000000000002" table:style-name="ce11">
            <text:p>2,240</text:p>
          </table:table-cell>
          <table:table-cell office:value-type="float" office:value="238" table:style-name="ce12">
            <text:p>238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РК</text:p>
          </table:table-cell>
          <table:table-cell table:style-name="ce13"/>
          <table:table-cell office:value-type="float" office:value="730" table:style-name="ce12">
            <text:p>730</text:p>
          </table:table-cell>
          <table:table-cell office:value-type="string" table:number-columns-spanned="5" table:number-rows-spanned="1" table:style-name="ce44">
            <text:p>Паштеты Со сливочным маслом ГОСТ Бордо фикс.вес 0,1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6" table:style-name="ce16">
            <text:p>26,00<text:s/></text:p>
          </table:table-cell>
          <table:table-cell office:value-type="float" office:value="26" table:formula="of:=IFERROR(IF([.X322]=&quot;&quot;;0;CEILING(([.X322]/[.$H322]);1;1)*[.$H322]);&quot;&quot;)" table:style-name="ce16">
            <text:p>26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8" table:formula="of:=IFERROR([.Y320]/[.H320];&quot;0&quot;)+IFERROR([.Y321]/[.H321];&quot;0&quot;)+IFERROR([.Y322]/[.H322];&quot;0&quot;)" table:style-name="ce18">
            <text:p>28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56" table:formula="of:=IFERROR(SUM([.Y320:.Y322]);&quot;0&quot;)" table:style-name="ce18">
            <text:p>56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Бавари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1835</text:p>
          </table:table-cell>
          <table:table-cell office:value-type="string" table:style-name="ce9">
            <text:p>P002202</text:p>
          </table:table-cell>
          <table:table-cell office:value-type="float" office:value="4301051489" table:style-name="ce10">
            <text:p>4301051489</text:p>
          </table:table-cell>
          <table:table-cell office:value-type="float" office:value="4607091387919" table:number-columns-spanned="2" table:number-rows-spanned="1" table:style-name="ce27">
            <text:p>4607091387919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6" table:style-name="ce12">
            <text:p>6</text:p>
          </table:table-cell>
          <table:table-cell office:value-type="float" office:value="8.1" table:style-name="ce11">
            <text:p>8,100</text:p>
          </table:table-cell>
          <table:table-cell office:value-type="float" office:value="8.5939999999999994" table:style-name="ce11">
            <text:p>8,5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Баварские Бавария Весовые П/а мгс Стародворье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0" table:style-name="ce16">
            <text:p>80,00<text:s/></text:p>
          </table:table-cell>
          <table:table-cell office:value-type="float" office:value="81" table:formula="of:=IFERROR(IF([.X327]=&quot;&quot;;0;CEILING(([.X327]/[.$H327]);1;1)*[.$H327]);&quot;&quot;)" table:style-name="ce16">
            <text:p>81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167</text:p>
          </table:table-cell>
          <table:table-cell office:value-type="string" table:style-name="ce9">
            <text:p>P003363</text:p>
          </table:table-cell>
          <table:table-cell office:value-type="float" office:value="4301051461" table:style-name="ce10">
            <text:p>4301051461</text:p>
          </table:table-cell>
          <table:table-cell office:value-type="float" office:value="4680115883604" table:number-columns-spanned="2" table:number-rows-spanned="1" table:style-name="ce27">
            <text:p>4680115883604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3519999999999999" table:style-name="ce11">
            <text:p>2,352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«Баварские» Фикс.вес 0,35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78.5" table:style-name="ce16">
            <text:p>178,50<text:s/></text:p>
          </table:table-cell>
          <table:table-cell office:value-type="float" office:value="178.5" table:formula="of:=IFERROR(IF([.X328]=&quot;&quot;;0;CEILING(([.X328]/[.$H328]);1;1)*[.$H328]);&quot;&quot;)" table:style-name="ce16">
            <text:p>178,5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168</text:p>
          </table:table-cell>
          <table:table-cell office:value-type="string" table:style-name="ce9">
            <text:p>P003364</text:p>
          </table:table-cell>
          <table:table-cell office:value-type="float" office:value="4301051864" table:style-name="ce10">
            <text:p>4301051864</text:p>
          </table:table-cell>
          <table:table-cell office:value-type="float" office:value="4680115883567" table:number-columns-spanned="2" table:number-rows-spanned="1" table:style-name="ce27">
            <text:p>4680115883567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34" table:style-name="ce11">
            <text:p>2,34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Баварские с сыром» Фикс.вес 0,35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26" table:style-name="ce16">
            <text:p>126,00<text:s/></text:p>
          </table:table-cell>
          <table:table-cell office:value-type="float" office:value="126" table:formula="of:=IFERROR(IF([.X329]=&quot;&quot;;0;CEILING(([.X329]/[.$H329]);1;1)*[.$H329]);&quot;&quot;)" table:style-name="ce16">
            <text:p>126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55" table:formula="of:=IFERROR([.Y327]/[.H327];&quot;0&quot;)+IFERROR([.Y328]/[.H328];&quot;0&quot;)+IFERROR([.Y329]/[.H329];&quot;0&quot;)" table:style-name="ce18">
            <text:p>15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385.5" table:formula="of:=IFERROR(SUM([.Y327:.Y329]);&quot;0&quot;)" table:style-name="ce18">
            <text:p>385,5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Особый рецепт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Особа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422</text:p>
          </table:table-cell>
          <table:table-cell office:value-type="string" table:style-name="ce9">
            <text:p>P004256</text:p>
          </table:table-cell>
          <table:table-cell office:value-type="float" office:value="4301011869" table:style-name="ce10">
            <text:p>4301011869</text:p>
          </table:table-cell>
          <table:table-cell office:value-type="float" office:value="4680115884847" table:number-columns-spanned="2" table:number-rows-spanned="1" table:style-name="ce27">
            <text:p>4680115884847</text:p>
          </table:table-cell>
          <table:covered-table-cell/>
          <table:table-cell office:value-type="float" office:value="2.5" table:style-name="ce11">
            <text:p>2,500</text:p>
          </table:table-cell>
          <table:table-cell office:value-type="float" office:value="6" table:style-name="ce12">
            <text:p>6</text:p>
          </table:table-cell>
          <table:table-cell office:value-type="float" office:value="15" table:style-name="ce11">
            <text:p>15,000</text:p>
          </table:table-cell>
          <table:table-cell office:value-type="float" office:value="15.47" table:style-name="ce11">
            <text:p>15,470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28">
            <text:p>Вареные колбасы «Молочная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0" table:style-name="ce16">
            <text:p>90,00<text:s/></text:p>
          </table:table-cell>
          <table:table-cell office:value-type="float" office:value="90" table:formula="of:=IFERROR(IF([.X335]=&quot;&quot;;0;CEILING(([.X335]/[.$H335]);1;1)*[.$H335]);&quot;&quot;)" table:style-name="ce16">
            <text:p>9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423</text:p>
          </table:table-cell>
          <table:table-cell office:value-type="string" table:style-name="ce9">
            <text:p>P004257</text:p>
          </table:table-cell>
          <table:table-cell office:value-type="float" office:value="4301011870" table:style-name="ce10">
            <text:p>4301011870</text:p>
          </table:table-cell>
          <table:table-cell office:value-type="float" office:value="4680115884854" table:number-columns-spanned="2" table:number-rows-spanned="1" table:style-name="ce27">
            <text:p>4680115884854</text:p>
          </table:table-cell>
          <table:covered-table-cell/>
          <table:table-cell office:value-type="float" office:value="2.5" table:style-name="ce11">
            <text:p>2,500</text:p>
          </table:table-cell>
          <table:table-cell office:value-type="float" office:value="6" table:style-name="ce12">
            <text:p>6</text:p>
          </table:table-cell>
          <table:table-cell office:value-type="float" office:value="15" table:style-name="ce11">
            <text:p>15,000</text:p>
          </table:table-cell>
          <table:table-cell office:value-type="float" office:value="15.47" table:style-name="ce11">
            <text:p>15,470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Со шпиком» Весовой п/а ТМ «Особый рецепт» большой батон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20" table:style-name="ce16">
            <text:p>120,00<text:s/></text:p>
          </table:table-cell>
          <table:table-cell office:value-type="float" office:value="120" table:formula="of:=IFERROR(IF([.X336]=&quot;&quot;;0;CEILING(([.X336]/[.$H336]);1;1)*[.$H336]);&quot;&quot;)" table:style-name="ce16">
            <text:p>12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420</text:p>
          </table:table-cell>
          <table:table-cell office:value-type="string" table:style-name="ce9">
            <text:p>P004252</text:p>
          </table:table-cell>
          <table:table-cell office:value-type="float" office:value="4301011867" table:style-name="ce10">
            <text:p>4301011867</text:p>
          </table:table-cell>
          <table:table-cell office:value-type="float" office:value="4680115884830" table:number-columns-spanned="2" table:number-rows-spanned="1" table:style-name="ce27">
            <text:p>4680115884830</text:p>
          </table:table-cell>
          <table:covered-table-cell/>
          <table:table-cell office:value-type="float" office:value="2.5" table:style-name="ce11">
            <text:p>2,500</text:p>
          </table:table-cell>
          <table:table-cell office:value-type="float" office:value="6" table:style-name="ce12">
            <text:p>6</text:p>
          </table:table-cell>
          <table:table-cell office:value-type="float" office:value="15" table:style-name="ce11">
            <text:p>15,000</text:p>
          </table:table-cell>
          <table:table-cell office:value-type="float" office:value="15.47" table:style-name="ce11">
            <text:p>15,470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Филейная» Весовой п/а ТМ «Особый рецепт» большой батон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00" table:style-name="ce16">
            <text:p>300,00<text:s/></text:p>
          </table:table-cell>
          <table:table-cell office:value-type="float" office:value="300" table:formula="of:=IFERROR(IF([.X337]=&quot;&quot;;0;CEILING(([.X337]/[.$H337]);1;1)*[.$H337]);&quot;&quot;)" table:style-name="ce16">
            <text:p>30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251</text:p>
          </table:table-cell>
          <table:table-cell office:value-type="string" table:style-name="ce9">
            <text:p>P005077</text:p>
          </table:table-cell>
          <table:table-cell office:value-type="float" office:value="4301012215" table:style-name="ce10">
            <text:p>4301012215</text:p>
          </table:table-cell>
          <table:table-cell office:value-type="float" office:value="4680115887046" table:number-columns-spanned="2" table:number-rows-spanned="1" table:style-name="ce27">
            <text:p>4680115887046</text:p>
          </table:table-cell>
          <table:covered-table-cell/>
          <table:table-cell office:value-type="float" office:value="2.5" table:style-name="ce11">
            <text:p>2,500</text:p>
          </table:table-cell>
          <table:table-cell office:value-type="float" office:value="6" table:style-name="ce12">
            <text:p>6</text:p>
          </table:table-cell>
          <table:table-cell office:value-type="float" office:value="15" table:style-name="ce11">
            <text:p>15,000</text:p>
          </table:table-cell>
          <table:table-cell office:value-type="float" office:value="15.47" table:style-name="ce11">
            <text:p>15,470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4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Докторская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38]=&quot;&quot;;0;CEILING(([.X338]/[.$H338]);1;1)*[.$H33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87</text:p>
          </table:table-cell>
          <table:table-cell office:value-type="string" table:style-name="ce9">
            <text:p>P003189</text:p>
          </table:table-cell>
          <table:table-cell office:value-type="float" office:value="4301011433" table:style-name="ce10">
            <text:p>4301011433</text:p>
          </table:table-cell>
          <table:table-cell office:value-type="float" office:value="4680115882638" table:number-columns-spanned="2" table:number-rows-spanned="1" table:style-name="ce27">
            <text:p>468011588263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90" table:style-name="ce12">
            <text:p>90</text:p>
          </table:table-cell>
          <table:table-cell office:value-type="string" table:number-columns-spanned="5" table:number-rows-spanned="1" table:style-name="ce44">
            <text:p>Вареные колбасы «Молочная с нежным филе» Фикс.вес 0,4 кг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39]=&quot;&quot;;0;CEILING(([.X339]/[.$H339]);1;1)*[.$H33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432</text:p>
          </table:table-cell>
          <table:table-cell office:value-type="string" table:style-name="ce9">
            <text:p>P004347</text:p>
          </table:table-cell>
          <table:table-cell office:value-type="float" office:value="4301011952" table:style-name="ce10">
            <text:p>4301011952</text:p>
          </table:table-cell>
          <table:table-cell office:value-type="float" office:value="4680115884922" table:number-columns-spanned="2" table:number-rows-spanned="1" table:style-name="ce27">
            <text:p>4680115884922</text:p>
          </table:table-cell>
          <table:covered-table-cell/>
          <table:table-cell office:value-type="float" office:value="0.5" table:style-name="ce11">
            <text:p>0,500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1">
            <text:p>5,000</text:p>
          </table:table-cell>
          <table:table-cell office:value-type="float" office:value="5.19" table:style-name="ce11">
            <text:p>5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Со шпиком» Фикс.вес 0,5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40]=&quot;&quot;;0;CEILING(([.X340]/[.$H340]);1;1)*[.$H34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421</text:p>
          </table:table-cell>
          <table:table-cell office:value-type="string" table:style-name="ce9">
            <text:p>P004253</text:p>
          </table:table-cell>
          <table:table-cell office:value-type="float" office:value="4301011868" table:style-name="ce10">
            <text:p>4301011868</text:p>
          </table:table-cell>
          <table:table-cell office:value-type="float" office:value="4680115884861" table:number-columns-spanned="2" table:number-rows-spanned="1" table:style-name="ce27">
            <text:p>4680115884861</text:p>
          </table:table-cell>
          <table:covered-table-cell/>
          <table:table-cell office:value-type="float" office:value="0.5" table:style-name="ce11">
            <text:p>0,500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1">
            <text:p>5,000</text:p>
          </table:table-cell>
          <table:table-cell office:value-type="float" office:value="5.19" table:style-name="ce11">
            <text:p>5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Филейная» ф/в 0,5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41]=&quot;&quot;;0;CEILING(([.X341]/[.$H341]);1;1)*[.$H34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34" table:formula="of:=IFERROR([.Y335]/[.H335];&quot;0&quot;)+IFERROR([.Y336]/[.H336];&quot;0&quot;)+IFERROR([.Y337]/[.H337];&quot;0&quot;)+IFERROR([.Y338]/[.H338];&quot;0&quot;)+IFERROR([.Y339]/[.H339];&quot;0&quot;)+IFERROR([.Y340]/[.H340];&quot;0&quot;)+IFERROR([.Y341]/[.H341];&quot;0&quot;)" table:style-name="ce18">
            <text:p>34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510" table:formula="of:=IFERROR(SUM([.Y335:.Y341]);&quot;0&quot;)" table:style-name="ce18">
            <text:p>51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0126</text:p>
          </table:table-cell>
          <table:table-cell office:value-type="string" table:style-name="ce9">
            <text:p>P002555</text:p>
          </table:table-cell>
          <table:table-cell office:value-type="float" office:value="4301020178" table:style-name="ce10">
            <text:p>4301020178</text:p>
          </table:table-cell>
          <table:table-cell office:value-type="float" office:value="4607091383980" table:number-columns-spanned="2" table:number-rows-spanned="1" table:style-name="ce27">
            <text:p>4607091383980</text:p>
          </table:table-cell>
          <table:covered-table-cell/>
          <table:table-cell office:value-type="float" office:value="2.5" table:style-name="ce11">
            <text:p>2,500</text:p>
          </table:table-cell>
          <table:table-cell office:value-type="float" office:value="6" table:style-name="ce12">
            <text:p>6</text:p>
          </table:table-cell>
          <table:table-cell office:value-type="float" office:value="15" table:style-name="ce11">
            <text:p>15,000</text:p>
          </table:table-cell>
          <table:table-cell office:value-type="float" office:value="15.47" table:style-name="ce11">
            <text:p>15,470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етчины Нежная Особая Особая Весовые П/а Особый рецепт большой батон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00" table:style-name="ce16">
            <text:p>800,00<text:s/></text:p>
          </table:table-cell>
          <table:table-cell office:value-type="float" office:value="810" table:formula="of:=IFERROR(IF([.X345]=&quot;&quot;;0;CEILING(([.X345]/[.$H345]);1;1)*[.$H345]);&quot;&quot;)" table:style-name="ce16">
            <text:p>81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027</text:p>
          </table:table-cell>
          <table:table-cell office:value-type="string" table:style-name="ce9">
            <text:p>P002556</text:p>
          </table:table-cell>
          <table:table-cell office:value-type="float" office:value="4301020179" table:style-name="ce10">
            <text:p>4301020179</text:p>
          </table:table-cell>
          <table:table-cell office:value-type="float" office:value="4607091384178" table:number-columns-spanned="2" table:number-rows-spanned="1" table:style-name="ce27">
            <text:p>460709138417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етчины Нежная Особая Особая Фикс.вес 0,4 П/а Особый рецепт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46]=&quot;&quot;;0;CEILING(([.X346]/[.$H346]);1;1)*[.$H34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54" table:formula="of:=IFERROR([.Y345]/[.H345];&quot;0&quot;)+IFERROR([.Y346]/[.H346];&quot;0&quot;)" table:style-name="ce18">
            <text:p>54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810" table:formula="of:=IFERROR(SUM([.Y345:.Y346]);&quot;0&quot;)" table:style-name="ce18">
            <text:p>81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161</text:p>
          </table:table-cell>
          <table:table-cell office:value-type="string" table:style-name="ce9">
            <text:p>P004847</text:p>
          </table:table-cell>
          <table:table-cell office:value-type="float" office:value="4301051903" table:style-name="ce10">
            <text:p>4301051903</text:p>
          </table:table-cell>
          <table:table-cell office:value-type="float" office:value="4607091383928" table:number-columns-spanned="2" table:number-rows-spanned="1" table:style-name="ce27">
            <text:p>4607091383928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5" table:style-name="ce11">
            <text:p>9,50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осиски «Датские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8" table:style-name="ce16">
            <text:p>18,00<text:s/></text:p>
          </table:table-cell>
          <table:table-cell office:value-type="float" office:value="18" table:formula="of:=IFERROR(IF([.X350]=&quot;&quot;;0;CEILING(([.X350]/[.$H350]);1;1)*[.$H350]);&quot;&quot;)" table:style-name="ce16">
            <text:p>18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0246</text:p>
          </table:table-cell>
          <table:table-cell office:value-type="string" table:style-name="ce9">
            <text:p>P004843</text:p>
          </table:table-cell>
          <table:table-cell office:value-type="float" office:value="4301051897" table:style-name="ce10">
            <text:p>4301051897</text:p>
          </table:table-cell>
          <table:table-cell office:value-type="float" office:value="4607091384260" table:number-columns-spanned="2" table:number-rows-spanned="1" table:style-name="ce27">
            <text:p>4607091384260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4939999999999998" table:style-name="ce11">
            <text:p>9,4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Молочные оригинальные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51]=&quot;&quot;;0;CEILING(([.X351]/[.$H351]);1;1)*[.$H35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" table:formula="of:=IFERROR([.Y350]/[.H350];&quot;0&quot;)+IFERROR([.Y351]/[.H351];&quot;0&quot;)" table:style-name="ce18">
            <text:p>2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8" table:formula="of:=IFERROR(SUM([.Y350:.Y351]);&quot;0&quot;)" table:style-name="ce18">
            <text:p>18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ардель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287</text:p>
          </table:table-cell>
          <table:table-cell office:value-type="string" table:style-name="ce9">
            <text:p>P005080</text:p>
          </table:table-cell>
          <table:table-cell office:value-type="float" office:value="4301060524" table:style-name="ce10">
            <text:p>4301060524</text:p>
          </table:table-cell>
          <table:table-cell office:value-type="float" office:value="4607091384673" table:number-columns-spanned="2" table:number-rows-spanned="1" table:style-name="ce27">
            <text:p>4607091384673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4939999999999998" table:style-name="ce11">
            <text:p>9,4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ардельки «Сочные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55]=&quot;&quot;;0;CEILING(([.X355]/[.$H355]);1;1)*[.$H35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355]/[.H355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355:.Y355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Особая Без свин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425</text:p>
          </table:table-cell>
          <table:table-cell office:value-type="string" table:style-name="ce9">
            <text:p>P004273</text:p>
          </table:table-cell>
          <table:table-cell office:value-type="float" office:value="4301011875" table:style-name="ce10">
            <text:p>4301011875</text:p>
          </table:table-cell>
          <table:table-cell office:value-type="float" office:value="4680115884885" table:number-columns-spanned="2" table:number-rows-spanned="1" table:style-name="ce27">
            <text:p>4680115884885</text:p>
          </table:table-cell>
          <table:covered-table-cell/>
          <table:table-cell office:value-type="float" office:value="0.8" table:style-name="ce11">
            <text:p>0,800</text:p>
          </table:table-cell>
          <table:table-cell office:value-type="float" office:value="15" table:style-name="ce12">
            <text:p>15</text:p>
          </table:table-cell>
          <table:table-cell office:value-type="float" office:value="12" table:style-name="ce11">
            <text:p>12,000</text:p>
          </table:table-cell>
          <table:table-cell office:value-type="float" office:value="12.41" table:style-name="ce11">
            <text:p>12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28">
            <text:p>Вареные колбасы «Филейная Оригинальная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60]=&quot;&quot;;0;CEILING(([.X360]/[.$H360]);1;1)*[.$H36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426</text:p>
          </table:table-cell>
          <table:table-cell office:value-type="string" table:style-name="ce9">
            <text:p>P004258</text:p>
          </table:table-cell>
          <table:table-cell office:value-type="float" office:value="4301011871" table:style-name="ce10">
            <text:p>4301011871</text:p>
          </table:table-cell>
          <table:table-cell office:value-type="float" office:value="4680115884908" table:number-columns-spanned="2" table:number-rows-spanned="1" table:style-name="ce27">
            <text:p>4680115884908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Филейная Оригинальная» ф/в 0,4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75" table:style-name="ce16">
            <text:p>75,00<text:s/></text:p>
          </table:table-cell>
          <table:table-cell office:value-type="float" office:value="76" table:formula="of:=IFERROR(IF([.X361]=&quot;&quot;;0;CEILING(([.X361]/[.$H361]);1;1)*[.$H361]);&quot;&quot;)" table:style-name="ce16">
            <text:p>76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19" table:formula="of:=IFERROR([.Y360]/[.H360];&quot;0&quot;)+IFERROR([.Y361]/[.H361];&quot;0&quot;)" table:style-name="ce18">
            <text:p>19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76" table:formula="of:=IFERROR(SUM([.Y360:.Y361]);&quot;0&quot;)" table:style-name="ce18">
            <text:p>76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360</text:p>
          </table:table-cell>
          <table:table-cell office:value-type="string" table:style-name="ce9">
            <text:p>P004227</text:p>
          </table:table-cell>
          <table:table-cell office:value-type="float" office:value="4301031303" table:style-name="ce10">
            <text:p>4301031303</text:p>
          </table:table-cell>
          <table:table-cell office:value-type="float" office:value="4607091384802" table:number-columns-spanned="2" table:number-rows-spanned="1" table:style-name="ce27">
            <text:p>4607091384802</text:p>
          </table:table-cell>
          <table:covered-table-cell/>
          <table:table-cell office:value-type="float" office:value="0.73" table:style-name="ce11">
            <text:p>0,730</text:p>
          </table:table-cell>
          <table:table-cell office:value-type="float" office:value="6" table:style-name="ce12">
            <text:p>6</text:p>
          </table:table-cell>
          <table:table-cell office:value-type="float" office:value="4.38" table:style-name="ce11">
            <text:p>4,380</text:p>
          </table:table-cell>
          <table:table-cell office:value-type="float" office:value="4.63" table:style-name="ce11">
            <text:p>4,63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35" table:style-name="ce12">
            <text:p>35</text:p>
          </table:table-cell>
          <table:table-cell office:value-type="string" table:number-columns-spanned="5" table:number-rows-spanned="1" table:style-name="ce28">
            <text:p>В/к колбасы Сервелат Левантский Особая Без свинины Весовые в/у Особый рецепт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65]=&quot;&quot;;0;CEILING(([.X365]/[.$H365]);1;1)*[.$H36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360</text:p>
          </table:table-cell>
          <table:table-cell office:value-type="string" table:style-name="ce9">
            <text:p>P005172</text:p>
          </table:table-cell>
          <table:table-cell office:value-type="float" office:value="4301031457" table:style-name="ce10">
            <text:p>4301031457</text:p>
          </table:table-cell>
          <table:table-cell office:value-type="float" office:value="4607091384802" table:number-columns-spanned="2" table:number-rows-spanned="1" table:style-name="ce27">
            <text:p>4607091384802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5" table:style-name="ce11">
            <text:p>4,4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Копченые колбасы «Сервелат Левантский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66]=&quot;&quot;;0;CEILING(([.X366]/[.$H366]);1;1)*[.$H36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365]/[.H365];&quot;0&quot;)+IFERROR([.Y366]/[.H366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365:.Y366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074</text:p>
          </table:table-cell>
          <table:table-cell office:value-type="string" table:style-name="ce9">
            <text:p>P004844</text:p>
          </table:table-cell>
          <table:table-cell office:value-type="float" office:value="4301051899" table:style-name="ce10">
            <text:p>4301051899</text:p>
          </table:table-cell>
          <table:table-cell office:value-type="float" office:value="4607091384246" table:number-columns-spanned="2" table:number-rows-spanned="1" table:style-name="ce27">
            <text:p>4607091384246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4939999999999998" table:style-name="ce11">
            <text:p>9,4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осиски «Молочные для завтрака» Весовой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400" table:style-name="ce16">
            <text:p>400,00<text:s/></text:p>
          </table:table-cell>
          <table:table-cell office:value-type="float" office:value="405" table:formula="of:=IFERROR(IF([.X370]=&quot;&quot;;0;CEILING(([.X370]/[.$H370]);1;1)*[.$H370]);&quot;&quot;)" table:style-name="ce16">
            <text:p>405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205</text:p>
          </table:table-cell>
          <table:table-cell office:value-type="string" table:style-name="ce9">
            <text:p>P003969</text:p>
          </table:table-cell>
          <table:table-cell office:value-type="float" office:value="4301051660" table:style-name="ce10">
            <text:p>4301051660</text:p>
          </table:table-cell>
          <table:table-cell office:value-type="float" office:value="4607091384253" table:number-columns-spanned="2" table:number-rows-spanned="1" table:style-name="ce27">
            <text:p>4607091384253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640000000000001" table:style-name="ce11">
            <text:p>2,664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Молочные для завтрака» Фикс.вес 0,4 П/а мгс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71]=&quot;&quot;;0;CEILING(([.X371]/[.$H371]);1;1)*[.$H37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205</text:p>
          </table:table-cell>
          <table:table-cell office:value-type="string" table:style-name="ce9">
            <text:p>P005198</text:p>
          </table:table-cell>
          <table:table-cell office:value-type="float" office:value="4301052069" table:style-name="ce10">
            <text:p>4301052069</text:p>
          </table:table-cell>
          <table:table-cell office:value-type="float" office:value="4607091384253" table:number-columns-spanned="2" table:number-rows-spanned="1" table:style-name="ce27">
            <text:p>4607091384253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6640000000000001" table:style-name="ce11">
            <text:p>2,664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осиски «Молочные для завтрака» Фикс.вес 0,4 п/а ТМ «Особый рецепт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72" table:style-name="ce16">
            <text:p>72,00<text:s/></text:p>
          </table:table-cell>
          <table:table-cell office:value-type="float" office:value="72" table:formula="of:=IFERROR(IF([.X372]=&quot;&quot;;0;CEILING(([.X372]/[.$H372]);1;1)*[.$H372]);&quot;&quot;)" table:style-name="ce16">
            <text:p>72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75" table:formula="of:=IFERROR([.Y370]/[.H370];&quot;0&quot;)+IFERROR([.Y371]/[.H371];&quot;0&quot;)+IFERROR([.Y372]/[.H372];&quot;0&quot;)" table:style-name="ce18">
            <text:p>7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477" table:formula="of:=IFERROR(SUM([.Y370:.Y372]);&quot;0&quot;)" table:style-name="ce18">
            <text:p>477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Баварушк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Филейбургска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614</text:p>
          </table:table-cell>
          <table:table-cell office:value-type="string" table:style-name="ce9">
            <text:p>P004898</text:p>
          </table:table-cell>
          <table:table-cell office:value-type="float" office:value="4301031405" table:style-name="ce10">
            <text:p>4301031405</text:p>
          </table:table-cell>
          <table:table-cell office:value-type="float" office:value="4680115886100" table:number-columns-spanned="2" table:number-rows-spanned="1" table:style-name="ce27">
            <text:p>4680115886100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Копченые колбасы «Салями Филейбургская зернистая» Весовой фиброу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78]=&quot;&quot;;0;CEILING(([.X378]/[.$H378]);1;1)*[.$H37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15</text:p>
          </table:table-cell>
          <table:table-cell office:value-type="string" table:style-name="ce9">
            <text:p>P004899</text:p>
          </table:table-cell>
          <table:table-cell office:value-type="float" office:value="4301031406" table:style-name="ce10">
            <text:p>4301031406</text:p>
          </table:table-cell>
          <table:table-cell office:value-type="float" office:value="4680115886117" table:number-columns-spanned="2" table:number-rows-spanned="1" table:style-name="ce27">
            <text:p>4680115886117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Копченые колбасы «Филейбургская с душистым чесноком» Весовой фиброу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79]=&quot;&quot;;0;CEILING(([.X379]/[.$H379]);1;1)*[.$H37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13</text:p>
          </table:table-cell>
          <table:table-cell office:value-type="string" table:style-name="ce9">
            <text:p>P004895</text:p>
          </table:table-cell>
          <table:table-cell office:value-type="float" office:value="4301031402" table:style-name="ce10">
            <text:p>4301031402</text:p>
          </table:table-cell>
          <table:table-cell office:value-type="float" office:value="4680115886124" table:number-columns-spanned="2" table:number-rows-spanned="1" table:style-name="ce27">
            <text:p>4680115886124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Копченые колбасы «Филейбургская с сочным окороком» Весовой фиброу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0]=&quot;&quot;;0;CEILING(([.X380]/[.$H380]);1;1)*[.$H38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083</text:p>
          </table:table-cell>
          <table:table-cell office:value-type="string" table:style-name="ce9">
            <text:p>P004543</text:p>
          </table:table-cell>
          <table:table-cell office:value-type="float" office:value="4301031366" table:style-name="ce10">
            <text:p>4301031366</text:p>
          </table:table-cell>
          <table:table-cell office:value-type="float" office:value="4680115883147" table:number-columns-spanned="2" table:number-rows-spanned="1" table:style-name="ce27">
            <text:p>4680115883147</text:p>
          </table:table-cell>
          <table:covered-table-cell/>
          <table:table-cell office:value-type="float" office:value="0.28000000000000003" table:style-name="ce11">
            <text:p>0,280</text:p>
          </table:table-cell>
          <table:table-cell office:value-type="float" office:value="6" table:style-name="ce12">
            <text:p>6</text:p>
          </table:table-cell>
          <table:table-cell office:value-type="float" office:value="1.68" table:style-name="ce11">
            <text:p>1,680</text:p>
          </table:table-cell>
          <table:table-cell office:value-type="float" office:value="1.81" table:style-name="ce11">
            <text:p>1,81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/к колбасы «Салями Филейбургская зернистая» срез Фикс.вес 0,28 фиброу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1]=&quot;&quot;;0;CEILING(([.X381]/[.$H381]);1;1)*[.$H38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538</text:p>
          </table:table-cell>
          <table:table-cell office:value-type="string" table:style-name="ce9">
            <text:p>P004517</text:p>
          </table:table-cell>
          <table:table-cell office:value-type="float" office:value="4301031362" table:style-name="ce10">
            <text:p>4301031362</text:p>
          </table:table-cell>
          <table:table-cell office:value-type="float" office:value="4607091384338" table:number-columns-spanned="2" table:number-rows-spanned="1" table:style-name="ce27">
            <text:p>4607091384338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/к колбасы Салями Филейбургская зернистая срез Филейбургская Фикс.вес 0,35 фиброуз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.4" table:style-name="ce16">
            <text:p>8,40<text:s/></text:p>
          </table:table-cell>
          <table:table-cell office:value-type="float" office:value="8.4" table:formula="of:=IFERROR(IF([.X382]=&quot;&quot;;0;CEILING(([.X382]/[.$H382]);1;1)*[.$H382]);&quot;&quot;)" table:style-name="ce16">
            <text:p>8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02</text:p>
          </table:table-cell>
          <table:table-cell office:value-type="string" table:style-name="ce9">
            <text:p>P004518</text:p>
          </table:table-cell>
          <table:table-cell office:value-type="float" office:value="4301031361" table:style-name="ce10">
            <text:p>4301031361</text:p>
          </table:table-cell>
          <table:table-cell office:value-type="float" office:value="4607091389524" table:number-columns-spanned="2" table:number-rows-spanned="1" table:style-name="ce27">
            <text:p>4607091389524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/к колбасы Сервелат Филейбургский с ароматными пряностями срез Филейбургская Фикс.вес 0,35 фиброуз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3]=&quot;&quot;;0;CEILING(([.X383]/[.$H383]);1;1)*[.$H38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080</text:p>
          </table:table-cell>
          <table:table-cell office:value-type="string" table:style-name="ce9">
            <text:p>P004525</text:p>
          </table:table-cell>
          <table:table-cell office:value-type="float" office:value="4301031364" table:style-name="ce10">
            <text:p>4301031364</text:p>
          </table:table-cell>
          <table:table-cell office:value-type="float" office:value="4680115883161" table:number-columns-spanned="2" table:number-rows-spanned="1" table:style-name="ce27">
            <text:p>4680115883161</text:p>
          </table:table-cell>
          <table:covered-table-cell/>
          <table:table-cell office:value-type="float" office:value="0.28000000000000003" table:style-name="ce11">
            <text:p>0,280</text:p>
          </table:table-cell>
          <table:table-cell office:value-type="float" office:value="6" table:style-name="ce12">
            <text:p>6</text:p>
          </table:table-cell>
          <table:table-cell office:value-type="float" office:value="1.68" table:style-name="ce11">
            <text:p>1,680</text:p>
          </table:table-cell>
          <table:table-cell office:value-type="float" office:value="1.81" table:style-name="ce11">
            <text:p>1,81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/к колбасы «Сервелат Филейбургский с копченой грудинкой» срез Филейбургская Фикс.вес 0,28 фиброу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4]=&quot;&quot;;0;CEILING(([.X384]/[.$H384]);1;1)*[.$H38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06</text:p>
          </table:table-cell>
          <table:table-cell office:value-type="string" table:style-name="ce9">
            <text:p>P004521</text:p>
          </table:table-cell>
          <table:table-cell office:value-type="float" office:value="4301031358" table:style-name="ce10">
            <text:p>4301031358</text:p>
          </table:table-cell>
          <table:table-cell office:value-type="float" office:value="4607091389531" table:number-columns-spanned="2" table:number-rows-spanned="1" table:style-name="ce27">
            <text:p>4607091389531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/к колбасы Сервелат Филейбургский с филе сочного окорока срез Филейбургская Фикс.вес 0,35 Фиброуз в/у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5]=&quot;&quot;;0;CEILING(([.X385]/[.$H385]);1;1)*[.$H385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03</text:p>
          </table:table-cell>
          <table:table-cell office:value-type="string" table:style-name="ce9">
            <text:p>P004519</text:p>
          </table:table-cell>
          <table:table-cell office:value-type="float" office:value="4301031360" table:style-name="ce10">
            <text:p>4301031360</text:p>
          </table:table-cell>
          <table:table-cell office:value-type="float" office:value="4607091384345" table:number-columns-spanned="2" table:number-rows-spanned="1" table:style-name="ce27">
            <text:p>4607091384345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/к колбасы Сервелат Филейбургский с копченой грудинкой срез Филейбургская Фикс.вес 0,35 фиброуз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86]=&quot;&quot;;0;CEILING(([.X386]/[.$H386]);1;1)*[.$H38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4" table:formula="of:=IFERROR([.Y378]/[.H378];&quot;0&quot;)+IFERROR([.Y379]/[.H379];&quot;0&quot;)+IFERROR([.Y380]/[.H380];&quot;0&quot;)+IFERROR([.Y381]/[.H381];&quot;0&quot;)+IFERROR([.Y382]/[.H382];&quot;0&quot;)+IFERROR([.Y383]/[.H383];&quot;0&quot;)+IFERROR([.Y384]/[.H384];&quot;0&quot;)+IFERROR([.Y385]/[.H385];&quot;0&quot;)+IFERROR([.Y386]/[.H386];&quot;0&quot;)" table:style-name="ce18">
            <text:p>4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8.4" table:formula="of:=IFERROR(SUM([.Y378:.Y386]);&quot;0&quot;)" table:style-name="ce18">
            <text:p>8,4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285</text:p>
          </table:table-cell>
          <table:table-cell office:value-type="string" table:style-name="ce9">
            <text:p>P002969</text:p>
          </table:table-cell>
          <table:table-cell office:value-type="float" office:value="4301051284" table:style-name="ce10">
            <text:p>4301051284</text:p>
          </table:table-cell>
          <table:table-cell office:value-type="float" office:value="4607091384352" table:number-columns-spanned="2" table:number-rows-spanned="1" table:style-name="ce27">
            <text:p>4607091384352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4" table:style-name="ce12">
            <text:p>4</text:p>
          </table:table-cell>
          <table:table-cell office:value-type="float" office:value="2.4" table:style-name="ce11">
            <text:p>2,400</text:p>
          </table:table-cell>
          <table:table-cell office:value-type="float" office:value="2.6259999999999999" table:style-name="ce11">
            <text:p>2,626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Баварушки (со сливочным маслом ГОСТ 32261-2013) Филейбургская Фикс.вес 0,6 П/а мгс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90]=&quot;&quot;;0;CEILING(([.X390]/[.$H390]);1;1)*[.$H39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557</text:p>
          </table:table-cell>
          <table:table-cell office:value-type="string" table:style-name="ce9">
            <text:p>P003318</text:p>
          </table:table-cell>
          <table:table-cell office:value-type="float" office:value="4301051431" table:style-name="ce10">
            <text:p>4301051431</text:p>
          </table:table-cell>
          <table:table-cell office:value-type="float" office:value="4607091389654" table:number-columns-spanned="2" table:number-rows-spanned="1" table:style-name="ce27">
            <text:p>4607091389654</text:p>
          </table:table-cell>
          <table:covered-table-cell/>
          <table:table-cell office:value-type="float" office:value="0.33" table:style-name="ce11">
            <text:p>0,330</text:p>
          </table:table-cell>
          <table:table-cell office:value-type="float" office:value="6" table:style-name="ce12">
            <text:p>6</text:p>
          </table:table-cell>
          <table:table-cell office:value-type="float" office:value="1.98" table:style-name="ce11">
            <text:p>1,980</text:p>
          </table:table-cell>
          <table:table-cell office:value-type="float" office:value="2.238" table:style-name="ce11">
            <text:p>2,238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office:value-type="string" table:style-name="ce12">
            <text:p>Короб, мин. 14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44">
            <text:p>Сосиски Баварушки (с грудкой ГОСТ 31962-2013) Филейбургская Фикс.вес 0,33 П/а мгс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91]=&quot;&quot;;0;CEILING(([.X391]/[.$H391]);1;1)*[.$H39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390]/[.H390];&quot;0&quot;)+IFERROR([.Y391]/[.H391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390:.Y391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Балыкбургская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500</text:p>
          </table:table-cell>
          <table:table-cell office:value-type="string" table:style-name="ce9">
            <text:p>P004400</text:p>
          </table:table-cell>
          <table:table-cell office:value-type="float" office:value="4301020319" table:style-name="ce10">
            <text:p>4301020319</text:p>
          </table:table-cell>
          <table:table-cell office:value-type="float" office:value="4680115885240" table:number-columns-spanned="2" table:number-rows-spanned="1" table:style-name="ce27">
            <text:p>4680115885240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31" table:style-name="ce11">
            <text:p>2,31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Ветчины «Балыкбургская» срез Фикс.вес 0,35 айцел в/у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396]=&quot;&quot;;0;CEILING(([.X396]/[.$H396]);1;1)*[.$H39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396]/[.H396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396:.Y396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612</text:p>
          </table:table-cell>
          <table:table-cell office:value-type="string" table:style-name="ce9">
            <text:p>P004896</text:p>
          </table:table-cell>
          <table:table-cell office:value-type="float" office:value="4301031403" table:style-name="ce10">
            <text:p>4301031403</text:p>
          </table:table-cell>
          <table:table-cell office:value-type="float" office:value="4680115886094" table:number-columns-spanned="2" table:number-rows-spanned="1" table:style-name="ce27">
            <text:p>4680115886094</text:p>
          </table:table-cell>
          <table:covered-table-cell/>
          <table:table-cell office:value-type="float" office:value="0.9" table:style-name="ce11">
            <text:p>0,900</text:p>
          </table:table-cell>
          <table:table-cell office:value-type="float" office:value="6" table:style-name="ce12">
            <text:p>6</text:p>
          </table:table-cell>
          <table:table-cell office:value-type="float" office:value="5.4" table:style-name="ce11">
            <text:p>5,400</text:p>
          </table:table-cell>
          <table:table-cell office:value-type="float" office:value="5.59" table:style-name="ce11">
            <text:p>5,5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Копченые колбасы «Балыкбургская» Весовой фиброу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25" table:style-name="ce16">
            <text:p>25,00<text:s/></text:p>
          </table:table-cell>
          <table:table-cell office:value-type="float" office:value="27" table:formula="of:=IFERROR(IF([.X400]=&quot;&quot;;0;CEILING(([.X400]/[.$H400]);1;1)*[.$H400]);&quot;&quot;)" table:style-name="ce16">
            <text:p>27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545</text:p>
          </table:table-cell>
          <table:table-cell office:value-type="string" table:style-name="ce9">
            <text:p>P004516</text:p>
          </table:table-cell>
          <table:table-cell office:value-type="float" office:value="4301031363" table:style-name="ce10">
            <text:p>4301031363</text:p>
          </table:table-cell>
          <table:table-cell office:value-type="float" office:value="4607091389425" table:number-columns-spanned="2" table:number-rows-spanned="1" table:style-name="ce27">
            <text:p>4607091389425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/к колбасы «Балыкбургская рубленая» Фикс.вес 0,35 фиброуз в/у срез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01]=&quot;&quot;;0;CEILING(([.X401]/[.$H401]);1;1)*[.$H40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726</text:p>
          </table:table-cell>
          <table:table-cell office:value-type="string" table:style-name="ce9">
            <text:p>P004546</text:p>
          </table:table-cell>
          <table:table-cell office:value-type="float" office:value="4301031373" table:style-name="ce10">
            <text:p>4301031373</text:p>
          </table:table-cell>
          <table:table-cell office:value-type="float" office:value="4680115880771" table:number-columns-spanned="2" table:number-rows-spanned="1" table:style-name="ce27">
            <text:p>4680115880771</text:p>
          </table:table-cell>
          <table:covered-table-cell/>
          <table:table-cell office:value-type="float" office:value="0.28000000000000003" table:style-name="ce11">
            <text:p>0,280</text:p>
          </table:table-cell>
          <table:table-cell office:value-type="float" office:value="6" table:style-name="ce12">
            <text:p>6</text:p>
          </table:table-cell>
          <table:table-cell office:value-type="float" office:value="1.68" table:style-name="ce11">
            <text:p>1,680</text:p>
          </table:table-cell>
          <table:table-cell office:value-type="float" office:value="1.81" table:style-name="ce11">
            <text:p>1,81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/к колбасы Балыкбургская с копченым балыком срез Балыкбургская Фикс.вес 0,28 фиброуз в/у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02]=&quot;&quot;;0;CEILING(([.X402]/[.$H402]);1;1)*[.$H40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04</text:p>
          </table:table-cell>
          <table:table-cell office:value-type="string" table:style-name="ce9">
            <text:p>P004520</text:p>
          </table:table-cell>
          <table:table-cell office:value-type="float" office:value="4301031359" table:style-name="ce10">
            <text:p>4301031359</text:p>
          </table:table-cell>
          <table:table-cell office:value-type="float" office:value="4607091389500" table:number-columns-spanned="2" table:number-rows-spanned="1" table:style-name="ce27">
            <text:p>4607091389500</text:p>
          </table:table-cell>
          <table:covered-table-cell/>
          <table:table-cell office:value-type="float" office:value="0.35" table:style-name="ce11">
            <text:p>0,350</text:p>
          </table:table-cell>
          <table:table-cell office:value-type="float" office:value="6" table:style-name="ce12">
            <text:p>6</text:p>
          </table:table-cell>
          <table:table-cell office:value-type="float" office:value="2.1" table:style-name="ce11">
            <text:p>2,100</text:p>
          </table:table-cell>
          <table:table-cell office:value-type="float" office:value="2.23" table:style-name="ce11">
            <text:p>2,230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18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/к колбасы Балыкбургская с копченым балыком срез Балыкбургская Фикс.вес 0,35 фиброуз в/у Бавар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03]=&quot;&quot;;0;CEILING(([.X403]/[.$H403]);1;1)*[.$H40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5" table:formula="of:=IFERROR([.Y400]/[.H400];&quot;0&quot;)+IFERROR([.Y401]/[.H401];&quot;0&quot;)+IFERROR([.Y402]/[.H402];&quot;0&quot;)+IFERROR([.Y403]/[.H403];&quot;0&quot;)" table:style-name="ce18">
            <text:p>5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7" table:formula="of:=IFERROR(SUM([.Y400:.Y403]);&quot;0&quot;)" table:style-name="ce18">
            <text:p>27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раковюрст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342</text:p>
          </table:table-cell>
          <table:table-cell office:value-type="string" table:style-name="ce9">
            <text:p>P004452</text:p>
          </table:table-cell>
          <table:table-cell office:value-type="float" office:value="4301031347" table:style-name="ce10">
            <text:p>4301031347</text:p>
          </table:table-cell>
          <table:table-cell office:value-type="float" office:value="4680115885110" table:number-columns-spanned="2" table:number-rows-spanned="1" table:style-name="ce27">
            <text:p>4680115885110</text:p>
          </table:table-cell>
          <table:covered-table-cell/>
          <table:table-cell office:value-type="float" office:value="0.2" table:style-name="ce11">
            <text:p>0,200</text:p>
          </table:table-cell>
          <table:table-cell office:value-type="float" office:value="6" table:style-name="ce12">
            <text:p>6</text:p>
          </table:table-cell>
          <table:table-cell office:value-type="float" office:value="1.2" table:style-name="ce11">
            <text:p>1,200</text:p>
          </table:table-cell>
          <table:table-cell office:value-type="float" office:value="2.1" table:style-name="ce11">
            <text:p>2,10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Копченые колбасы «Краковюрст с изысканными пряностями копченые» ф/в 0,2 NDX ТМ «Бавар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08]=&quot;&quot;;0;CEILING(([.X408]/[.$H408]);1;1)*[.$H40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408]/[.H408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408:.Y408]);&quot;0&quot;)" table:style-name="ce18">
            <text:p>0,00<text:s/></text:p>
          </table:table-cell>
          <table:table-cell table:number-columns-repeated="16359"/>
        </table:table-row>
        <table:table-row table:number-rows-repeated="2" table:style-name="ro1">
          <table:table-cell office:value-type="string" table:style-name="ce4">
            <text:p>Дугушка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011</text:p>
          </table:table-cell>
          <table:table-cell office:value-type="string" table:style-name="ce9">
            <text:p>P004028</text:p>
          </table:table-cell>
          <table:table-cell office:value-type="float" office:value="4301011795" table:style-name="ce10">
            <text:p>4301011795</text:p>
          </table:table-cell>
          <table:table-cell office:value-type="float" office:value="4607091389067" table:number-columns-spanned="2" table:number-rows-spanned="1" table:style-name="ce27">
            <text:p>4607091389067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28">
            <text:p>Вареные колбасы Докторская ГОСТ Дугушка Весовые Вектор Дуг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14]=&quot;&quot;;0;CEILING(([.X414]/[.$H414]);1;1)*[.$H41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094</text:p>
          </table:table-cell>
          <table:table-cell office:value-type="string" table:style-name="ce9">
            <text:p>P004938</text:p>
          </table:table-cell>
          <table:table-cell office:value-type="float" office:value="4301012145" table:style-name="ce10">
            <text:p>4301012145</text:p>
          </table:table-cell>
          <table:table-cell office:value-type="float" office:value="4607091383522" table:number-columns-spanned="2" table:number-rows-spanned="1" table:style-name="ce27">
            <text:p>4607091383522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Докторская Дугушка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50" table:style-name="ce16">
            <text:p>150,00<text:s/></text:p>
          </table:table-cell>
          <table:table-cell office:value-type="float" office:value="153.12" table:formula="of:=IFERROR(IF([.X415]=&quot;&quot;;0;CEILING(([.X415]/[.$H415]);1;1)*[.$H415]);&quot;&quot;)" table:style-name="ce16">
            <text:p>153,12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094</text:p>
          </table:table-cell>
          <table:table-cell office:value-type="string" table:style-name="ce9">
            <text:p>P005073</text:p>
          </table:table-cell>
          <table:table-cell office:value-type="float" office:value="4301012210" table:style-name="ce10">
            <text:p>4301012210</text:p>
          </table:table-cell>
          <table:table-cell office:value-type="float" office:value="4607091383522" table:number-columns-spanned="2" table:number-rows-spanned="1" table:style-name="ce27">
            <text:p>4607091383522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Докторская Дугушка КРУЧЕНАЯ» Весовой п/а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16]=&quot;&quot;;0;CEILING(([.X416]/[.$H416]);1;1)*[.$H416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182</text:p>
          </table:table-cell>
          <table:table-cell office:value-type="string" table:style-name="ce9">
            <text:p>P004406</text:p>
          </table:table-cell>
          <table:table-cell office:value-type="float" office:value="4301011961" table:style-name="ce10">
            <text:p>4301011961</text:p>
          </table:table-cell>
          <table:table-cell office:value-type="float" office:value="4680115885271" table:number-columns-spanned="2" table:number-rows-spanned="1" table:style-name="ce27">
            <text:p>4680115885271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Дугушка со шпиком» Весовой Вектор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17]=&quot;&quot;;0;CEILING(([.X417]/[.$H417]);1;1)*[.$H41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34</text:p>
          </table:table-cell>
          <table:table-cell office:value-type="string" table:style-name="ce9">
            <text:p>P002989</text:p>
          </table:table-cell>
          <table:table-cell office:value-type="float" office:value="4301011376" table:style-name="ce10">
            <text:p>4301011376</text:p>
          </table:table-cell>
          <table:table-cell office:value-type="float" office:value="4680115885226" table:number-columns-spanned="2" table:number-rows-spanned="1" table:style-name="ce27">
            <text:p>4680115885226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Дугушка Стародворская» Вес п/а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18]=&quot;&quot;;0;CEILING(([.X418]/[.$H418]);1;1)*[.$H41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98</text:p>
          </table:table-cell>
          <table:table-cell office:value-type="string" table:style-name="ce9">
            <text:p>P004033</text:p>
          </table:table-cell>
          <table:table-cell office:value-type="float" office:value="4301011774" table:style-name="ce10">
            <text:p>4301011774</text:p>
          </table:table-cell>
          <table:table-cell office:value-type="float" office:value="4680115884502" table:number-columns-spanned="2" table:number-rows-spanned="1" table:style-name="ce27">
            <text:p>4680115884502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Молочная ГОСТ» Весовой п/а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19]=&quot;&quot;;0;CEILING(([.X419]/[.$H419]);1;1)*[.$H419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010</text:p>
          </table:table-cell>
          <table:table-cell office:value-type="string" table:style-name="ce9">
            <text:p>P004030</text:p>
          </table:table-cell>
          <table:table-cell office:value-type="float" office:value="4301011771" table:style-name="ce10">
            <text:p>4301011771</text:p>
          </table:table-cell>
          <table:table-cell office:value-type="float" office:value="4607091389104" table:number-columns-spanned="2" table:number-rows-spanned="1" table:style-name="ce27">
            <text:p>4607091389104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Молочная Дугушка» Весовые Вектор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50" table:style-name="ce16">
            <text:p>50,00<text:s/></text:p>
          </table:table-cell>
          <table:table-cell office:value-type="float" office:value="52.800000000000004" table:formula="of:=IFERROR(IF([.X420]=&quot;&quot;;0;CEILING(([.X420]/[.$H420]);1;1)*[.$H420]);&quot;&quot;)" table:style-name="ce16">
            <text:p>52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847</text:p>
          </table:table-cell>
          <table:table-cell office:value-type="string" table:style-name="ce9">
            <text:p>P004917</text:p>
          </table:table-cell>
          <table:table-cell office:value-type="float" office:value="4301012125" table:style-name="ce10">
            <text:p>4301012125</text:p>
          </table:table-cell>
          <table:table-cell office:value-type="float" office:value="4680115886391" table:number-columns-spanned="2" table:number-rows-spanned="1" table:style-name="ce27">
            <text:p>4680115886391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Докторская» ГОСТ 23670-2019 Фикс.вес 0,4 полиамид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21]=&quot;&quot;;0;CEILING(([.X421]/[.$H421]);1;1)*[.$H42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32</text:p>
          </table:table-cell>
          <table:table-cell office:value-type="string" table:style-name="ce9">
            <text:p>P004689</text:p>
          </table:table-cell>
          <table:table-cell office:value-type="float" office:value="4301012035" table:style-name="ce10">
            <text:p>4301012035</text:p>
          </table:table-cell>
          <table:table-cell office:value-type="float" office:value="4680115880603" table:number-columns-spanned="2" table:number-rows-spanned="1" table:style-name="ce27">
            <text:p>4680115880603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91" table:style-name="ce11">
            <text:p>6,91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Докторская ГОСТ» Фикс.вес 0,6 п/а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.6" table:style-name="ce16">
            <text:p>9,60<text:s/></text:p>
          </table:table-cell>
          <table:table-cell office:value-type="float" office:value="9.6" table:formula="of:=IFERROR(IF([.X422]=&quot;&quot;;0;CEILING(([.X422]/[.$H422]);1;1)*[.$H422]);&quot;&quot;)" table:style-name="ce16">
            <text:p>9,6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35</text:p>
          </table:table-cell>
          <table:table-cell office:value-type="string" table:style-name="ce9">
            <text:p>P004690</text:p>
          </table:table-cell>
          <table:table-cell office:value-type="float" office:value="4301012036" table:style-name="ce10">
            <text:p>4301012036</text:p>
          </table:table-cell>
          <table:table-cell office:value-type="float" office:value="4680115882782" table:number-columns-spanned="2" table:number-rows-spanned="1" table:style-name="ce27">
            <text:p>4680115882782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96" table:style-name="ce11">
            <text:p>6,960</text:p>
          </table:table-cell>
          <table:table-cell office:value-type="float" office:value="120" table:style-name="ce12">
            <text:p>120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Дугушка со шпиком» Фикс.вес 0,6 П/а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23]=&quot;&quot;;0;CEILING(([.X423]/[.$H423]);1;1)*[.$H42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786</text:p>
          </table:table-cell>
          <table:table-cell office:value-type="string" table:style-name="ce9">
            <text:p>P004752</text:p>
          </table:table-cell>
          <table:table-cell office:value-type="float" office:value="4301012050" table:style-name="ce10">
            <text:p>4301012050</text:p>
          </table:table-cell>
          <table:table-cell office:value-type="float" office:value="4680115885479" table:number-columns-spanned="2" table:number-rows-spanned="1" table:style-name="ce27">
            <text:p>4680115885479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Молочная Дугушка» Фикс.вес 0,4 полиамид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24]=&quot;&quot;;0;CEILING(([.X424]/[.$H424]);1;1)*[.$H42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31</text:p>
          </table:table-cell>
          <table:table-cell office:value-type="string" table:style-name="ce9">
            <text:p>P004688</text:p>
          </table:table-cell>
          <table:table-cell office:value-type="float" office:value="4301012034" table:style-name="ce10">
            <text:p>4301012034</text:p>
          </table:table-cell>
          <table:table-cell office:value-type="float" office:value="4607091389982" table:number-columns-spanned="2" table:number-rows-spanned="1" table:style-name="ce27">
            <text:p>4607091389982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91" table:style-name="ce11">
            <text:p>6,91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60" table:style-name="ce12">
            <text:p>60</text:p>
          </table:table-cell>
          <table:table-cell office:value-type="string" table:number-columns-spanned="5" table:number-rows-spanned="1" table:style-name="ce44">
            <text:p>Вареные колбасы «Молочная Дугушка» Фикс.вес 0,6 П/а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9.6" table:style-name="ce16">
            <text:p>9,60<text:s/></text:p>
          </table:table-cell>
          <table:table-cell office:value-type="float" office:value="9.6" table:formula="of:=IFERROR(IF([.X425]=&quot;&quot;;0;CEILING(([.X425]/[.$H425]);1;1)*[.$H425]);&quot;&quot;)" table:style-name="ce16">
            <text:p>9,6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43" table:formula="of:=IFERROR([.Y414]/[.H414];&quot;0&quot;)+IFERROR([.Y415]/[.H415];&quot;0&quot;)+IFERROR([.Y416]/[.H416];&quot;0&quot;)+IFERROR([.Y417]/[.H417];&quot;0&quot;)+IFERROR([.Y418]/[.H418];&quot;0&quot;)+IFERROR([.Y419]/[.H419];&quot;0&quot;)+IFERROR([.Y420]/[.H420];&quot;0&quot;)+IFERROR([.Y421]/[.H421];&quot;0&quot;)+IFERROR([.Y422]/[.H422];&quot;0&quot;)+IFERROR([.Y423]/[.H423];&quot;0&quot;)+IFERROR([.Y424]/[.H424];&quot;0&quot;)+IFERROR([.Y425]/[.H425];&quot;0&quot;)" table:style-name="ce18">
            <text:p>43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25.12" table:formula="of:=IFERROR(SUM([.Y414:.Y425]);&quot;0&quot;)" table:style-name="ce18">
            <text:p>225,12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035</text:p>
          </table:table-cell>
          <table:table-cell office:value-type="string" table:style-name="ce9">
            <text:p>P004460</text:p>
          </table:table-cell>
          <table:table-cell office:value-type="float" office:value="4301020334" table:style-name="ce10">
            <text:p>4301020334</text:p>
          </table:table-cell>
          <table:table-cell office:value-type="float" office:value="4607091388930" table:number-columns-spanned="2" table:number-rows-spanned="1" table:style-name="ce27">
            <text:p>4607091388930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3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28">
            <text:p>Ветчины Дугушка Дугушка Вес б/о Дугушка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350" table:style-name="ce16">
            <text:p>350,00<text:s/></text:p>
          </table:table-cell>
          <table:table-cell office:value-type="float" office:value="353.76" table:formula="of:=IFERROR(IF([.X429]=&quot;&quot;;0;CEILING(([.X429]/[.$H429]);1;1)*[.$H429]);&quot;&quot;)" table:style-name="ce16">
            <text:p>353,76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742</text:p>
          </table:table-cell>
          <table:table-cell office:value-type="string" table:style-name="ce9">
            <text:p>P004757</text:p>
          </table:table-cell>
          <table:table-cell office:value-type="float" office:value="4301020384" table:style-name="ce10">
            <text:p>4301020384</text:p>
          </table:table-cell>
          <table:table-cell office:value-type="float" office:value="4680115886407" table:number-columns-spanned="2" table:number-rows-spanned="1" table:style-name="ce27">
            <text:p>4680115886407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6" table:style-name="ce12">
            <text:p>6</text:p>
          </table:table-cell>
          <table:table-cell office:value-type="float" office:value="2.4" table:style-name="ce11">
            <text:p>2,400</text:p>
          </table:table-cell>
          <table:table-cell office:value-type="float" office:value="2.58" table:style-name="ce11">
            <text:p>2,580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4">
            <text:p>Ветчины «Дугушка» Фикс.вес 0,4 полиамид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30]=&quot;&quot;;0;CEILING(([.X430]/[.$H430]);1;1)*[.$H43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643</text:p>
          </table:table-cell>
          <table:table-cell office:value-type="string" table:style-name="ce9">
            <text:p>P004923</text:p>
          </table:table-cell>
          <table:table-cell office:value-type="float" office:value="4301020385" table:style-name="ce10">
            <text:p>4301020385</text:p>
          </table:table-cell>
          <table:table-cell office:value-type="float" office:value="4680115880054" table:number-columns-spanned="2" table:number-rows-spanned="1" table:style-name="ce27">
            <text:p>4680115880054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91" table:style-name="ce11">
            <text:p>6,91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4">
            <text:p>Ветчины «Дугушка» Фикс.вес 0,6 полиамид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31]=&quot;&quot;;0;CEILING(([.X431]/[.$H431]);1;1)*[.$H43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67" table:formula="of:=IFERROR([.Y429]/[.H429];&quot;0&quot;)+IFERROR([.Y430]/[.H430];&quot;0&quot;)+IFERROR([.Y431]/[.H431];&quot;0&quot;)" table:style-name="ce18">
            <text:p>67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353.76" table:formula="of:=IFERROR(SUM([.Y429:.Y431]);&quot;0&quot;)" table:style-name="ce18">
            <text:p>353,76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150</text:p>
          </table:table-cell>
          <table:table-cell office:value-type="string" table:style-name="ce9">
            <text:p>P004465</text:p>
          </table:table-cell>
          <table:table-cell office:value-type="float" office:value="4301031349" table:style-name="ce10">
            <text:p>4301031349</text:p>
          </table:table-cell>
          <table:table-cell office:value-type="float" office:value="4680115883116" table:number-columns-spanned="2" table:number-rows-spanned="1" table:style-name="ce27">
            <text:p>4680115883116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28">
            <text:p>В/к колбасы «Рубленая Запеченная» Весовые Вектор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20" table:style-name="ce16">
            <text:p>120,00<text:s/></text:p>
          </table:table-cell>
          <table:table-cell office:value-type="float" office:value="121.44000000000001" table:formula="of:=IFERROR(IF([.X435]=&quot;&quot;;0;CEILING(([.X435]/[.$H435]);1;1)*[.$H435]);&quot;&quot;)" table:style-name="ce16">
            <text:p>121,44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158</text:p>
          </table:table-cell>
          <table:table-cell office:value-type="string" table:style-name="ce9">
            <text:p>P004466</text:p>
          </table:table-cell>
          <table:table-cell office:value-type="float" office:value="4301031350" table:style-name="ce10">
            <text:p>4301031350</text:p>
          </table:table-cell>
          <table:table-cell office:value-type="float" office:value="4680115883093" table:number-columns-spanned="2" table:number-rows-spanned="1" table:style-name="ce27">
            <text:p>4680115883093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4">
            <text:p>В/к колбасы «Салями Запеченая» Весовые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50" table:style-name="ce16">
            <text:p>50,00<text:s/></text:p>
          </table:table-cell>
          <table:table-cell office:value-type="float" office:value="52.800000000000004" table:formula="of:=IFERROR(IF([.X436]=&quot;&quot;;0;CEILING(([.X436]/[.$H436]);1;1)*[.$H436]);&quot;&quot;)" table:style-name="ce16">
            <text:p>52,8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151</text:p>
          </table:table-cell>
          <table:table-cell office:value-type="string" table:style-name="ce9">
            <text:p>P004470</text:p>
          </table:table-cell>
          <table:table-cell office:value-type="float" office:value="4301031353" table:style-name="ce10">
            <text:p>4301031353</text:p>
          </table:table-cell>
          <table:table-cell office:value-type="float" office:value="4680115883109" table:number-columns-spanned="2" table:number-rows-spanned="1" table:style-name="ce27">
            <text:p>4680115883109</text:p>
          </table:table-cell>
          <table:covered-table-cell/>
          <table:table-cell office:value-type="float" office:value="0.88" table:style-name="ce11">
            <text:p>0,880</text:p>
          </table:table-cell>
          <table:table-cell office:value-type="float" office:value="6" table:style-name="ce12">
            <text:p>6</text:p>
          </table:table-cell>
          <table:table-cell office:value-type="float" office:value="5.28" table:style-name="ce11">
            <text:p>5,280</text:p>
          </table:table-cell>
          <table:table-cell office:value-type="float" office:value="5.63" table:style-name="ce11">
            <text:p>5,630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4">
            <text:p>В/к колбасы «Сервелат Запеченный» Весовые Вектор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37]=&quot;&quot;;0;CEILING(([.X437]/[.$H437]);1;1)*[.$H43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16</text:p>
          </table:table-cell>
          <table:table-cell office:value-type="string" table:style-name="ce9">
            <text:p>P004934</text:p>
          </table:table-cell>
          <table:table-cell office:value-type="float" office:value="4301031419" table:style-name="ce10">
            <text:p>4301031419</text:p>
          </table:table-cell>
          <table:table-cell office:value-type="float" office:value="4680115882072" table:number-columns-spanned="2" table:number-rows-spanned="1" table:style-name="ce27">
            <text:p>4680115882072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91" table:style-name="ce11">
            <text:p>6,91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4">
            <text:p>В/к колбасы «Рубленая Запеченная» Фикс.вес 0,6 вектор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9.2" table:style-name="ce16">
            <text:p>19,20<text:s/></text:p>
          </table:table-cell>
          <table:table-cell office:value-type="float" office:value="19.2" table:formula="of:=IFERROR(IF([.X438]=&quot;&quot;;0;CEILING(([.X438]/[.$H438]);1;1)*[.$H438]);&quot;&quot;)" table:style-name="ce16">
            <text:p>19,2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19</text:p>
          </table:table-cell>
          <table:table-cell office:value-type="string" table:style-name="ce9">
            <text:p>P004930</text:p>
          </table:table-cell>
          <table:table-cell office:value-type="float" office:value="4301031418" table:style-name="ce10">
            <text:p>4301031418</text:p>
          </table:table-cell>
          <table:table-cell office:value-type="float" office:value="4680115882102" table:number-columns-spanned="2" table:number-rows-spanned="1" table:style-name="ce27">
            <text:p>4680115882102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67" table:style-name="ce11">
            <text:p>6,67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4">
            <text:p>Копченые колбасы «Салями Запеченая» Фикс.вес 0,6 вектор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4.4" table:style-name="ce16">
            <text:p>14,40<text:s/></text:p>
          </table:table-cell>
          <table:table-cell office:value-type="float" office:value="14.399999999999999" table:formula="of:=IFERROR(IF([.X439]=&quot;&quot;;0;CEILING(([.X439]/[.$H439]);1;1)*[.$H439]);&quot;&quot;)" table:style-name="ce16">
            <text:p>14,4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18</text:p>
          </table:table-cell>
          <table:table-cell office:value-type="string" table:style-name="ce9">
            <text:p>P004929</text:p>
          </table:table-cell>
          <table:table-cell office:value-type="float" office:value="4301031417" table:style-name="ce10">
            <text:p>4301031417</text:p>
          </table:table-cell>
          <table:table-cell office:value-type="float" office:value="4680115882096" table:number-columns-spanned="2" table:number-rows-spanned="1" table:style-name="ce27">
            <text:p>4680115882096</text:p>
          </table:table-cell>
          <table:covered-table-cell/>
          <table:table-cell office:value-type="float" office:value="0.6" table:style-name="ce11">
            <text:p>0,600</text:p>
          </table:table-cell>
          <table:table-cell office:value-type="float" office:value="8" table:style-name="ce12">
            <text:p>8</text:p>
          </table:table-cell>
          <table:table-cell office:value-type="float" office:value="4.8" table:style-name="ce11">
            <text:p>4,800</text:p>
          </table:table-cell>
          <table:table-cell office:value-type="float" office:value="6.67" table:style-name="ce11">
            <text:p>6,67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70" table:style-name="ce12">
            <text:p>70</text:p>
          </table:table-cell>
          <table:table-cell office:value-type="string" table:number-columns-spanned="5" table:number-rows-spanned="1" table:style-name="ce44">
            <text:p>В/к колбасы «Сервелат Запеченный» Фикс.вес 0,6 вектор ТМ «Стародворь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19.2" table:style-name="ce16">
            <text:p>19,20<text:s/></text:p>
          </table:table-cell>
          <table:table-cell office:value-type="float" office:value="19.2" table:formula="of:=IFERROR(IF([.X440]=&quot;&quot;;0;CEILING(([.X440]/[.$H440]);1;1)*[.$H440]);&quot;&quot;)" table:style-name="ce16">
            <text:p>19,2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44" table:formula="of:=IFERROR([.Y435]/[.H435];&quot;0&quot;)+IFERROR([.Y436]/[.H436];&quot;0&quot;)+IFERROR([.Y437]/[.H437];&quot;0&quot;)+IFERROR([.Y438]/[.H438];&quot;0&quot;)+IFERROR([.Y439]/[.H439];&quot;0&quot;)+IFERROR([.Y440]/[.H440];&quot;0&quot;)" table:style-name="ce18">
            <text:p>44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227.04" table:formula="of:=IFERROR(SUM([.Y435:.Y440]);&quot;0&quot;)" table:style-name="ce18">
            <text:p>227,04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146</text:p>
          </table:table-cell>
          <table:table-cell office:value-type="string" table:style-name="ce9">
            <text:p>P002319</text:p>
          </table:table-cell>
          <table:table-cell office:value-type="float" office:value="4301051064" table:style-name="ce10">
            <text:p>4301051064</text:p>
          </table:table-cell>
          <table:table-cell office:value-type="float" office:value="4680115883536" table:number-columns-spanned="2" table:number-rows-spanned="1" table:style-name="ce27">
            <text:p>4680115883536</text:p>
          </table:table-cell>
          <table:covered-table-cell/>
          <table:table-cell office:value-type="float" office:value="0.3" table:style-name="ce11">
            <text:p>0,300</text:p>
          </table:table-cell>
          <table:table-cell office:value-type="float" office:value="6" table:style-name="ce12">
            <text:p>6</text:p>
          </table:table-cell>
          <table:table-cell office:value-type="float" office:value="1.8" table:style-name="ce11">
            <text:p>1,800</text:p>
          </table:table-cell>
          <table:table-cell office:value-type="float" office:value="2.0459999999999998" table:style-name="ce11">
            <text:p>2,046</text:p>
          </table:table-cell>
          <table:table-cell office:value-type="float" office:value="182" table:style-name="ce12">
            <text:p>182</text:p>
          </table:table-cell>
          <table:table-cell office:value-type="string" table:style-name="ce12">
            <text:p>14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Молочные Дугушки» ф/в 0,3 амицел ТМ «Дугушка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44]=&quot;&quot;;0;CEILING(([.X444]/[.$H444]);1;1)*[.$H444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444]/[.H444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444:.Y444]);&quot;0&quot;)" table:style-name="ce18">
            <text:p>0,00<text:s/></text:p>
          </table:table-cell>
          <table:table-cell table:number-columns-repeated="16359"/>
        </table:table-row>
        <table:table-row table:number-rows-repeated="2" table:style-name="ro1">
          <table:table-cell office:value-type="string" table:style-name="ce4">
            <text:p>Зареченские продукт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ар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3290</text:p>
          </table:table-cell>
          <table:table-cell office:value-type="string" table:style-name="ce9">
            <text:p>P004000</text:p>
          </table:table-cell>
          <table:table-cell office:value-type="float" office:value="4301011763" table:style-name="ce10">
            <text:p>4301011763</text:p>
          </table:table-cell>
          <table:table-cell office:value-type="float" office:value="4640242181011" table:number-columns-spanned="2" table:number-rows-spanned="1" table:style-name="ce27">
            <text:p>4640242181011</text:p>
          </table:table-cell>
          <table:covered-table-cell/>
          <table:table-cell office:value-type="float" office:value="1.35" table:style-name="ce11">
            <text:p>1,350</text:p>
          </table:table-cell>
          <table:table-cell office:value-type="float" office:value="8" table:style-name="ce12">
            <text:p>8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28">
            <text:p>Вареные колбасы «Молочная» Весовой п/а ТМ «Зареченски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50]=&quot;&quot;;0;CEILING(([.X450]/[.$H450]);1;1)*[.$H450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07</text:p>
          </table:table-cell>
          <table:table-cell office:value-type="string" table:style-name="ce9">
            <text:p>P003583</text:p>
          </table:table-cell>
          <table:table-cell office:value-type="float" office:value="4301011585" table:style-name="ce10">
            <text:p>4301011585</text:p>
          </table:table-cell>
          <table:table-cell office:value-type="float" office:value="4640242180441" table:number-columns-spanned="2" table:number-rows-spanned="1" table:style-name="ce27">
            <text:p>4640242180441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1">
            <text:p>12,000</text:p>
          </table:table-cell>
          <table:table-cell office:value-type="float" office:value="12.41" table:style-name="ce11">
            <text:p>12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«Муромская» Весовой п/а ТМ «Зареченски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51]=&quot;&quot;;0;CEILING(([.X451]/[.$H451]);1;1)*[.$H45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08</text:p>
          </table:table-cell>
          <table:table-cell office:value-type="string" table:style-name="ce9">
            <text:p>P003582</text:p>
          </table:table-cell>
          <table:table-cell office:value-type="float" office:value="4301011584" table:style-name="ce10">
            <text:p>4301011584</text:p>
          </table:table-cell>
          <table:table-cell office:value-type="float" office:value="4640242180564" table:number-columns-spanned="2" table:number-rows-spanned="1" table:style-name="ce27">
            <text:p>4640242180564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1">
            <text:p>12,000</text:p>
          </table:table-cell>
          <table:table-cell office:value-type="float" office:value="12.41" table:style-name="ce11">
            <text:p>12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ареные колбасы «Нежная» НТУ Весовые П/а ТМ «Зареченски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52]=&quot;&quot;;0;CEILING(([.X452]/[.$H452]);1;1)*[.$H45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3296</text:p>
          </table:table-cell>
          <table:table-cell office:value-type="string" table:style-name="ce9">
            <text:p>P004002</text:p>
          </table:table-cell>
          <table:table-cell office:value-type="float" office:value="4301011764" table:style-name="ce10">
            <text:p>4301011764</text:p>
          </table:table-cell>
          <table:table-cell office:value-type="float" office:value="4640242181189" table:number-columns-spanned="2" table:number-rows-spanned="1" table:style-name="ce27">
            <text:p>4640242181189</text:p>
          </table:table-cell>
          <table:covered-table-cell/>
          <table:table-cell office:value-type="float" office:value="0.4" table:style-name="ce11">
            <text:p>0,40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1">
            <text:p>4,000</text:p>
          </table:table-cell>
          <table:table-cell office:value-type="float" office:value="4.1900000000000004" table:style-name="ce11">
            <text:p>4,19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55" table:style-name="ce12">
            <text:p>55</text:p>
          </table:table-cell>
          <table:table-cell office:value-type="string" table:number-columns-spanned="5" table:number-rows-spanned="1" table:style-name="ce44">
            <text:p>Вареные колбасы «Молочная» Фикс.вес 0,4 п/а ТМ «Зареченски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53]=&quot;&quot;;0;CEILING(([.X453]/[.$H453]);1;1)*[.$H45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450]/[.H450];&quot;0&quot;)+IFERROR([.Y451]/[.H451];&quot;0&quot;)+IFERROR([.Y452]/[.H452];&quot;0&quot;)+IFERROR([.Y453]/[.H453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450:.Y453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06</text:p>
          </table:table-cell>
          <table:table-cell office:value-type="string" table:style-name="ce9">
            <text:p>P005012</text:p>
          </table:table-cell>
          <table:table-cell office:value-type="float" office:value="4301020400" table:style-name="ce10">
            <text:p>4301020400</text:p>
          </table:table-cell>
          <table:table-cell office:value-type="float" office:value="4640242180519" table:number-columns-spanned="2" table:number-rows-spanned="1" table:style-name="ce27">
            <text:p>4640242180519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1">
            <text:p>12,000</text:p>
          </table:table-cell>
          <table:table-cell office:value-type="float" office:value="12.41" table:style-name="ce11">
            <text:p>12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етчины «Нежная» Весовой п/а ТМ «Зареченские продукты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57]=&quot;&quot;;0;CEILING(([.X457]/[.$H457]);1;1)*[.$H45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11</text:p>
          </table:table-cell>
          <table:table-cell office:value-type="string" table:style-name="ce9">
            <text:p>P003588</text:p>
          </table:table-cell>
          <table:table-cell office:value-type="float" office:value="4301020260" table:style-name="ce10">
            <text:p>4301020260</text:p>
          </table:table-cell>
          <table:table-cell office:value-type="float" office:value="4640242180526" table:number-columns-spanned="2" table:number-rows-spanned="1" table:style-name="ce27">
            <text:p>4640242180526</text:p>
          </table:table-cell>
          <table:covered-table-cell/>
          <table:table-cell office:value-type="float" office:value="1.8" table:style-name="ce11">
            <text:p>1,800</text:p>
          </table:table-cell>
          <table:table-cell office:value-type="float" office:value="6" table:style-name="ce12">
            <text:p>6</text:p>
          </table:table-cell>
          <table:table-cell office:value-type="float" office:value="10.8" table:style-name="ce11">
            <text:p>10,800</text:p>
          </table:table-cell>
          <table:table-cell office:value-type="float" office:value="11.21" table:style-name="ce11">
            <text:p>11,2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44">
            <text:p>Ветчины «Нежная» Весовой п/а ТМ «Зареченские» большой батон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58]=&quot;&quot;;0;CEILING(([.X458]/[.$H458]);1;1)*[.$H458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457]/[.H457];&quot;0&quot;)+IFERROR([.Y458]/[.H458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457:.Y458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Копченые колбас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809</text:p>
          </table:table-cell>
          <table:table-cell office:value-type="string" table:style-name="ce9">
            <text:p>P003586</text:p>
          </table:table-cell>
          <table:table-cell office:value-type="float" office:value="4301031244" table:style-name="ce10">
            <text:p>4301031244</text:p>
          </table:table-cell>
          <table:table-cell office:value-type="float" office:value="4640242180595" table:number-columns-spanned="2" table:number-rows-spanned="1" table:style-name="ce27">
            <text:p>4640242180595</text:p>
          </table:table-cell>
          <table:covered-table-cell/>
          <table:table-cell office:value-type="float" office:value="0.7" table:style-name="ce11">
            <text:p>0,700</text:p>
          </table:table-cell>
          <table:table-cell office:value-type="float" office:value="6" table:style-name="ce12">
            <text:p>6</text:p>
          </table:table-cell>
          <table:table-cell office:value-type="float" office:value="4.2" table:style-name="ce11">
            <text:p>4,200</text:p>
          </table:table-cell>
          <table:table-cell office:value-type="float" office:value="4.45" table:style-name="ce11">
            <text:p>4,4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Короб, мин. 12</text:p>
          </table:table-cell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В/к колбасы «Сервелат Рижский» НТУ Весовые Фиброуз в/у ТМ «Зареченские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office:value-type="float" office:value="80" table:style-name="ce16">
            <text:p>80,00<text:s/></text:p>
          </table:table-cell>
          <table:table-cell office:value-type="float" office:value="84" table:formula="of:=IFERROR(IF([.X462]=&quot;&quot;;0;CEILING(([.X462]/[.$H462]);1;1)*[.$H462]);&quot;&quot;)" table:style-name="ce16">
            <text:p>84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809</text:p>
          </table:table-cell>
          <table:table-cell office:value-type="string" table:style-name="ce9">
            <text:p>P005250</text:p>
          </table:table-cell>
          <table:table-cell office:value-type="float" office:value="4301031467" table:style-name="ce10">
            <text:p>4301031467</text:p>
          </table:table-cell>
          <table:table-cell office:value-type="float" office:value="4640242180595" table:number-columns-spanned="2" table:number-rows-spanned="1" table:style-name="ce27">
            <text:p>4640242180595</text:p>
          </table:table-cell>
          <table:covered-table-cell/>
          <table:table-cell office:value-type="float" office:value="0.8" table:style-name="ce11">
            <text:p>0,800</text:p>
          </table:table-cell>
          <table:table-cell office:value-type="float" office:value="6" table:style-name="ce12">
            <text:p>6</text:p>
          </table:table-cell>
          <table:table-cell office:value-type="float" office:value="4.8" table:style-name="ce11">
            <text:p>4,800</text:p>
          </table:table-cell>
          <table:table-cell office:value-type="float" office:value="5.05" table:style-name="ce11">
            <text:p>5,050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12</text:p>
          </table:table-cell>
          <table:table-cell table:style-name="ce12"/>
          <table:table-cell office:value-type="string" table:style-name="ce13">
            <text:p>СК2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Копченые колбасы «Сервелат Рижский» Весовой фиброуз ТМ «Зареченские продукты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63]=&quot;&quot;;0;CEILING(([.X463]/[.$H463]);1;1)*[.$H463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20" table:formula="of:=IFERROR([.Y462]/[.H462];&quot;0&quot;)+IFERROR([.Y463]/[.H463];&quot;0&quot;)" table:style-name="ce18">
            <text:p>2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84" table:formula="of:=IFERROR(SUM([.Y462:.Y463]);&quot;0&quot;)" table:style-name="ce18">
            <text:p>84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осис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655</text:p>
          </table:table-cell>
          <table:table-cell office:value-type="string" table:style-name="ce9">
            <text:p>P004991</text:p>
          </table:table-cell>
          <table:table-cell office:value-type="float" office:value="4301052046" table:style-name="ce10">
            <text:p>4301052046</text:p>
          </table:table-cell>
          <table:table-cell office:value-type="float" office:value="4640242180533" table:number-columns-spanned="2" table:number-rows-spanned="1" table:style-name="ce27">
            <text:p>4640242180533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4939999999999998" table:style-name="ce11">
            <text:p>9,494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office:value-type="string" table:style-name="ce12">
            <text:p>Короб, мин. 8</text:p>
          </table:table-cell>
          <table:table-cell office:value-type="string" table:style-name="ce13">
            <text:p>СК4</text:p>
          </table:table-cell>
          <table:table-cell table:style-name="ce13"/>
          <table:table-cell office:value-type="float" office:value="45" table:style-name="ce12">
            <text:p>45</text:p>
          </table:table-cell>
          <table:table-cell office:value-type="string" table:number-columns-spanned="5" table:number-rows-spanned="1" table:style-name="ce28">
            <text:p>Сосиски «Датские» Весовой п/а ТМ «Зареченские продукты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67]=&quot;&quot;;0;CEILING(([.X467]/[.$H467]);1;1)*[.$H46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467]/[.H467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467:.Y467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Сардельки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70</text:p>
          </table:table-cell>
          <table:table-cell office:value-type="string" table:style-name="ce9">
            <text:p>P004925</text:p>
          </table:table-cell>
          <table:table-cell office:value-type="float" office:value="4301060491" table:style-name="ce10">
            <text:p>4301060491</text:p>
          </table:table-cell>
          <table:table-cell office:value-type="float" office:value="4640242180120" table:number-columns-spanned="2" table:number-rows-spanned="1" table:style-name="ce27">
            <text:p>4640242180120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41" table:style-name="ce11">
            <text:p>9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28">
            <text:p>Сардельки «Зареченские» Весовой полиамид ТМ «Зареченские продукты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71]=&quot;&quot;;0;CEILING(([.X471]/[.$H471]);1;1)*[.$H471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SU002971</text:p>
          </table:table-cell>
          <table:table-cell office:value-type="string" table:style-name="ce9">
            <text:p>P004927</text:p>
          </table:table-cell>
          <table:table-cell office:value-type="float" office:value="4301060493" table:style-name="ce10">
            <text:p>4301060493</text:p>
          </table:table-cell>
          <table:table-cell office:value-type="float" office:value="4640242180137" table:number-columns-spanned="2" table:number-rows-spanned="1" table:style-name="ce27">
            <text:p>4640242180137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1">
            <text:p>9,000</text:p>
          </table:table-cell>
          <table:table-cell office:value-type="float" office:value="9.41" table:style-name="ce11">
            <text:p>9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3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string" table:number-columns-spanned="5" table:number-rows-spanned="1" table:style-name="ce44">
            <text:p>Сардельки «Шпикачки Зареченские» Весовой полиамид ТМ «Зареченские продукты»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72]=&quot;&quot;;0;CEILING(([.X472]/[.$H472]);1;1)*[.$H472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471]/[.H471];&quot;0&quot;)+IFERROR([.Y472]/[.H472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471:.Y472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Зареченские продукты Светофор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4">
            <text:p>Ветчины</text:p>
          </table:table-cell>
          <table:table-cell table:number-columns-repeated="8" table:style-name="ce5"/>
          <table:table-cell table:number-columns-repeated="5" table:style-name="ce6"/>
          <table:table-cell table:style-name="ce5"/>
          <table:table-cell table:number-columns-repeated="2" table:style-name="ce7"/>
          <table:table-cell table:number-columns-repeated="2" table:style-name="ce4"/>
          <table:table-cell table:number-columns-repeated="4" table:style-name="ce8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style-name="ce9">
            <text:p>SU002967</text:p>
          </table:table-cell>
          <table:table-cell office:value-type="string" table:style-name="ce9">
            <text:p>P004317</text:p>
          </table:table-cell>
          <table:table-cell office:value-type="float" office:value="4301020314" table:style-name="ce10">
            <text:p>4301020314</text:p>
          </table:table-cell>
          <table:table-cell office:value-type="float" office:value="4640242180090" table:number-columns-spanned="2" table:number-rows-spanned="1" table:style-name="ce27">
            <text:p>4640242180090</text:p>
          </table:table-cell>
          <table:covered-table-cell/>
          <table:table-cell office:value-type="float" office:value="1.5" table:style-name="ce11">
            <text:p>1,500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1">
            <text:p>12,000</text:p>
          </table:table-cell>
          <table:table-cell office:value-type="float" office:value="12.41" table:style-name="ce11">
            <text:p>12,410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8</text:p>
          </table:table-cell>
          <table:table-cell table:style-name="ce12"/>
          <table:table-cell office:value-type="string" table:style-name="ce13">
            <text:p>СК1</text:p>
          </table:table-cell>
          <table:table-cell table:style-name="ce13"/>
          <table:table-cell office:value-type="float" office:value="50" table:style-name="ce12">
            <text:p>50</text:p>
          </table:table-cell>
          <table:table-cell office:value-type="string" table:number-columns-spanned="5" table:number-rows-spanned="1" table:style-name="ce28">
            <text:p>Ветчины «Рубленая» Весовой п/а ТМ «Зареченские» НТУ HR</text:p>
          </table:table-cell>
          <table:covered-table-cell table:number-columns-repeated="4"/>
          <table:table-cell table:number-columns-repeated="2" table:style-name="ce14"/>
          <table:table-cell office:value-type="string" table:style-name="ce15">
            <text:p>кг</text:p>
          </table:table-cell>
          <table:table-cell table:style-name="ce16"/>
          <table:table-cell office:value-type="float" office:value="0" table:formula="of:=IFERROR(IF([.X477]=&quot;&quot;;0;CEILING(([.X477]/[.$H477]);1;1)*[.$H477]);&quot;&quot;)" table:style-name="ce16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2" table:style-name="ce42"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ор</text:p>
          </table:table-cell>
          <table:table-cell table:style-name="ce18"/>
          <table:table-cell office:value-type="float" office:value="0" table:formula="of:=IFERROR([.Y477]/[.H477];&quot;0&quot;)" table:style-name="ce18">
            <text:p>0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0">
            <text:p>Итог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IFERROR(SUM([.Y477:.Y477]);&quot;0&quot;)" table:style-name="ce18">
            <text:p>0,00<text:s/></text:p>
          </table:table-cell>
          <table:table-cell table:number-columns-repeated="16359"/>
        </table:table-row>
        <table:table-row table:style-name="ro1">
          <table:table-cell table:number-columns-spanned="15" table:number-rows-spanned="6" table:style-name="ce32"/>
          <table:covered-table-cell table:number-columns-repeated="14"/>
          <table:table-cell office:value-type="string" table:number-columns-spanned="7" table:number-rows-spanned="1" table:style-name="ce43">
            <text:p>ИТОГО НЕТТ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10777.51" table:formula="of:=IFERROR([.Y9]+[.Y17]+[.Y21]+[.Y29]+[.Y33]+[.Y43]+[.Y49]+[.Y54]+[.Y61]+[.Y66]+[.Y74]+[.Y81]+[.Y90]+[.Y97]+[.Y104]+[.Y108]+[.Y114]+[.Y119]+[.Y124]+[.Y130]+[.Y139]+[.Y143]+[.Y149]+[.Y166]+[.Y172]+[.Y176]+[.Y182]+[.Y187]+[.Y198]+[.Y210]+[.Y215]+[.Y228]+[.Y232]+[.Y236]+[.Y244]+[.Y253]+[.Y261]+[.Y268]+[.Y274]+[.Y279]+[.Y289]+[.Y298]+[.Y305]+[.Y311]+[.Y318]+[.Y324]+[.Y331]+[.Y343]+[.Y348]+[.Y353]+[.Y357]+[.Y363]+[.Y368]+[.Y374]+[.Y388]+[.Y393]+[.Y398]+[.Y405]+[.Y410]+[.Y427]+[.Y433]+[.Y442]+[.Y446]+[.Y455]+[.Y460]+[.Y465]+[.Y469]+[.Y474]+[.Y479];&quot;0&quot;)" table:style-name="ce18">
            <text:p>10 777,51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3">
            <text:p>ИТОГО БРУТТО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3692.6119999999996" table:formula="of:=[.Y6]/[.H6]*[.I6]+[.Y7]/[.H7]*[.I7]+[.Y11]/[.H11]*[.I11]+[.Y12]/[.H12]*[.I12]+[.Y13]/[.H13]*[.I13]+[.Y14]/[.H14]*[.I14]+[.Y15]/[.H15]*[.I15]+[.Y19]/[.H19]*[.I19]+[.Y25]/[.H25]*[.I25]+[.Y26]/[.H26]*[.I26]+[.Y27]/[.H27]*[.I27]+[.Y31]/[.H31]*[.I31]+[.Y36]/[.H36]*[.I36]+[.Y37]/[.H37]*[.I37]+[.Y38]/[.H38]*[.I38]+[.Y39]/[.H39]*[.I39]+[.Y40]/[.H40]*[.I40]+[.Y41]/[.H41]*[.I41]+[.Y45]/[.H45]*[.I45]+[.Y46]/[.H46]*[.I46]+[.Y47]/[.H47]*[.I47]+[.Y51]/[.H51]*[.I51]+[.Y52]/[.H52]*[.I52]+[.Y56]/[.H56]*[.I56]+[.Y57]/[.H57]*[.I57]+[.Y58]/[.H58]*[.I58]+[.Y59]/[.H59]*[.I59]+[.Y63]/[.H63]*[.I63]+[.Y64]/[.H64]*[.I64]+[.Y69]/[.H69]*[.I69]+[.Y70]/[.H70]*[.I70]+[.Y71]/[.H71]*[.I71]+[.Y72]/[.H72]*[.I72]+[.Y76]/[.H76]*[.I76]+[.Y77]/[.H77]*[.I77]+[.Y78]/[.H78]*[.I78]+[.Y79]/[.H79]*[.I79]+[.Y84]/[.H84]*[.I84]+[.Y85]/[.H85]*[.I85]+[.Y86]/[.H86]*[.I86]+[.Y87]/[.H87]*[.I87]+[.Y88]/[.H88]*[.I88]+[.Y92]/[.H92]*[.I92]+[.Y93]/[.H93]*[.I93]+[.Y94]/[.H94]*[.I94]+[.Y95]/[.H95]*[.I95]+[.Y99]/[.H99]*[.I99]+[.Y100]/[.H100]*[.I100]+[.Y101]/[.H101]*[.I101]+[.Y102]/[.H102]*[.I102]+[.Y106]/[.H106]*[.I106]+[.Y111]/[.H111]*[.I111]+[.Y112]/[.H112]*[.I112]+[.Y116]/[.H116]*[.I116]+[.Y117]/[.H117]*[.I117]+[.Y121]/[.H121]*[.I121]+[.Y122]/[.H122]*[.I122]+[.Y127]/[.H127]*[.I127]+[.Y128]/[.H128]*[.I128]+[.Y132]/[.H132]*[.I132]+[.Y133]/[.H133]*[.I133]+[.Y134]/[.H134]*[.I134]+[.Y135]/[.H135]*[.I135]+[.Y136]/[.H136]*[.I136]+[.Y137]/[.H137]*[.I137]+[.Y141]/[.H141]*[.I141]+[.Y147]/[.H147]*[.I147]+[.Y151]/[.H151]*[.I151]+[.Y152]/[.H152]*[.I152]+[.Y153]/[.H153]*[.I153]+[.Y154]/[.H154]*[.I154]+[.Y155]/[.H155]*[.I155]+[.Y156]/[.H156]*[.I156]+[.Y157]/[.H157]*[.I157]+[.Y158]/[.H158]*[.I158]+[.Y159]/[.H159]*[.I159]+[.Y160]/[.H160]*[.I160]+[.Y161]/[.H161]*[.I161]+[.Y162]/[.H162]*[.I162]+[.Y163]/[.H163]*[.I163]+[.Y164]/[.H164]*[.I164]+[.Y168]/[.H168]*[.I168]+[.Y169]/[.H169]*[.I169]+[.Y170]/[.H170]*[.I170]+[.Y174]/[.H174]*[.I174]+[.Y179]" table:style-name="ce18">
            <text:p>3 692,61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3">
            <text:p>Кол-во паллет</text:p>
          </table:table-cell>
          <table:covered-table-cell table:number-columns-repeated="6"/>
          <table:table-cell office:value-type="string" table:style-name="ce17">
            <text:p>шт</text:p>
          </table:table-cell>
          <table:table-cell table:style-name="ce19"/>
          <table:table-cell office:value-type="string" table:style-name="ce19">
            <text:p>Ошибка:508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3">
            <text:p>Вес брутто <text:s/>с паллетами</text:p>
          </table:table-cell>
          <table:covered-table-cell table:number-columns-repeated="6"/>
          <table:table-cell office:value-type="string" table:style-name="ce17">
            <text:p>кг</text:p>
          </table:table-cell>
          <table:table-cell table:style-name="ce18"/>
          <table:table-cell office:value-type="float" office:value="0" table:formula="of:=[.Y481]+[.Y482]*25" table:style-name="ce18">
            <text:p>#ЗНАЧ!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3">
            <text:p>Кол-во коробок</text:p>
          </table:table-cell>
          <table:covered-table-cell table:number-columns-repeated="6"/>
          <table:table-cell office:value-type="string" table:style-name="ce17">
            <text:p>шт</text:p>
          </table:table-cell>
          <table:table-cell table:style-name="ce18"/>
          <table:table-cell office:value-type="float" office:value="2233" table:formula="of:=IFERROR([.Y8]+[.Y16]+[.Y20]+[.Y28]+[.Y32]+[.Y42]+[.Y48]+[.Y53]+[.Y60]+[.Y65]+[.Y73]+[.Y80]+[.Y89]+[.Y96]+[.Y103]+[.Y107]+[.Y113]+[.Y118]+[.Y123]+[.Y129]+[.Y138]+[.Y142]+[.Y148]+[.Y165]+[.Y171]+[.Y175]+[.Y181]+[.Y186]+[.Y197]+[.Y209]+[.Y214]+[.Y227]+[.Y231]+[.Y235]+[.Y243]+[.Y252]+[.Y260]+[.Y267]+[.Y273]+[.Y278]+[.Y288]+[.Y297]+[.Y304]+[.Y310]+[.Y317]+[.Y323]+[.Y330]+[.Y342]+[.Y347]+[.Y352]+[.Y356]+[.Y362]+[.Y367]+[.Y373]+[.Y387]+[.Y392]+[.Y397]+[.Y404]+[.Y409]+[.Y426]+[.Y432]+[.Y441]+[.Y445]+[.Y454]+[.Y459]+[.Y464]+[.Y468]+[.Y473]+[.Y478];&quot;0&quot;)" table:style-name="ce18">
            <text:p>2 233,00<text:s/></text:p>
          </table:table-cell>
          <table:table-cell table:number-columns-repeated="16359"/>
        </table:table-row>
        <table:table-row table:style-name="ro1">
          <table:covered-table-cell/>
          <table:covered-table-cell table:number-columns-repeated="14"/>
          <table:table-cell office:value-type="string" table:number-columns-spanned="7" table:number-rows-spanned="1" table:style-name="ce33">
            <text:p>Объем заказа</text:p>
          </table:table-cell>
          <table:covered-table-cell table:number-columns-repeated="6"/>
          <table:table-cell office:value-type="string" table:style-name="ce17">
            <text:p><text:span text:style-name="T1">м3</text:span></text:p>
          </table:table-cell>
          <table:table-cell table:number-columns-repeated="2" table:style-name="ce17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ТОРГОВАЯ МАРКА</text:p>
          </table:table-cell>
          <table:table-cell office:value-type="string" table:style-name="ce21">
            <text:p>Ядрена копоть</text:p>
          </table:table-cell>
          <table:table-cell office:value-type="string" table:number-columns-spanned="6" table:number-rows-spanned="1" table:style-name="ce37">
            <text:p>Вязанка</text:p>
          </table:table-cell>
          <table:covered-table-cell table:number-columns-repeated="5"/>
          <table:table-cell office:value-type="string" table:number-columns-spanned="10" table:number-rows-spanned="1" table:style-name="ce41">
            <text:p>Стародворье</text:p>
          </table:table-cell>
          <table:covered-table-cell table:number-columns-repeated="9"/>
          <table:table-cell office:value-type="string" table:number-columns-spanned="2" table:number-rows-spanned="1" table:style-name="ce37">
            <text:p>Особый рецепт</text:p>
          </table:table-cell>
          <table:covered-table-cell/>
          <table:table-cell office:value-type="string" table:number-columns-spanned="3" table:number-rows-spanned="1" table:style-name="ce39">
            <text:p>Баварушка</text:p>
          </table:table-cell>
          <table:covered-table-cell table:number-columns-repeated="2"/>
          <table:table-cell table:number-columns-repeated="2" table:style-name="ce4"/>
          <table:table-cell table:number-columns-repeated="16359"/>
        </table:table-row>
        <table:table-row table:style-name="ro1">
          <table:table-cell office:value-type="string" table:number-columns-spanned="1" table:number-rows-spanned="2" table:style-name="ce40">
            <text:p>СЕРИЯ</text:p>
          </table:table-cell>
          <table:table-cell office:value-type="string" table:number-columns-spanned="1" table:number-rows-spanned="2" table:style-name="ce37">
            <text:p>Ядрена копоть</text:p>
          </table:table-cell>
          <table:table-cell office:value-type="string" table:number-columns-spanned="1" table:number-rows-spanned="2" table:style-name="ce37">
            <text:p>ГОСТ</text:p>
          </table:table-cell>
          <table:table-cell office:value-type="string" table:number-columns-spanned="1" table:number-rows-spanned="2" table:style-name="ce37">
            <text:p>Филейская</text:p>
          </table:table-cell>
          <table:table-cell office:value-type="string" table:number-columns-spanned="1" table:number-rows-spanned="2" table:style-name="ce37">
            <text:p>Молокуша</text:p>
          </table:table-cell>
          <table:table-cell office:value-type="string" table:number-columns-spanned="1" table:number-rows-spanned="2" table:style-name="ce37">
            <text:p>Сливушка</text:p>
          </table:table-cell>
          <table:table-cell office:value-type="string" table:number-columns-spanned="1" table:number-rows-spanned="2" table:style-name="ce37">
            <text:p>Халяль</text:p>
          </table:table-cell>
          <table:table-cell office:value-type="string" table:number-columns-spanned="1" table:number-rows-spanned="2" table:style-name="ce37">
            <text:p>Вязанка</text:p>
          </table:table-cell>
          <table:table-cell office:value-type="string" table:number-columns-spanned="1" table:number-rows-spanned="2" table:style-name="ce37">
            <text:p>Мясорубская</text:p>
          </table:table-cell>
          <table:table-cell office:value-type="string" table:number-columns-spanned="1" table:number-rows-spanned="2" table:style-name="ce37">
            <text:p>Сочинка</text:p>
          </table:table-cell>
          <table:table-cell office:value-type="string" table:number-columns-spanned="1" table:number-rows-spanned="2" table:style-name="ce37">
            <text:p>Стародворская</text:p>
          </table:table-cell>
          <table:table-cell office:value-type="string" table:number-columns-spanned="1" table:number-rows-spanned="2" table:style-name="ce37">
            <text:p>Филедворская по-стародворски</text:p>
          </table:table-cell>
          <table:table-cell office:value-type="string" table:number-columns-spanned="1" table:number-rows-spanned="2" table:style-name="ce39">
            <text:p>Стародворская Золоченная в печи</text:p>
          </table:table-cell>
          <table:table-cell table:style-name="ce4"/>
          <table:table-cell office:value-type="string" table:number-columns-spanned="1" table:number-rows-spanned="2" table:style-name="ce37">
            <text:p>Сочинка по-баварски</text:p>
          </table:table-cell>
          <table:table-cell office:value-type="string" table:number-columns-spanned="1" table:number-rows-spanned="2" table:style-name="ce37">
            <text:p>Стародворская EDLP/EDPP</text:p>
          </table:table-cell>
          <table:table-cell office:value-type="string" table:number-columns-spanned="1" table:number-rows-spanned="2" table:style-name="ce37">
            <text:p>Бордо</text:p>
          </table:table-cell>
          <table:table-cell office:value-type="string" table:number-columns-spanned="1" table:number-rows-spanned="2" table:style-name="ce37">
            <text:p>Бавария</text:p>
          </table:table-cell>
          <table:table-cell office:value-type="string" table:number-columns-spanned="1" table:number-rows-spanned="2" table:style-name="ce37">
            <text:p>Особая</text:p>
          </table:table-cell>
          <table:table-cell office:value-type="string" table:number-columns-spanned="1" table:number-rows-spanned="2" table:style-name="ce37">
            <text:p>Особая Без свинины</text:p>
          </table:table-cell>
          <table:table-cell office:value-type="string" table:number-columns-spanned="1" table:number-rows-spanned="2" table:style-name="ce37">
            <text:p>Филейбургская</text:p>
          </table:table-cell>
          <table:table-cell office:value-type="string" table:number-columns-spanned="1" table:number-rows-spanned="2" table:style-name="ce37">
            <text:p>Балыкбургская</text:p>
          </table:table-cell>
          <table:table-cell office:value-type="string" table:number-columns-spanned="1" table:number-rows-spanned="2" table:style-name="ce37">
            <text:p>Краковюрст</text:p>
          </table:table-cell>
          <table:table-cell table:number-columns-spanned="1" table:number-rows-spanned="2" table:style-name="ce38"/>
          <table:table-cell office:value-type="string" table:number-columns-spanned="1" table:number-rows-spanned="2" table:style-name="ce39">
            <text:p>Зареченские продукты</text:p>
          </table:table-cell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9"/>
        </table:table-row>
        <table:table-row table:style-name="ro1">
          <table:table-cell office:value-type="string" table:style-name="ce20">
            <text:p>ИТОГО, кг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table:style-name="ce4"/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table:style-name="ce22"/>
          <table:table-cell office:value-type="float" office:value="0" table:style-name="ce22">
            <text:p>0,00</text:p>
          </table:table-cell>
          <table:table-cell table:number-columns-repeated="16359"/>
        </table:table-row>
        <table:table-row table:number-rows-repeated="1048086" table:style-name="ro1">
          <table:table-cell table:number-columns-repeated="16384"/>
        </table:table-row>
        <table:named-expressions>
          <table:named-range table:name="_xlnm._FilterDatabase" table:cell-range-address="Лист1.$A$1:Лист1.$Y$2" table:base-cell-address="Лист1.$A$1"/>
        </table:named-expressions>
      </table:table>
      <table:named-expressions>
        <table:named-range table:name="GrossWeightTotalR" table:cell-range-address="Лист1.$Y$481" table:base-cell-address="Лист1.$A$1"/>
        <table:named-range table:name="PalletQtyTotalR" table:cell-range-address="Лист1.$Y$482" table:base-cell-address="Лист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yr" svg:font-family="&quot;Arial Cyr&quot;"/>
    <style:font-face style:name="Arial Cyr1" svg:font-family="&quot;Arial Cyr1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6P0"/>
    </number:number-style>
    <number:number-style style:name="N37" number:language="ru" number:country="RU">
      <number:number number:decimal-places="2" number:min-integer-digits="1" number:grouping="true"/>
    </number:number-style>
    <number:number-style style:name="N38" number:language="ru" number:country="RU">
      <number:number number:decimal-places="0" number:min-integer-digits="1"/>
    </number:number-style>
    <number:number-style style:name="N39">
      <number:number number:decimal-places="3" number:min-integer-digits="1"/>
    </number:number-style>
    <number:number-style style:name="N40P0">
      <number:number number:decimal-places="2" number:min-integer-digits="1" number:grouping="true"/>
      <number:text> </number:text>
    </number:number-style>
    <number:number-style style:name="N4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40P0"/>
    </number:number-style>
    <number:number-style style:name="N41" number:language="ru" number:country="RU">
      <number:number number:min-integer-digits="1"/>
    </number:number-style>
    <number:currency-style style:name="N42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2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2P0"/>
    </number:currency-style>
    <style:style style:name="Excel_32_Built-in_32_Normal" style:display-name="Excel Built-in Normal" style:family="table-cell" style:data-style-name="N41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_1054__1073__1099__1095__1085__1099__1081__32_2" style:display-name="Обычный 2" style:family="table-cell" style:data-style-name="N41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Uaer4</dc:creator>
    <dc:date>2026-01-20T09:54:28Z</dc:date>
  </office:meta>
</office:document-meta>
</file>